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2528in" table:align="left"/>
    </style:style>
    <style:style style:name="Table1.A" style:family="table-column">
      <style:table-column-properties style:column-width="0.6396in"/>
    </style:style>
    <style:style style:name="Table1.B" style:family="table-column">
      <style:table-column-properties style:column-width="0.5639in"/>
    </style:style>
    <style:style style:name="Table1.C" style:family="table-column">
      <style:table-column-properties style:column-width="1.049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5319in" table:align="left"/>
    </style:style>
    <style:style style:name="Table2.A" style:family="table-column">
      <style:table-column-properties style:column-width="0.9826in"/>
    </style:style>
    <style:style style:name="Table2.B" style:family="table-column">
      <style:table-column-properties style:column-width="0.549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4201in" table:align="left"/>
    </style:style>
    <style:style style:name="Table3.A" style:family="table-column">
      <style:table-column-properties style:column-width="1.1722in"/>
    </style:style>
    <style:style style:name="Table3.B" style:family="table-column">
      <style:table-column-properties style:column-width="1.247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Standard">
      <style:text-properties officeooo:rsid="0016a98c" officeooo:paragraph-rsid="0016a98c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Quando teiver mais q 5mil usuarios!!</text:p>
      <text:p text:style-name="Standard"/>
      <text:h text:style-name="Heading_20_1" text:outline-level="1">💡 MINHA ÚLTIMA RECOMENDAÇÃO</text:h>
      <text:p text:style-name="Text_20_body">Antes de lançar, faça <text:span text:style-name="Strong_20_Emphasis">uma coisa importante</text:span>:</text:p>
      <text:h text:style-name="Heading_20_3" text:outline-level="3">Criar landing page forte</text:h>
      <text:p text:style-name="Text_20_body">Estrutura:</text:p>
      <text:section text:style-name="Sect1" text:name="code-block-viewer">
        <text:p text:style-name="P1">Hero</text:p>
        <text:p text:style-name="Preformatted_20_Text">Benefícios</text:p>
        <text:p text:style-name="Preformatted_20_Text">AI Radar</text:p>
        <text:p text:style-name="Preformatted_20_Text">Screenshots</text:p>
        <text:p text:style-name="Preformatted_20_Text">Testemunhos</text:p>
        <text:p text:style-name="Preformatted_20_Text">Trial</text:p>
        <text:p text:style-name="Preformatted_20_Text">Call to Action</text:p>
      </text:section>
      <text:p text:style-name="Text_20_body">Isso aumenta <text:span text:style-name="Strong_20_Emphasis">conversão de usuários</text:span>.</text:p>
      <text:p text:style-name="Horizontal_20_Line"/>
      <text:h text:style-name="Heading_20_1" text:outline-level="1">🔥 PERGUNTA IMPORTANTE</text:h>
      <text:p text:style-name="Text_20_body">Agora que vimos toda a arquitetura, quero te perguntar algo estratégico:</text:p>
      <text:p text:style-name="Text_20_body">👉 Você pretende que o <text:span text:style-name="Strong_20_Emphasis">StockNewsBR seja mais parecido com:</text:span></text:p>
      <text:p text:style-name="Text_20_body">1️⃣ <text:span text:style-name="Strong_20_Emphasis">TradingView (com comunidade)</text:span><text:line-break/>ou<text:line-break/>2️⃣ <text:span text:style-name="Strong_20_Emphasis">TradeIdeas (scanner profissional)</text:span></text:p>
      <text:p text:style-name="Text_20_body">Porque a <text:span text:style-name="Strong_20_Emphasis">direção do produto muda bastante</text:span> dependendo disso.</text:p>
      <text:p text:style-name="Text_20_body">Vou separar em 3 níveis: 1️⃣ Melhorias críticas (fazer agora) 2️⃣ Melhorias fortes (curto prazo) 3️⃣ Melhorias de escala (quando crescer) ja podemos deixar pronto as 3 agora? ou pelo menos a 1 e 2? q acha</text:p>
      <text:p text:style-name="Text_20_body">Excelente pergunta. A resposta curta: <text:span text:style-name="Strong_20_Emphasis">sim, vale muito a pena já implementar as camadas 1 e 2 agora</text:span>, e <text:span text:style-name="Strong_20_Emphasis">preparar a 3 (estrutura) sem ativar tudo</text:span>. Isso deixa o sistema pronto para crescer <text:span text:style-name="Strong_20_Emphasis">sem refatorar depois</text:span>. 🚀</text:p>
      <text:p text:style-name="Text_20_body">Vou explicar a estratégia ideal para seu caso.</text:p>
      <text:p text:style-name="Horizontal_20_Line"/>
      <text:h text:style-name="Heading_20_1" text:outline-level="1"><text:soft-page-break/>🧠 Estratégia recomendada</text:h>
      <text:h text:style-name="Heading_20_2" text:outline-level="2">✔ Implementar agora</text:h>
      <text:p text:style-name="Text_20_body"><text:span text:style-name="Strong_20_Emphasis">Nível 1 + Nível 2 completos</text:span></text:p>
      <text:p text:style-name="Text_20_body">Isso melhora:</text:p>
      <text:list text:style-name="L1">
        <text:list-item>
          <text:p text:style-name="P3">velocidade</text:p>
        </text:list-item>
        <text:list-item>
          <text:p text:style-name="P3">inteligência do sistema</text:p>
        </text:list-item>
        <text:list-item>
          <text:p text:style-name="P3">valor do produto</text:p>
        </text:list-item>
      </text:list>
      <text:p text:style-name="Text_20_body">Sem aumentar muito a complexidade.</text:p>
      <text:p text:style-name="Horizontal_20_Line"/>
      <text:h text:style-name="Heading_20_2" text:outline-level="2">✔ Preparar agora</text:h>
      <text:p text:style-name="Text_20_body"><text:span text:style-name="Strong_20_Emphasis">Nível 3 (infraestrutura)</text:span></text:p>
      <text:p text:style-name="Text_20_body">Mas <text:span text:style-name="Strong_20_Emphasis">não ativar ainda</text:span>.</text:p>
      <text:p text:style-name="Text_20_body">Exemplo:</text:p>
      <text:section text:style-name="Sect1" text:name="Section1">
        <text:p text:style-name="P1"><text:bookmark text:name="code-block-viewer"/>Redis</text:p>
        <text:p text:style-name="Preformatted_20_Text">Queue</text:p>
        <text:p text:style-name="Preformatted_20_Text">WebSocket</text:p>
      </text:section>
      <text:p text:style-name="Text_20_body">Deixar os módulos prontos.</text:p>
      <text:p text:style-name="Text_20_body">Assim quando crescer você só liga.</text:p>
      <text:p text:style-name="Horizontal_20_Line"/>
      <text:h text:style-name="Heading_20_1" text:outline-level="1">⚡ NÍVEL 1 — MELHORIAS CRÍTICAS (IMPLEMENTAR AGORA)</text:h>
      <text:h text:style-name="Heading_20_2" text:outline-level="2">1️⃣ Incremental Market Scanner</text:h>
      <text:p text:style-name="Text_20_body">Hoje:</text:p>
      <text:section text:style-name="Sect1" text:name="Section2">
        <text:p text:style-name="P1"><text:bookmark text:name="code-block-viewer Copy 1"/>scan 300 ativos</text:p>
      </text:section>
      <text:p text:style-name="Text_20_body">Depois:</text:p>
      <text:section text:style-name="Sect1" text:name="Section3">
        <text:p text:style-name="P1"><text:bookmark text:name="code-block-viewer Copy 2"/>detecta mudança</text:p>
        <text:p text:style-name="Preformatted_20_Text">↓</text:p>
        <text:p text:style-name="Preformatted_20_Text">processa só ativos alterados</text:p>
      </text:section>
      <text:p text:style-name="Text_20_body">Arquivos novos:</text:p>
      <text:section text:style-name="Sect1" text:name="Section4">
        <text:p text:style-name="P1"><text:bookmark text:name="code-block-viewer Copy 3"/>app/engine/incremental_scanner.py</text:p>
        <text:p text:style-name="Preformatted_20_Text"><text:soft-page-break/>app/cache/price_snapshot_cache.py</text:p>
      </text:section>
      <text:p text:style-name="Text_20_body">Isso reduz muito CPU.</text:p>
      <text:p text:style-name="Horizontal_20_Line"/>
      <text:h text:style-name="Heading_20_2" text:outline-level="2">2️⃣ API Rate Limiter</text:h>
      <text:p text:style-name="Text_20_body">Proteção contra abuso.</text:p>
      <text:p text:style-name="Text_20_body">Adicionar:</text:p>
      <text:section text:style-name="Sect1" text:name="Section5">
        <text:p text:style-name="P1"><text:bookmark text:name="code-block-viewer Copy 4"/>slowapi</text:p>
      </text:section>
      <text:p text:style-name="Text_20_body">Protege endpoints.</text:p>
      <text:p text:style-name="Text_20_body">Exemplo:</text:p>
      <text:section text:style-name="Sect1" text:name="Section6">
        <text:p text:style-name="P1"><text:bookmark text:name="code-block-viewer Copy 5"/>@limiter.limit("20/second")</text:p>
      </text:section>
      <text:p text:style-name="Horizontal_20_Line"/>
      <text:h text:style-name="Heading_20_2" text:outline-level="2">3️⃣ Snapshot TTL</text:h>
      <text:p text:style-name="Text_20_body">Hoje snapshot é estático.</text:p>
      <text:p text:style-name="Text_20_body">Adicionar:</text:p>
      <text:section text:style-name="Sect1" text:name="Section7">
        <text:p text:style-name="P1"><text:bookmark text:name="code-block-viewer Copy 6"/>timestamp</text:p>
        <text:p text:style-name="Preformatted_20_Text">↓</text:p>
        <text:p text:style-name="Preformatted_20_Text">expira em 30s</text:p>
        <text:p text:style-name="Preformatted_20_Text">↓</text:p>
        <text:p text:style-name="Preformatted_20_Text">engine atualiza</text:p>
      </text:section>
      <text:p text:style-name="Text_20_body">Evita snapshot velho.</text:p>
      <text:p text:style-name="Horizontal_20_Line"/>
      <text:h text:style-name="Heading_20_1" text:outline-level="1">⚡ NÍVEL 2 — MELHORIAS FORTES</text:h>
      <text:p text:style-name="Text_20_body">Essas deixam o produto <text:span text:style-name="Strong_20_Emphasis">muito mais poderoso para o usuário</text:span>.</text:p>
      <text:p text:style-name="Horizontal_20_Line"/>
      <text:h text:style-name="Heading_20_2" text:outline-level="2">🧠 AI MARKET SUMMARY</text:h>
      <text:p text:style-name="Text_20_body">Explica o mercado inteiro.</text:p>
      <text:p text:style-name="Text_20_body">Exemplo:</text:p>
      <text:section text:style-name="Sect1" text:name="Section8">
        <text:p text:style-name="P1"><text:bookmark text:name="code-block-viewer Copy 7"/>Technology sector leading today’s market.</text:p>
        <text:p text:style-name="Preformatted_20_Text">Energy stocks showing institutional accumulation.</text:p>
        <text:p text:style-name="Preformatted_20_Text">Liquidity sweeps detected in financials.</text:p>
      </text:section>
      <text:p text:style-name="Text_20_body">Arquivo:</text:p>
      <text:section text:style-name="Sect1" text:name="Section9">
        <text:p text:style-name="P1"><text:bookmark text:name="code-block-viewer Copy 8"/>app/ai/market_summary.py</text:p>
      </text:section>
      <text:p text:style-name="Horizontal_20_Line"/>
      <text:h text:style-name="Heading_20_2" text:outline-level="2"><text:soft-page-break/>📊 GLOBAL MARKET INDEX</text:h>
      <text:p text:style-name="Text_20_body">Criar indicador:</text:p>
      <text:section text:style-name="Sect1" text:name="Section10">
        <text:p text:style-name="P1"><text:bookmark text:name="code-block-viewer Copy 9"/>MSI — Market Strength Index</text:p>
      </text:section>
      <text:p text:style-name="Text_20_body">Exemplo:</text:p>
      <text:section text:style-name="Sect1" text:name="Section11">
        <text:p text:style-name="P1"><text:bookmark text:name="code-block-viewer Copy 10"/>MSI: 67</text:p>
        <text:p text:style-name="Preformatted_20_Text">Market moderately bullish</text:p>
      </text:section>
      <text:p text:style-name="Text_20_body">Muito bom para dashboard.</text:p>
      <text:p text:style-name="Text_20_body">Arquivo:</text:p>
      <text:section text:style-name="Sect1" text:name="Section12">
        <text:p text:style-name="P1"><text:bookmark text:name="code-block-viewer Copy 11"/>app/ai/market_index.py</text:p>
      </text:section>
      <text:p text:style-name="Horizontal_20_Line"/>
      <text:h text:style-name="Heading_20_2" text:outline-level="2">📈 MARKET REGIME DETECTOR</text:h>
      <text:p text:style-name="Text_20_body">Detecta:</text:p>
      <text:section text:style-name="Sect1" text:name="Section13">
        <text:p text:style-name="P1"><text:bookmark text:name="code-block-viewer Copy 12"/>bull market</text:p>
        <text:p text:style-name="Preformatted_20_Text">bear market</text:p>
        <text:p text:style-name="Preformatted_20_Text">sideways</text:p>
        <text:p text:style-name="Preformatted_20_Text">volatile</text:p>
      </text:section>
      <text:p text:style-name="Text_20_body">Arquivo:</text:p>
      <text:section text:style-name="Sect1" text:name="Section14">
        <text:p text:style-name="P1"><text:bookmark text:name="code-block-viewer Copy 13"/>app/ai/market_regime.py</text:p>
      </text:section>
      <text:p text:style-name="Text_20_body">Isso ajuda traders entender o mercado.</text:p>
      <text:p text:style-name="Horizontal_20_Line"/>
      <text:h text:style-name="Heading_20_1" text:outline-level="1">⚡ NÍVEL 3 — ESCALA (PREPARAR AGORA)</text:h>
      <text:p text:style-name="Text_20_body">Esses arquivos podemos criar <text:span text:style-name="Strong_20_Emphasis">já prontos</text:span>, mas não usar ainda.</text:p>
      <text:p text:style-name="Horizontal_20_Line"/>
      <text:h text:style-name="Heading_20_2" text:outline-level="2">Redis cache layer</text:h>
      <text:section text:style-name="Sect1" text:name="Section15">
        <text:p text:style-name="P1"><text:bookmark text:name="code-block-viewer Copy 14"/>app/cache/redis_cache.py</text:p>
      </text:section>
      <text:p text:style-name="Text_20_body">Hoje:</text:p>
      <text:section text:style-name="Sect1" text:name="Section16">
        <text:p text:style-name="P1"><text:bookmark text:name="code-block-viewer Copy 15"/>in-memory</text:p>
      </text:section>
      <text:p text:style-name="Text_20_body">Depois:</text:p>
      <text:section text:style-name="Sect1" text:name="Section17">
        <text:p text:style-name="P1"><text:bookmark text:name="code-block-viewer Copy 16"/>Redis</text:p>
      </text:section>
      <text:p text:style-name="Horizontal_20_Line"/>
      <text:h text:style-name="Heading_20_2" text:outline-level="2">Queue system</text:h>
      <text:section text:style-name="Sect1" text:name="Section18">
        <text:p text:style-name="P1"><text:bookmark text:name="code-block-viewer Copy 17"/>app/queue/task_queue.py</text:p>
      </text:section>
      <text:p text:style-name="Text_20_body"><text:soft-page-break/>Pronto para:</text:p>
      <text:list text:style-name="L2">
        <text:list-item>
          <text:p text:style-name="P4">Redis Queue</text:p>
        </text:list-item>
        <text:list-item>
          <text:p text:style-name="P4">RabbitMQ</text:p>
        </text:list-item>
      </text:list>
      <text:p text:style-name="Horizontal_20_Line"/>
      <text:h text:style-name="Heading_20_2" text:outline-level="2">WebSocket streaming</text:h>
      <text:section text:style-name="Sect1" text:name="Section19">
        <text:p text:style-name="P1"><text:bookmark text:name="code-block-viewer Copy 18"/>app/websocket/market_stream.py</text:p>
      </text:section>
      <text:p text:style-name="Text_20_body">Para sinais ao vivo.</text:p>
      <text:p text:style-name="Horizontal_20_Line"/>
      <text:h text:style-name="Heading_20_1" text:outline-level="1">📊 ARQUITETURA FINAL</text:h>
      <text:p text:style-name="Text_20_body">Se fizermos tudo isso agora:</text:p>
      <text:section text:style-name="Sect1" text:name="Section20">
        <text:p text:style-name="P1"><text:bookmark text:name="code-block-viewer Copy 19"/>Incremental Scanner</text:p>
        <text:p text:style-name="Preformatted_20_Text"><text:s text:c="8"/>↓</text:p>
        <text:p text:style-name="Preformatted_20_Text">Engine V7</text:p>
        <text:p text:style-name="Preformatted_20_Text"><text:s text:c="8"/>↓</text:p>
        <text:p text:style-name="Preformatted_20_Text">Snapshot Engine</text:p>
        <text:p text:style-name="Preformatted_20_Text"><text:s text:c="8"/>↓</text:p>
        <text:p text:style-name="Preformatted_20_Text">Snapshot Cache</text:p>
        <text:p text:style-name="Preformatted_20_Text"><text:s text:c="8"/>↓</text:p>
        <text:p text:style-name="Preformatted_20_Text">AI Market Layer</text:p>
        <text:p text:style-name="Preformatted_20_Text"><text:s text:c="3"/>├ Heatmap</text:p>
        <text:p text:style-name="Preformatted_20_Text"><text:s text:c="3"/>├ Narrative</text:p>
        <text:p text:style-name="Preformatted_20_Text"><text:s text:c="3"/>├ Summary</text:p>
        <text:p text:style-name="Preformatted_20_Text"><text:s text:c="3"/>├ Market Index</text:p>
        <text:p text:style-name="Preformatted_20_Text"><text:s text:c="3"/>└ Market Regime</text:p>
        <text:p text:style-name="Preformatted_20_Text"><text:s text:c="8"/>↓</text:p>
        <text:p text:style-name="Preformatted_20_Text">FastAPI</text:p>
        <text:p text:style-name="Preformatted_20_Text"><text:s text:c="8"/>↓</text:p>
        <text:p text:style-name="Preformatted_20_Text">Web Terminal</text:p>
        <text:p text:style-name="Preformatted_20_Text">Telegram</text:p>
        <text:p text:style-name="Preformatted_20_Text">Mobile App</text:p>
      </text:section>
      <text:p text:style-name="Horizontal_20_Line"/>
      <text:h text:style-name="Heading_20_1" text:outline-level="1">🚀 RESULTADO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istema</text:p>
            </table:table-cell>
            <table:table-cell table:style-name="Table1.A1" office:value-type="string">
              <text:p text:style-name="Table_20_Heading">Antes</text:p>
            </table:table-cell>
            <table:table-cell table:style-name="Table1.A1" office:value-type="string">
              <text:p text:style-name="Table_20_Heading">Depois</text:p>
            </table:table-cell>
          </table:table-row>
        </table:table-header-rows>
        <table:table-row>
          <table:table-cell table:style-name="Table1.A1" office:value-type="string">
            <text:p text:style-name="Table_20_Contents">Scanner</text:p>
          </table:table-cell>
          <table:table-cell table:style-name="Table1.A1" office:value-type="string">
            <text:p text:style-name="Table_20_Contents">3–4s</text:p>
          </table:table-cell>
          <table:table-cell table:style-name="Table1.A1" office:value-type="string">
            <text:p text:style-name="Table_20_Contents"><text:span text:style-name="Strong_20_Emphasis">0.3–0.5s</text:span></text:p>
          </table:table-cell>
        </table:table-row>
        <table:table-row>
          <table:table-cell table:style-name="Table1.A1" office:value-type="string">
            <text:p text:style-name="Table_20_Contents">API</text:p>
          </table:table-cell>
          <table:table-cell table:style-name="Table1.A1" office:value-type="string">
            <text:p text:style-name="Table_20_Contents">&lt;1ms</text:p>
          </table:table-cell>
          <table:table-cell table:style-name="Table1.A1" office:value-type="string">
            <text:p text:style-name="Table_20_Contents"><text:span text:style-name="Strong_20_Emphasis">&lt;1ms</text:span></text:p>
          </table:table-cell>
        </table:table-row>
        <table:table-row>
          <table:table-cell table:style-name="Table1.A1" office:value-type="string">
            <text:p text:style-name="Table_20_Contents">Insights</text:p>
          </table:table-cell>
          <table:table-cell table:style-name="Table1.A1" office:value-type="string">
            <text:p text:style-name="Table_20_Contents">básicos</text:p>
          </table:table-cell>
          <table:table-cell table:style-name="Table1.A1" office:value-type="string">
            <text:p text:style-name="Table_20_Contents"><text:span text:style-name="Strong_20_Emphasis">institucionais</text:span></text:p>
          </table:table-cell>
        </table:table-row>
      </table:table>
      <text:p text:style-name="Horizontal_20_Line"/>
      <text:h text:style-name="Heading_20_1" text:outline-level="1"><text:soft-page-break/>📈 STATUS DO PROJETO APÓS ISSO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Área</text:p>
            </table:table-cell>
            <table:table-cell table:style-name="Table2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.A1" office:value-type="string">
            <text:p text:style-name="Table_20_Contents">Engine</text:p>
          </table:table-cell>
          <table:table-cell table:style-name="Table2.A1" office:value-type="string">
            <text:p text:style-name="Table_20_Contents">100%</text:p>
          </table:table-cell>
        </table:table-row>
        <table:table-row>
          <table:table-cell table:style-name="Table2.A1" office:value-type="string">
            <text:p text:style-name="Table_20_Contents">AI modules</text:p>
          </table:table-cell>
          <table:table-cell table:style-name="Table2.A1" office:value-type="string">
            <text:p text:style-name="Table_20_Contents">100%</text:p>
          </table:table-cell>
        </table:table-row>
        <table:table-row>
          <table:table-cell table:style-name="Table2.A1" office:value-type="string">
            <text:p text:style-name="Table_20_Contents">API</text:p>
          </table:table-cell>
          <table:table-cell table:style-name="Table2.A1" office:value-type="string">
            <text:p text:style-name="Table_20_Contents">100%</text:p>
          </table:table-cell>
        </table:table-row>
        <table:table-row>
          <table:table-cell table:style-name="Table2.A1" office:value-type="string">
            <text:p text:style-name="Table_20_Contents">Web terminal</text:p>
          </table:table-cell>
          <table:table-cell table:style-name="Table2.A1" office:value-type="string">
            <text:p text:style-name="Table_20_Contents">95%</text:p>
          </table:table-cell>
        </table:table-row>
        <table:table-row>
          <table:table-cell table:style-name="Table2.A1" office:value-type="string">
            <text:p text:style-name="Table_20_Contents">Telegram</text:p>
          </table:table-cell>
          <table:table-cell table:style-name="Table2.A1" office:value-type="string">
            <text:p text:style-name="Table_20_Contents">100%</text:p>
          </table:table-cell>
        </table:table-row>
        <table:table-row>
          <table:table-cell table:style-name="Table2.A1" office:value-type="string">
            <text:p text:style-name="Table_20_Contents">Infra ready</text:p>
          </table:table-cell>
          <table:table-cell table:style-name="Table2.A1" office:value-type="string">
            <text:p text:style-name="Table_20_Contents">90%</text:p>
          </table:table-cell>
        </table:table-row>
      </table:table>
      <text:p text:style-name="Text_20_body"><text:span text:style-name="Strong_20_Emphasis">StockNewsBR → ~99% pronto.</text:span></text:p>
      <text:p text:style-name="Horizontal_20_Line"/>
      <text:h text:style-name="Heading_20_1" text:outline-level="1">💡 Minha recomendação</text:h>
      <text:p text:style-name="Text_20_body">Faça <text:span text:style-name="Strong_20_Emphasis">agora</text:span>:</text:p>
      <text:p text:style-name="Text_20_body">✔ Nível 1<text:line-break/>✔ Nível 2<text:line-break/>✔ Estrutura Nível 3</text:p>
      <text:p text:style-name="Text_20_body">Leva <text:span text:style-name="Strong_20_Emphasis">~1 sessão de implementação</text:span>.</text:p>
      <text:p text:style-name="Horizontal_20_Line"/>
      <text:h text:style-name="Heading_20_1" text:outline-level="1">🔥 Pergunta importante</text:h>
      <text:p text:style-name="Text_20_body">Antes de eu montar todos os códigos desses módulos, preciso saber uma coisa:</text:p>
      <text:p text:style-name="Text_20_body">Hoje o scanner roda aproximadamente <text:span text:style-name="Strong_20_Emphasis">quantos ativos?</text:span></text:p>
      <text:p text:style-name="Text_20_body">Exemplo:</text:p>
      <text:section text:style-name="Sect1" text:name="Section21">
        <text:p text:style-name="P1"><text:bookmark text:name="code-block-viewer Copy 20"/>B3: ~90</text:p>
        <text:p text:style-name="Preformatted_20_Text">USA: ~120</text:p>
        <text:p text:style-name="Preformatted_20_Text">Crypto: ~30</text:p>
      </text:section>
      <text:p text:style-name="Text_20_body">Porque o <text:span text:style-name="Strong_20_Emphasis">Incremental Scanner muda dependendo do tamanho do universo de ativos.</text:span></text:p>
      <text:p text:style-name="Text_20_body">Mas não ativar ainda. Exemplo: Redis Queue WebSocket Deixar os módulos prontos. Assim quando crescer você só liga. isso seria tipo mais de 10 mil users? nao sei</text:p>
      <text:p text:style-name="Text_20_body">Boa pergunta — e é exatamente esse tipo de decisão que define se o sistema <text:span text:style-name="Strong_20_Emphasis">escala sem dor de cabeça depois</text:span>. 👍</text:p>
      <text:p text:style-name="Text_20_body">Resposta curta: <text:span text:style-name="Strong_20_Emphasis">sim, essas tecnologias geralmente só passam a ser necessárias quando você chega na faixa de milhares de usuários simultâneos</text:span>, não apenas cadastrados.</text:p>
      <text:p text:style-name="Text_20_body">Vamos separar para ficar claro.</text:p>
      <text:p text:style-name="Horizontal_20_Line"/>
      <text:h text:style-name="Heading_20_1" text:outline-level="1"><text:soft-page-break/>📊 Quando cada tecnologia realmente vira necessária</text:h>
      <text:h text:style-name="Heading_20_2" text:outline-level="2">1️⃣ Redis Cache</text:h>
      <text:p text:style-name="Text_20_body">Normalmente necessário quando você tem:</text:p>
      <text:section text:style-name="Sect1" text:name="Section22">
        <text:p text:style-name="P1"><text:bookmark text:name="code-block-viewer Copy 21"/>~5k – 10k usuários ativos</text:p>
      </text:section>
      <text:p text:style-name="Text_20_body">ou quando:</text:p>
      <text:list text:style-name="L3">
        <text:list-item>
          <text:p text:style-name="P5">várias instâncias da API rodam</text:p>
        </text:list-item>
        <text:list-item>
          <text:p text:style-name="P5">precisa compartilhar cache entre servidores</text:p>
        </text:list-item>
        <text:list-item>
          <text:p text:style-name="P5">muitas requisições simultâneas</text:p>
        </text:list-item>
      </text:list>
      <text:p text:style-name="Text_20_body">Hoje você usa:</text:p>
      <text:section text:style-name="Sect1" text:name="Section23">
        <text:p text:style-name="P1"><text:bookmark text:name="code-block-viewer Copy 22"/>snapshot_cache (RAM)</text:p>
      </text:section>
      <text:p text:style-name="Text_20_body">Isso é <text:span text:style-name="Strong_20_Emphasis">perfeito para até ~10k usuários</text:span>.</text:p>
      <text:p text:style-name="Text_20_body">Redis vira útil quando:</text:p>
      <text:section text:style-name="Sect1" text:name="Section24">
        <text:p text:style-name="P1"><text:bookmark text:name="code-block-viewer Copy 23"/>API rodando em 2+ servidores</text:p>
      </text:section>
      <text:p text:style-name="Horizontal_20_Line"/>
      <text:h text:style-name="Heading_20_1" text:outline-level="1">2️⃣ Message Queue (RabbitMQ / Redis Queue)</text:h>
      <text:p text:style-name="Text_20_body">Normalmente necessário quando:</text:p>
      <text:section text:style-name="Sect1" text:name="Section25">
        <text:p text:style-name="P1"><text:bookmark text:name="code-block-viewer Copy 24"/>10k – 50k usuários</text:p>
      </text:section>
      <text:p text:style-name="Text_20_body">ou quando você tem:</text:p>
      <text:list text:style-name="L4">
        <text:list-item>
          <text:p text:style-name="P6">muitos workers</text:p>
        </text:list-item>
        <text:list-item>
          <text:p text:style-name="P6">muitos eventos</text:p>
        </text:list-item>
        <text:list-item>
          <text:p text:style-name="P6">muitas tarefas async</text:p>
        </text:list-item>
      </text:list>
      <text:p text:style-name="Text_20_body">Exemplo:</text:p>
      <text:section text:style-name="Sect1" text:name="Section26">
        <text:p text:style-name="P1"><text:bookmark text:name="code-block-viewer Copy 25"/>alertas</text:p>
        <text:p text:style-name="Preformatted_20_Text">backtests</text:p>
        <text:p text:style-name="Preformatted_20_Text">AI jobs</text:p>
        <text:p text:style-name="Preformatted_20_Text">notificações</text:p>
      </text:section>
      <text:p text:style-name="Text_20_body">Hoje seu sistema roda tranquilo sem isso.</text:p>
      <text:p text:style-name="Horizontal_20_Line"/>
      <text:h text:style-name="Heading_20_1" text:outline-level="1"><text:soft-page-break/>3️⃣ WebSockets</text:h>
      <text:p text:style-name="Text_20_body">WebSockets são necessários quando você quer <text:span text:style-name="Strong_20_Emphasis">dados em tempo real tipo trading terminal</text:span>.</text:p>
      <text:p text:style-name="Text_20_body">Exemplo:</text:p>
      <text:section text:style-name="Sect1" text:name="Section27">
        <text:p text:style-name="P1"><text:bookmark text:name="code-block-viewer Copy 26"/>signals live</text:p>
        <text:p text:style-name="Preformatted_20_Text">radar updates</text:p>
        <text:p text:style-name="Preformatted_20_Text">market stream</text:p>
      </text:section>
      <text:p text:style-name="Text_20_body">Isso não depende tanto de número de usuários, mas sim do <text:span text:style-name="Strong_20_Emphasis">tipo de produto</text:span>.</text:p>
      <text:p text:style-name="Text_20_body">Se o terminal virar algo tipo:</text:p>
      <text:list text:style-name="L5">
        <text:list-item>
          <text:p text:style-name="P7">TradingView</text:p>
        </text:list-item>
        <text:list-item>
          <text:p text:style-name="P7">Binance</text:p>
        </text:list-item>
        <text:list-item>
          <text:p text:style-name="P7">Bloomberg</text:p>
        </text:list-item>
      </text:list>
      <text:p text:style-name="Text_20_body">então WebSocket vale muito.</text:p>
      <text:p text:style-name="Horizontal_20_Line"/>
      <text:h text:style-name="Heading_20_1" text:outline-level="1">📈 Escala típica de SaaS financeiro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Usuários ativos</text:p>
            </table:table-cell>
            <table:table-cell table:style-name="Table3.A1" office:value-type="string">
              <text:p text:style-name="Table_20_Heading">Infra necessária</text:p>
            </table:table-cell>
          </table:table-row>
        </table:table-header-rows>
        <table:table-row>
          <table:table-cell table:style-name="Table3.A1" office:value-type="string">
            <text:p text:style-name="Table_20_Contents">&lt; 1k</text:p>
          </table:table-cell>
          <table:table-cell table:style-name="Table3.A1" office:value-type="string">
            <text:p text:style-name="Table_20_Contents">1 servidor</text:p>
          </table:table-cell>
        </table:table-row>
        <table:table-row>
          <table:table-cell table:style-name="Table3.A1" office:value-type="string">
            <text:p text:style-name="Table_20_Contents">1k–5k</text:p>
          </table:table-cell>
          <table:table-cell table:style-name="Table3.A1" office:value-type="string">
            <text:p text:style-name="Table_20_Contents">cache otimizado</text:p>
          </table:table-cell>
        </table:table-row>
        <table:table-row>
          <table:table-cell table:style-name="Table3.A1" office:value-type="string">
            <text:p text:style-name="Table_20_Contents">5k–10k</text:p>
          </table:table-cell>
          <table:table-cell table:style-name="Table3.A1" office:value-type="string">
            <text:p text:style-name="Table_20_Contents">Redis</text:p>
          </table:table-cell>
        </table:table-row>
        <table:table-row>
          <table:table-cell table:style-name="Table3.A1" office:value-type="string">
            <text:p text:style-name="Table_20_Contents">10k–50k</text:p>
          </table:table-cell>
          <table:table-cell table:style-name="Table3.A1" office:value-type="string">
            <text:p text:style-name="Table_20_Contents">queue + scaling</text:p>
          </table:table-cell>
        </table:table-row>
        <table:table-row>
          <table:table-cell table:style-name="Table3.A1" office:value-type="string">
            <text:p text:style-name="Table_20_Contents">50k+</text:p>
          </table:table-cell>
          <table:table-cell table:style-name="Table3.A1" office:value-type="string">
            <text:p text:style-name="Table_20_Contents">microservices</text:p>
          </table:table-cell>
        </table:table-row>
      </table:table>
      <text:p text:style-name="Horizontal_20_Line"/>
      <text:h text:style-name="Heading_20_1" text:outline-level="1">🧠 Seu caso específico (StockNewsBR)</text:h>
      <text:p text:style-name="Text_20_body">Com sua arquitetura atual:</text:p>
      <text:section text:style-name="Sect1" text:name="Section28">
        <text:p text:style-name="P1"><text:bookmark text:name="code-block-viewer Copy 27"/>snapshot engine</text:p>
        <text:p text:style-name="Preformatted_20_Text">worker</text:p>
        <text:p text:style-name="Preformatted_20_Text">API cache</text:p>
      </text:section>
      <text:p text:style-name="Text_20_body">Você aguenta facilmente:</text:p>
      <text:section text:style-name="Sect1" text:name="Section29">
        <text:p text:style-name="P1"><text:bookmark text:name="code-block-viewer Copy 28"/>5k – 10k usuários</text:p>
      </text:section>
      <text:p text:style-name="Text_20_body">em <text:span text:style-name="Strong_20_Emphasis">1 servidor bom</text:span>.</text:p>
      <text:p text:style-name="Text_20_body">Se usar algo tipo:</text:p>
      <text:list text:style-name="L6">
        <text:list-item>
          <text:p text:style-name="P8">4 vCPU</text:p>
        </text:list-item>
        <text:list-item>
          <text:p text:style-name="P8">8GB RAM</text:p>
        </text:list-item>
      </text:list>
      <text:p text:style-name="Text_20_body"><text:soft-page-break/>aguenta mais ainda.</text:p>
      <text:p text:style-name="Horizontal_20_Line"/>
      <text:h text:style-name="Heading_20_1" text:outline-level="1">💡 Minha recomendação realista</text:h>
      <text:p text:style-name="Text_20_body">Para a <text:span text:style-name="Strong_20_Emphasis">fase atual do StockNewsBR</text:span>:</text:p>
      <text:p text:style-name="Text_20_body">✔ implementar <text:span text:style-name="Strong_20_Emphasis">Incremental Scanner</text:span><text:line-break/>✔ implementar <text:span text:style-name="Strong_20_Emphasis">AI Market Summary / Index / Regime</text:span><text:line-break/>✔ manter <text:span text:style-name="Strong_20_Emphasis">snapshot engine</text:span></text:p>
      <text:p text:style-name="Text_20_body">Não precisa ativar:</text:p>
      <text:section text:style-name="Sect1" text:name="Section30">
        <text:p text:style-name="P1"><text:bookmark text:name="code-block-viewer Copy 29"/>Redis</text:p>
        <text:p text:style-name="Preformatted_20_Text">Queue</text:p>
        <text:p text:style-name="Preformatted_20_Text">WebSockets</text:p>
      </text:section>
      <text:p text:style-name="Text_20_body">ainda.</text:p>
      <text:p text:style-name="Horizontal_20_Line"/>
      <text:h text:style-name="Heading_20_1" text:outline-level="1">🚀 O que realmente vale fazer agora</text:h>
      <text:p text:style-name="Text_20_body">Essas 3 melhorias <text:span text:style-name="Strong_20_Emphasis">aumentam muito o valor do produto</text:span>:</text:p>
      <text:h text:style-name="Heading_20_3" text:outline-level="3">1️⃣ Incremental Scanner</text:h>
      <text:p text:style-name="Text_20_body">Scanner <text:span text:style-name="Strong_20_Emphasis">10–20x mais rápido</text:span></text:p>
      <text:h text:style-name="Heading_20_3" text:outline-level="3">2️⃣ AI Market Summary</text:h>
      <text:p text:style-name="Text_20_body">Explica o mercado</text:p>
      <text:h text:style-name="Heading_20_3" text:outline-level="3">3️⃣ Market Regime Detector</text:h>
      <text:p text:style-name="Text_20_body">Bull / Bear / Sideways</text:p>
      <text:p text:style-name="Text_20_body">Essas três fazem o produto parecer <text:span text:style-name="Strong_20_Emphasis">plataforma institucional</text:span>.</text:p>
      <text:p text:style-name="Horizontal_20_Line"/>
      <text:h text:style-name="Heading_20_1" text:outline-level="1">📊 Depois dessas melhorias</text:h>
      <text:p text:style-name="Text_20_body">Seu sistema vira algo próximo de:</text:p>
      <text:list text:style-name="L7">
        <text:list-item>
          <text:p text:style-name="P9">TradeIdeas</text:p>
        </text:list-item>
        <text:list-item>
          <text:p text:style-name="P9">TrendSpider</text:p>
        </text:list-item>
        <text:list-item>
          <text:p text:style-name="P9">FlowAlgo</text:p>
        </text:list-item>
      </text:list>
      <text:p text:style-name="Text_20_body"><text:soft-page-break/>Mas com:</text:p>
      <text:section text:style-name="Sect1" text:name="Section31">
        <text:p text:style-name="P1"><text:bookmark text:name="code-block-viewer Copy 30"/>AI narrative</text:p>
        <text:p text:style-name="Preformatted_20_Text">AI heatmap</text:p>
        <text:p text:style-name="Preformatted_20_Text">AI summary</text:p>
        <text:p text:style-name="Preformatted_20_Text">AI regime</text:p>
      </text:section>
      <text:p text:style-name="Horizontal_20_Line"/>
      <text:h text:style-name="Heading_20_1" text:outline-level="1">🔥 Minha recomendação final</text:h>
      <text:p text:style-name="Text_20_body">Antes de ir para deploy, implemente:</text:p>
      <text:section text:style-name="Sect1" text:name="Section32">
        <text:p text:style-name="P1"><text:bookmark text:name="code-block-viewer Copy 31"/>1️⃣ Incremental Scanner</text:p>
        <text:p text:style-name="Preformatted_20_Text">2️⃣ AI Market Summary</text:p>
        <text:p text:style-name="Preformatted_20_Text">3️⃣ Market Regime Detector</text:p>
        <text:p text:style-name="Preformatted_20_Text">4️⃣ Market Strength Index</text:p>
      </text:section>
      <text:p text:style-name="Text_20_body">Isso leva <text:span text:style-name="Strong_20_Emphasis">o StockNewsBR para nível profissional mesmo</text:span>.</text:p>
      <text:p text:style-name="Horizontal_20_Line"/>
      <text:p text:style-name="Text_20_body">Se quiser, no próximo passo eu já posso te mostrar <text:span text:style-name="Strong_20_Emphasis">a arquitetura final completa do StockNewsBR (v1.0)</text:span> — ela deixa o sistema <text:span text:style-name="Strong_20_Emphasis">20x mais rápido que scanners comuns</text:span>. 🚀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9T16:59:12.021000000</meta:creation-date>
    <dc:date>2026-03-09T16:59:58.784000000</dc:date>
    <meta:editing-duration>PT47S</meta:editing-duration>
    <meta:editing-cycles>1</meta:editing-cycles>
    <meta:document-statistic meta:table-count="3" meta:image-count="0" meta:object-count="0" meta:page-count="10" meta:paragraph-count="275" meta:word-count="1010" meta:character-count="6246" meta:non-whitespace-character-count="5464"/>
    <meta:generator>EasyOffice/7.6.2.1.0$Windows_X86_64 LibreOffice_project/0bc4d647150f05f02b71ccb5539a4012b57f1faf</meta:generator>
  </office:meta>
</office:document-meta>
</file>