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leno, existe uma última coisa que pode fazer o StockNewsBR crescer muito rápido em usuários: 👉 um sistema de ranking público de oportunidades que pode viralizar no Telegram e no X (Twitter). depois vemos o market do produto, no X, face book adds, google adds etc.. ponha na lista</text:p>
      <text:p text:style-name="Text_20_body">Perfeito, <text:span text:style-name="Strong_20_Emphasis">Dileno</text:span>. Vamos organizar isso como um <text:span text:style-name="Strong_20_Emphasis">Roadmap de Marketing &amp; Growth</text:span> para o StockNewsBR e já deixar o item que você falou <text:span text:style-name="Strong_20_Emphasis">na lista oficial para depois</text:span>. 🚀</text:p>
      <text:p text:style-name="Horizontal_20_Line"/>
      <text:h text:style-name="Heading_20_1" text:outline-level="1">📈 Roadmap – Marketing do StockNewsBR</text:h>
      <text:p text:style-name="Text_20_body">Vamos separar em <text:span text:style-name="Strong_20_Emphasis">3 fases</text:span> para lançar o produto com força.</text:p>
      <text:p text:style-name="Horizontal_20_Line"/>
      <text:h text:style-name="Heading_20_1" text:outline-level="1">🧩 Fase 1 — Produto pronto (MVP avançado)</text:h>
      <text:p text:style-name="Text_20_body">Objetivo: deixar o sistema <text:span text:style-name="Strong_20_Emphasis">100% funcional e convincente</text:span>.</text:p>
      <text:p text:style-name="Text_20_body">Checklist do produto:</text:p>
      <text:section text:style-name="Sect1" text:name="code-block-viewer">
        <text:p text:style-name="P1">AI Market Pulse</text:p>
        <text:p text:style-name="Preformatted_20_Text">AI Market Heat Engine</text:p>
        <text:p text:style-name="Preformatted_20_Text">Top AI Opportunities</text:p>
        <text:p text:style-name="Preformatted_20_Text">AI Trade Setup Cards</text:p>
        <text:p text:style-name="Preformatted_20_Text">AI Confluence Engine</text:p>
        <text:p text:style-name="Preformatted_20_Text">AI Liquidity Map</text:p>
        <text:p text:style-name="Preformatted_20_Text">AI Opportunity Timeline</text:p>
        <text:p text:style-name="Preformatted_20_Text">AI Signal Strength Meter</text:p>
        <text:p text:style-name="Preformatted_20_Text">Alert System</text:p>
        <text:p text:style-name="Preformatted_20_Text">Telegram Alerts</text:p>
        <text:p text:style-name="Preformatted_20_Text">Web Trader Desk</text:p>
        <text:p text:style-name="Preformatted_20_Text">App Mobile</text:p>
        <text:p text:style-name="Preformatted_20_Text">Education Page</text:p>
      </text:section>
      <text:p text:style-name="Text_20_body">Quando isso estiver estável:</text:p>
      <text:section text:style-name="Sect1" text:name="Section1">
        <text:p text:style-name="P1"><text:bookmark text:name="code-block-viewer"/>produto pronto para marketing</text:p>
      </text:section>
      <text:p text:style-name="Horizontal_20_Line"/>
      <text:h text:style-name="Heading_20_1" text:outline-level="1">🚀 Fase 2 — Crescimento orgânico</text:h>
      <text:p text:style-name="Text_20_body">Aqui entra o que você mencionou.</text:p>
      <text:h text:style-name="Heading_20_2" text:outline-level="2">⭐ Ranking público de oportunidades</text:h>
      <text:p text:style-name="Text_20_body">Publicar automaticamente:</text:p>
      <text:section text:style-name="Sect1" text:name="Section2">
        <text:p text:style-name="P1"><text:bookmark text:name="code-block-viewer Copy 1"/>Top AI Opportunities Today</text:p>
      </text:section>
      <text:p text:style-name="Text_20_body">Exemplo:</text:p>
      <text:section text:style-name="Sect1" text:name="Section3">
        <text:p text:style-name="P1"><text:bookmark text:name="code-block-viewer Copy 2"/>Top AI Opportunities</text:p>
        <text:p text:style-name="Preformatted_20_Text"><text:soft-page-break/>1 VALE3</text:p>
        <text:p text:style-name="Preformatted_20_Text">Signal Strength 93</text:p>
        <text:p text:style-name="Preformatted_20_Text">Confidence 90%</text:p>
        <text:p text:style-name="Preformatted_20_Text">2 PETR4</text:p>
        <text:p text:style-name="Preformatted_20_Text">Signal Strength 91</text:p>
        <text:p text:style-name="Preformatted_20_Text">Confidence 88%</text:p>
        <text:p text:style-name="Preformatted_20_Text">3 WEGE3</text:p>
        <text:p text:style-name="Preformatted_20_Text">Signal Strength 89</text:p>
        <text:p text:style-name="Preformatted_20_Text">Confidence 84%</text:p>
      </text:section>
      <text:p text:style-name="Text_20_body">Post automático em:</text:p>
      <text:list text:style-name="L1">
        <text:list-item>
          <text:p text:style-name="P3">Telegram</text:p>
        </text:list-item>
        <text:list-item>
          <text:p text:style-name="P3">X</text:p>
        </text:list-item>
        <text:list-item>
          <text:p text:style-name="P3">site</text:p>
        </text:list-item>
      </text:list>
      <text:p text:style-name="Text_20_body">Isso cria <text:span text:style-name="Strong_20_Emphasis">prova social</text:span>.</text:p>
      <text:p text:style-name="Horizontal_20_Line"/>
      <text:h text:style-name="Heading_20_2" text:outline-level="2">🤖 Telegram Channel público</text:h>
      <text:p text:style-name="Text_20_body">Canal gratuito com:</text:p>
      <text:list text:style-name="L2">
        <text:list-item>
          <text:p text:style-name="P4">alguns alertas</text:p>
        </text:list-item>
        <text:list-item>
          <text:p text:style-name="P4">ranking diário</text:p>
        </text:list-item>
        <text:list-item>
          <text:p text:style-name="P4">market pulse</text:p>
        </text:list-item>
      </text:list>
      <text:p text:style-name="Text_20_body">Isso vira <text:span text:style-name="Strong_20_Emphasis">funil de usuários</text:span>.</text:p>
      <text:p text:style-name="Horizontal_20_Line"/>
      <text:h text:style-name="Heading_20_2" text:outline-level="2">🐦 X (Twitter)</text:h>
      <text:p text:style-name="Text_20_body">Post automático:</text:p>
      <text:section text:style-name="Sect1" text:name="Section4">
        <text:p text:style-name="P1"><text:bookmark text:name="code-block-viewer Copy 3"/>🔥 Institutional Setup</text:p>
        <text:p text:style-name="Preformatted_20_Text">VALE3</text:p>
        <text:p text:style-name="Preformatted_20_Text">Signal Strength 92</text:p>
        <text:p text:style-name="Preformatted_20_Text">Confidence 90%</text:p>
        <text:p text:style-name="Preformatted_20_Text">#B3</text:p>
        <text:p text:style-name="Preformatted_20_Text">#trading</text:p>
      </text:section>
      <text:p text:style-name="Horizontal_20_Line"/>
      <text:h text:style-name="Heading_20_1" text:outline-level="1">💰 Fase 3 — Tráfego pago</text:h>
      <text:p text:style-name="Text_20_body">Depois que:</text:p>
      <text:section text:style-name="Sect1" text:name="Section5">
        <text:p text:style-name="P1"><text:bookmark text:name="code-block-viewer Copy 4"/>produto validado</text:p>
      </text:section>
      <text:p text:style-name="Text_20_body">entramos com anúncios.</text:p>
      <text:p text:style-name="Horizontal_20_Line"/>
      <text:h text:style-name="Heading_20_2" text:outline-level="2"><text:soft-page-break/>📊 Google Ads</text:h>
      <text:p text:style-name="Text_20_body">Campanhas:</text:p>
      <text:section text:style-name="Sect1" text:name="Section6">
        <text:p text:style-name="P1"><text:bookmark text:name="code-block-viewer Copy 5"/>AI trading scanner</text:p>
        <text:p text:style-name="Preformatted_20_Text">scanner ações B3</text:p>
        <text:p text:style-name="Preformatted_20_Text">melhor app trader Brasil</text:p>
      </text:section>
      <text:p text:style-name="Horizontal_20_Line"/>
      <text:h text:style-name="Heading_20_2" text:outline-level="2">📘 Facebook / Instagram Ads</text:h>
      <text:p text:style-name="Text_20_body">Criativos:</text:p>
      <text:section text:style-name="Sect1" text:name="Section7">
        <text:p text:style-name="P1"><text:bookmark text:name="code-block-viewer Copy 6"/>AI detectou esse trade antes do movimento</text:p>
      </text:section>
      <text:p text:style-name="Text_20_body">ou</text:p>
      <text:section text:style-name="Sect1" text:name="Section8">
        <text:p text:style-name="P1"><text:bookmark text:name="code-block-viewer Copy 7"/>Veja como traders estão usando IA para analisar a B3</text:p>
      </text:section>
      <text:p text:style-name="Horizontal_20_Line"/>
      <text:h text:style-name="Heading_20_2" text:outline-level="2">🐦 X Ads</text:h>
      <text:p text:style-name="Text_20_body">Segmentação:</text:p>
      <text:list text:style-name="L3">
        <text:list-item>
          <text:p text:style-name="P5">traders</text:p>
        </text:list-item>
        <text:list-item>
          <text:p text:style-name="P5">mercado financeiro</text:p>
        </text:list-item>
        <text:list-item>
          <text:p text:style-name="P5">B3</text:p>
        </text:list-item>
        <text:list-item>
          <text:p text:style-name="P5">investimentos</text:p>
        </text:list-item>
      </text:list>
      <text:p text:style-name="Horizontal_20_Line"/>
      <text:h text:style-name="Heading_20_1" text:outline-level="1">🧠 Funil ideal de aquisição</text:h>
      <text:section text:style-name="Sect1" text:name="Section9">
        <text:p text:style-name="P1"><text:bookmark text:name="code-block-viewer Copy 8"/>Ads / X / Telegram</text:p>
        <text:p text:style-name="Preformatted_20_Text"><text:s text:c="8"/>↓</text:p>
        <text:p text:style-name="Preformatted_20_Text">Landing page</text:p>
        <text:p text:style-name="Preformatted_20_Text"><text:s text:c="8"/>↓</text:p>
        <text:p text:style-name="Preformatted_20_Text">Trial 90 dias</text:p>
        <text:p text:style-name="Preformatted_20_Text"><text:s text:c="8"/>↓</text:p>
        <text:p text:style-name="Preformatted_20_Text">Usuário vira premium</text:p>
      </text:section>
      <text:p text:style-name="Horizontal_20_Line"/>
      <text:h text:style-name="Heading_20_1" text:outline-level="1">⭐ Lista oficial de Growth (registrado)</text:h>
      <text:p text:style-name="Text_20_body">Colocando o item que você pediu:</text:p>
      <text:section text:style-name="Sect1" text:name="Section10">
        <text:p text:style-name="P1"><text:bookmark text:name="code-block-viewer Copy 9"/>Growth Roadmap</text:p>
        <text:p text:style-name="Preformatted_20_Text">1 Ranking público de oportunidades</text:p>
        <text:p text:style-name="Preformatted_20_Text">2 Telegram channel</text:p>
        <text:p text:style-name="Preformatted_20_Text">3 Posts automáticos no X</text:p>
        <text:p text:style-name="Preformatted_20_Text">4 Google Ads</text:p>
        <text:p text:style-name="Preformatted_20_Text"><text:soft-page-break/>5 Facebook Ads</text:p>
        <text:p text:style-name="Preformatted_20_Text">6 Influencers trading</text:p>
        <text:p text:style-name="Preformatted_20_Text">7 YouTube trading</text:p>
      </text:section>
      <text:p text:style-name="Text_20_body">Esse bloco fica <text:span text:style-name="Strong_20_Emphasis">para fase de marketing</text:span>.</text:p>
      <text:p text:style-name="Horizontal_20_Line"/>
      <text:h text:style-name="Heading_20_1" text:outline-level="1">📊 Estratégia que pode viralizar</text:h>
      <text:p text:style-name="Text_20_body">Post diário:</text:p>
      <text:section text:style-name="Sect1" text:name="Section11">
        <text:p text:style-name="P1"><text:bookmark text:name="code-block-viewer Copy 10"/>AI detected these setups today</text:p>
      </text:section>
      <text:p text:style-name="Text_20_body">Exemplo:</text:p>
      <text:section text:style-name="Sect1" text:name="Section12">
        <text:p text:style-name="P1"><text:bookmark text:name="code-block-viewer Copy 11"/>Top AI Opportunities</text:p>
        <text:p text:style-name="Preformatted_20_Text">VALE3</text:p>
        <text:p text:style-name="Preformatted_20_Text">PETR4</text:p>
        <text:p text:style-name="Preformatted_20_Text">WEGE3</text:p>
      </text:section>
      <text:p text:style-name="Text_20_body">Se o trade funcionar bem, isso vira:</text:p>
      <text:section text:style-name="Sect1" text:name="Section13">
        <text:p text:style-name="P1"><text:bookmark text:name="code-block-viewer Copy 12"/>prova de performance</text:p>
      </text:section>
      <text:p text:style-name="Horizontal_20_Line"/>
      <text:h text:style-name="Heading_20_1" text:outline-level="1">⭐ Avaliação estratégica</text:h>
      <text:p text:style-name="Text_20_body">O StockNewsBR já tem:</text:p>
      <text:list text:style-name="L4">
        <text:list-item>
          <text:p text:style-name="P6">produto forte</text:p>
        </text:list-item>
        <text:list-item>
          <text:p text:style-name="P6">diferenciação real</text:p>
        </text:list-item>
        <text:list-item>
          <text:p text:style-name="P6">narrativa de IA</text:p>
        </text:list-item>
      </text:list>
      <text:p text:style-name="Text_20_body">Então marketing pode funcionar bem.</text:p>
      <text:p text:style-name="Horizontal_20_Line"/>
      <text:p text:style-name="Text_20_body">💡 Dileno, antes de ir para marketing existe <text:span text:style-name="Strong_20_Emphasis">uma última revisão que vale muito a pena fazer</text:span>:</text:p>
      <text:p text:style-name="Text_20_body">👉 <text:span text:style-name="Strong_20_Emphasis">criar o Positioning Statement oficial do StockNewsBR</text:span> (a frase que explica o produto em 1 linha).</text:p>
      <text:p text:style-name="Text_20_body">Isso ajuda muito em:</text:p>
      <text:list text:style-name="L5">
        <text:list-item>
          <text:p text:style-name="P7">site</text:p>
        </text:list-item>
        <text:list-item>
          <text:p text:style-name="P7">ads</text:p>
        </text:list-item>
        <text:list-item>
          <text:p text:style-name="P7">investidores</text:p>
        </text:list-item>
        <text:list-item>
          <text:p text:style-name="P7">app stor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6T16:23:44.019000000</meta:creation-date>
    <dc:date>2026-03-06T16:24:00.773000000</dc:date>
    <meta:editing-duration>PT17S</meta:editing-duration>
    <meta:editing-cycles>1</meta:editing-cycles>
    <meta:document-statistic meta:table-count="0" meta:image-count="0" meta:object-count="0" meta:page-count="4" meta:paragraph-count="119" meta:word-count="483" meta:character-count="2766" meta:non-whitespace-character-count="2391"/>
    <meta:generator>EasyOffice/7.6.2.1.0$Windows_X86_64 LibreOffice_project/0bc4d647150f05f02b71ccb5539a4012b57f1faf</meta:generator>
  </office:meta>
</office:document-meta>
</file>