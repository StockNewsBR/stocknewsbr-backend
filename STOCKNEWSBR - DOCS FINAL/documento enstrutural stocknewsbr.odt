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, vamos continuar o desenvolvimento do <text:span text:style-name="Strong_20_Emphasis">StockNewsBR</text:span>. 🚀</text:p>
      <text:p text:style-name="Text_20_body">Pelo histórico do que fizemos ontem, estamos mais ou menos neste ponto do projeto:</text:p>
      <text:h text:style-name="Heading_20_2" text:outline-level="2">📊 Status atual do projeto (estimado)</text:h>
      <text:p text:style-name="Text_20_body"><text:span text:style-name="Strong_20_Emphasis">Infraestrutura / Engine:</text:span> ~90%<text:line-break/><text:span text:style-name="Strong_20_Emphasis">Sistema de sinais:</text:span> ~85%<text:line-break/><text:span text:style-name="Strong_20_Emphasis">Backend / API:</text:span> ~75%<text:line-break/><text:span text:style-name="Strong_20_Emphasis">Interface Web:</text:span> ~60%<text:line-break/><text:span text:style-name="Strong_20_Emphasis">Telegram:</text:span> ~70%<text:line-break/><text:span text:style-name="Strong_20_Emphasis">App Mobile:</text:span> ~10% (ainda não iniciado de verdade)</text:p>
      <text:h text:style-name="Heading_20_3" text:outline-level="3">O que já está funcionando</text:h>
      <text:p text:style-name="Text_20_body">✔ Engine de sinais<text:line-break/>✔ Market scan (pre / market / post)<text:line-break/>✔ Schedule automático<text:line-break/>✔ Signal ranker<text:line-break/>✔ Sistema de cache de market data<text:line-break/>✔ Estrutura do projeto organizada<text:line-break/>✔ Website + domínio<text:line-break/>✔ Email profissional (support@stocknewsbr.com)</text:p>
      <text:h text:style-name="Heading_20_3" text:outline-level="3">Módulos de sinais já definidos</text:h>
      <text:list text:style-name="L1">
        <text:list-item>
          <text:p text:style-name="P2">🔥 <text:span text:style-name="Strong_20_Emphasis">Top Movers</text:span></text:p>
        </text:list-item>
        <text:list-item>
          <text:p text:style-name="P2">⚡ <text:span text:style-name="Strong_20_Emphasis">Momentum</text:span></text:p>
        </text:list-item>
        <text:list-item>
          <text:p text:style-name="P2">💧 <text:span text:style-name="Strong_20_Emphasis">Liquidity Sweep</text:span></text:p>
        </text:list-item>
      </text:list>
      <text:p text:style-name="Text_20_body">Esses são o <text:span text:style-name="Strong_20_Emphasis">core do produto</text:span>.</text:p>
      <text:p text:style-name="Horizontal_20_Line"/>
      <text:h text:style-name="Heading_20_1" text:outline-level="1">🧠 Arquitetura atual do StockNewsBR</text:h>
      <text:section text:style-name="Sect1" text:name="code-block-viewer">
        <text:p text:style-name="P1">StockNewsBR</text:p>
        <text:p text:style-name="Preformatted_20_Text">│</text:p>
        <text:p text:style-name="Preformatted_20_Text">├── app</text:p>
        <text:p text:style-name="Preformatted_20_Text">│ <text:s text:c="2"/>├── engine</text:p>
        <text:p text:style-name="Preformatted_20_Text">│ <text:s text:c="2"/>│ <text:s text:c="2"/>├── signal_engine.py</text:p>
        <text:p text:style-name="Preformatted_20_Text">│ <text:s text:c="2"/>│ <text:s text:c="2"/>├── signal_ranker.py</text:p>
        <text:p text:style-name="Preformatted_20_Text">│ <text:s text:c="2"/>│ <text:s text:c="2"/>├── market_data_cache.py</text:p>
        <text:p text:style-name="Preformatted_20_Text">│ <text:s text:c="2"/>│ <text:s text:c="2"/>└── worker.py</text:p>
        <text:p text:style-name="Preformatted_20_Text">│ <text:s text:c="2"/>│</text:p>
        <text:p text:style-name="Preformatted_20_Text">│ <text:s text:c="2"/>├── scanners</text:p>
        <text:p text:style-name="Preformatted_20_Text">│ <text:s text:c="2"/>│ <text:s text:c="2"/>├── top_movers.py</text:p>
        <text:p text:style-name="Preformatted_20_Text">│ <text:s text:c="2"/>│ <text:s text:c="2"/>├── momentum.py</text:p>
        <text:p text:style-name="Preformatted_20_Text"><text:soft-page-break/>│ <text:s text:c="2"/>│ <text:s text:c="2"/>└── liquidity_sweep.py</text:p>
        <text:p text:style-name="Preformatted_20_Text">│ <text:s text:c="2"/>│</text:p>
        <text:p text:style-name="Preformatted_20_Text">│ <text:s text:c="2"/>├── api</text:p>
        <text:p text:style-name="Preformatted_20_Text">│ <text:s text:c="2"/>│ <text:s text:c="2"/>└── signals_api.py</text:p>
        <text:p text:style-name="Preformatted_20_Text">│ <text:s text:c="2"/>│</text:p>
        <text:p text:style-name="Preformatted_20_Text">│ <text:s text:c="2"/>├── scheduler</text:p>
        <text:p text:style-name="Preformatted_20_Text">│ <text:s text:c="2"/>│ <text:s text:c="2"/>└── schedule.py</text:p>
        <text:p text:style-name="Preformatted_20_Text">│</text:p>
        <text:p text:style-name="Preformatted_20_Text">├── web</text:p>
        <text:p text:style-name="Preformatted_20_Text">│ <text:s text:c="2"/>├── dashboard</text:p>
        <text:p text:style-name="Preformatted_20_Text">│ <text:s text:c="2"/>└── charts</text:p>
        <text:p text:style-name="Preformatted_20_Text">│</text:p>
        <text:p text:style-name="Preformatted_20_Text">├── telegram</text:p>
        <text:p text:style-name="Preformatted_20_Text">│ <text:s text:c="2"/>└── bot.py</text:p>
        <text:p text:style-name="Preformatted_20_Text">│</text:p>
        <text:p text:style-name="Preformatted_20_Text">└── main.py</text:p>
      </text:section>
      <text:p text:style-name="Horizontal_20_Line"/>
      <text:h text:style-name="Heading_20_1" text:outline-level="1">📍 Onde paramos ontem</text:h>
      <text:p text:style-name="Text_20_body">Estávamos <text:span text:style-name="Strong_20_Emphasis">melhorando performance institucional da engine</text:span>:</text:p>
      <text:h text:style-name="Heading_20_3" text:outline-level="3">Melhorias feitas / planejadas</text:h>
      <text:list text:style-name="L2">
        <text:list-item>
          <text:p text:style-name="P3">market_data_cache</text:p>
        </text:list-item>
        <text:list-item>
          <text:p text:style-name="P3">redução de scans repetidos</text:p>
        </text:list-item>
        <text:list-item>
          <text:p text:style-name="P3">signal ranking inteligente</text:p>
        </text:list-item>
        <text:list-item>
          <text:p text:style-name="P3">worker otimizado</text:p>
        </text:list-item>
        <text:list-item>
          <text:p text:style-name="P3">scans paralelos</text:p>
        </text:list-item>
        <text:list-item>
          <text:p text:style-name="P3">limpeza da pasta engine</text:p>
        </text:list-item>
      </text:list>
      <text:p text:style-name="Text_20_body">Você também perguntou sobre:</text:p>
      <text:p text:style-name="Quotations"><text:span text:style-name="Strong_20_Emphasis">2 arquivos signal_ranker (um em engine e outro em market)</text:span></text:p>
      <text:p text:style-name="Text_20_body">Precisamos decidir <text:span text:style-name="Strong_20_Emphasis">qual deletar</text:span>.</text:p>
      <text:p text:style-name="Horizontal_20_Line"/>
      <text:h text:style-name="Heading_20_1" text:outline-level="1">⚠️ Primeira coisa que vamos resolver agora</text:h>
      <text:p text:style-name="Text_20_body">Para evitar bagunça futura:</text:p>
      <text:h text:style-name="Heading_20_3" text:outline-level="3">Qual destes existe?</text:h>
      <text:p text:style-name="Text_20_body">Você mencionou:</text:p>
      <text:section text:style-name="Sect1" text:name="Section1">
        <text:p text:style-name="P1"><text:bookmark text:name="code-block-viewer"/>app/engine/signal_ranker.py</text:p>
        <text:p text:style-name="Preformatted_20_Text">app/market/signal_ranker.py</text:p>
      </text:section>
      <text:p text:style-name="Text_20_body"><text:soft-page-break/>O correto arquiteturalmente é:</text:p>
      <text:section text:style-name="Sect1" text:name="Section2">
        <text:p text:style-name="P1"><text:bookmark text:name="code-block-viewer Copy 1"/>app/engine/signal_ranker.py</text:p>
      </text:section>
      <text:p text:style-name="Text_20_body">Porque <text:span text:style-name="Strong_20_Emphasis">ranking é parte da engine</text:span>.</text:p>
      <text:p text:style-name="Text_20_body">Provavelmente devemos <text:span text:style-name="Strong_20_Emphasis">deletar o da pasta market</text:span>.</text:p>
      <text:p text:style-name="Text_20_body">Mas antes preciso confirmar.</text:p>
      <text:p text:style-name="Text_20_body">👉 Me diga:</text:p>
      <text:p text:style-name="Text_20_body">1️⃣ qual o caminho exato dos dois arquivos<text:line-break/>2️⃣ ou mande <text:span text:style-name="Strong_20_Emphasis">print da pasta app inteira</text:span></text:p>
      <text:p text:style-name="Horizontal_20_Line"/>
      <text:h text:style-name="Heading_20_1" text:outline-level="1">Depois disso vamos fazer o próximo upgrade 🚀</text:h>
      <text:h text:style-name="Heading_20_3" text:outline-level="3">Próximo passo grande do projeto</text:h>
      <text:p text:style-name="Text_20_body">Implementar o <text:span text:style-name="Strong_20_Emphasis">Market Scanner Central</text:span>.</text:p>
      <text:p text:style-name="Text_20_body">Ele vai alimentar:</text:p>
      <text:list text:style-name="L3">
        <text:list-item>
          <text:p text:style-name="P4">Web Dashboard</text:p>
        </text:list-item>
        <text:list-item>
          <text:p text:style-name="P4">Telegram</text:p>
        </text:list-item>
        <text:list-item>
          <text:p text:style-name="P4">App mobile</text:p>
        </text:list-item>
      </text:list>
      <text:p text:style-name="Text_20_body">Estrutura:</text:p>
      <text:section text:style-name="Sect1" text:name="Section3">
        <text:p text:style-name="P1"><text:bookmark text:name="code-block-viewer Copy 2"/>market_scanner.py</text:p>
        <text:p text:style-name="Preformatted_20_Text">gera:</text:p>
        <text:p text:style-name="Preformatted_20_Text">top_movers</text:p>
        <text:p text:style-name="Preformatted_20_Text">momentum</text:p>
        <text:p text:style-name="Preformatted_20_Text">liquidity_sweep</text:p>
        <text:p text:style-name="Preformatted_20_Text">rankings</text:p>
      </text:section>
      <text:p text:style-name="Text_20_body">Isso transforma o <text:span text:style-name="Strong_20_Emphasis">StockNewsBR em terminal de mercado real-time</text:span>.</text:p>
      <text:p text:style-name="Horizontal_20_Line"/>
      <text:p text:style-name="Text_20_body">💡 Também quero te mostrar hoje algo MUITO importante:</text:p>
      <text:p text:style-name="Text_20_body"><text:span text:style-name="Strong_20_Emphasis">como deixar o StockNewsBR 5-10x mais rápido</text:span><text:line-break/>(com apenas <text:span text:style-name="Strong_20_Emphasis">2 mudanças na engine</text:span>).</text:p>
      <text:p text:style-name="Horizontal_20_Line"/>
      <text:p text:style-name="Text_20_body">👉 Antes de continuar, me mande:</text:p>
      <text:list text:style-name="L4">
        <text:list-item>
          <text:p text:style-name="P5">print da <text:span text:style-name="Strong_20_Emphasis">pasta app</text:span></text:p>
        </text:list-item>
        <text:list-item>
          <text:p text:style-name="P5">ou lista de arquivos dentro dela</text:p>
        </text:list-item>
      </text:list>
      <text:p text:style-name="Text_20_body">para eu validar a <text:span text:style-name="Strong_20_Emphasis">arquitetura completa do projeto</text:span>.</text:p>
      <text:p text:style-name="P6"><text:soft-page-break/><draw:frame draw:style-name="fr1" draw:name="Image1" text:anchor-type="as-char" svg:width="21.3228in" svg:height="12.7398in" draw:z-index="0"><draw:image xlink:href="https://chatgpt.com/backend-api/estuary/content?id=file_00000000a648720eb513dbe0d464ef02&amp;ts=492547&amp;p=fs&amp;cid=1&amp;sig=08fd70f1f7b9a1628cc567d57073678e4fc4371dfa8b31aa4a962af7369a79e7&amp;v=0" xlink:type="simple" xlink:show="embed" xlink:actuate="onLoad"/><svg:title>Uploaded image</svg:title></draw:frame></text:p>
      <text:p text:style-name="P6"><text:soft-page-break/><draw:frame draw:style-name="fr1" draw:name="Image2" text:anchor-type="as-char" svg:width="21.3335in" svg:height="12.5835in" draw:z-index="1"><draw:image xlink:href="https://chatgpt.com/backend-api/estuary/content?id=file_00000000817c720ea17f7794886b85d3&amp;ts=492547&amp;p=fs&amp;cid=1&amp;sig=3da0120eb29dac4d4fe4adced6475eb0900ae5362aedd86cd01bc3257ee633b6&amp;v=0" xlink:type="simple" xlink:show="embed" xlink:actuate="onLoad"/><svg:title>Uploaded image</svg:title></draw:frame></text:p>
      <text:p text:style-name="P6"><text:soft-page-break/><draw:frame draw:style-name="fr1" draw:name="Image3" text:anchor-type="as-char" svg:width="21.3335in" svg:height="16.1354in" draw:z-index="2"><draw:image xlink:href="https://chatgpt.com/backend-api/estuary/content?id=file_000000007ce071f58eaafba568bbb46b&amp;ts=492547&amp;p=fs&amp;cid=1&amp;sig=7f821eacf3bb7f15e8c0c28aa0074160c09ae0a2f73e88578b41b5d627d3413a&amp;v=0" xlink:type="simple" xlink:show="embed" xlink:actuate="onLoad"/><svg:title>Uploaded image</svg:title></draw:frame></text:p>
      <text:p text:style-name="Text_20_body"><text:soft-page-break/>https://stocktwits.com/ , clicou na acao, apareco o grafico, dias pra escolher, 1d, 1w, 1m,etc., preco no topo, % subiu ou desceu, logo abaixo, semtimento, volume, pool, post.. veja todas as opcoes nos arquivos</text:p>
      <text:p text:style-name="Text_20_body">Perfeito. Essas imagens que você marcou são <text:span text:style-name="Strong_20_Emphasis">exatamente o blueprint do que o StockNewsBR pode virar</text:span>. 🚀<text:line-break/>Você basicamente destacou <text:span text:style-name="Strong_20_Emphasis">todas as features importantes do fluxo de um terminal social de mercado</text:span>.</text:p>
      <text:p text:style-name="Text_20_body">Vou quebrar o que você mostrou em <text:span text:style-name="Strong_20_Emphasis">módulos de produto</text:span>, porque isso vai definir <text:span text:style-name="Strong_20_Emphasis">o que vamos construir no StockNewsBR</text:span>.</text:p>
      <text:p text:style-name="Horizontal_20_Line"/>
      <text:h text:style-name="Heading_20_1" text:outline-level="1">🧠 Estrutura que você identificou no site</text:h>
      <text:p text:style-name="Text_20_body">Você marcou praticamente <text:span text:style-name="Strong_20_Emphasis">5 camadas do produto</text:span>.</text:p>
      <text:p text:style-name="Horizontal_20_Line"/>
      <text:h text:style-name="Heading_20_1" text:outline-level="1">1️⃣ HOME / FEED PRINCIPAL</text:h>
      <text:p text:style-name="Text_20_body">Primeira imagem.</text:p>
      <text:p text:style-name="Text_20_body">Funciona como <text:span text:style-name="Strong_20_Emphasis">hub do mercado + social feed</text:span>.</text:p>
      <text:p text:style-name="Text_20_body">Componentes que você marcou:</text:p>
      <text:h text:style-name="Heading_20_3" text:outline-level="3">🔎 Barra de busca</text:h>
      <text:section text:style-name="Sect1" text:name="Section4">
        <text:p text:style-name="P1"><text:bookmark text:name="code-block-viewer Copy 3"/>Search stocks, crypto, people</text:p>
      </text:section>
      <text:p text:style-name="Text_20_body">Função no StockNewsBR:</text:p>
      <text:section text:style-name="Sect1" text:name="Section5">
        <text:p text:style-name="P1"><text:bookmark text:name="code-block-viewer Copy 4"/>buscar ticker</text:p>
        <text:p text:style-name="Preformatted_20_Text">buscar usuário</text:p>
        <text:p text:style-name="Preformatted_20_Text">buscar notícias</text:p>
      </text:section>
      <text:p text:style-name="Horizontal_20_Line"/>
      <text:h text:style-name="Heading_20_3" text:outline-level="3">📈 Trending tickers</text:h>
      <text:p text:style-name="Text_20_body">Exemplo:</text:p>
      <text:section text:style-name="Sect1" text:name="Section6">
        <text:p text:style-name="P1"><text:bookmark text:name="code-block-viewer Copy 5"/>DIA</text:p>
        <text:p text:style-name="Preformatted_20_Text">SPY</text:p>
        <text:p text:style-name="Preformatted_20_Text">QQQ</text:p>
        <text:p text:style-name="Preformatted_20_Text">USO</text:p>
        <text:p text:style-name="Preformatted_20_Text">HGRAF</text:p>
      </text:section>
      <text:p text:style-name="Text_20_body">Isso é gerado por:</text:p>
      <text:section text:style-name="Sect1" text:name="Section7">
        <text:p text:style-name="P1"><text:bookmark text:name="code-block-viewer Copy 6"/>volume social</text:p>
        <text:p text:style-name="Preformatted_20_Text">volume trading</text:p>
        <text:p text:style-name="Preformatted_20_Text">momentum</text:p>
      </text:section>
      <text:p text:style-name="Text_20_body"><text:soft-page-break/>💡 Nosso <text:span text:style-name="Strong_20_Emphasis">signal_engine</text:span> já pode gerar isso.</text:p>
      <text:p text:style-name="Horizontal_20_Line"/>
      <text:h text:style-name="Heading_20_3" text:outline-level="3">🧠 Market Overview</text:h>
      <text:p text:style-name="Text_20_body">Você marcou:</text:p>
      <text:section text:style-name="Sect1" text:name="Section8">
        <text:p text:style-name="P1"><text:bookmark text:name="code-block-viewer Copy 7"/>Sentiment</text:p>
        <text:p text:style-name="Preformatted_20_Text">Trending</text:p>
        <text:p text:style-name="Preformatted_20_Text">All / Equities / Crypto</text:p>
      </text:section>
      <text:p text:style-name="Text_20_body">Isso é basicamente um <text:span text:style-name="Strong_20_Emphasis">market scanner visual</text:span>.</text:p>
      <text:p text:style-name="Text_20_body">No <text:span text:style-name="Strong_20_Emphasis">StockNewsBR</text:span> isso viraria:</text:p>
      <text:section text:style-name="Sect1" text:name="Section9">
        <text:p text:style-name="P1"><text:bookmark text:name="code-block-viewer Copy 8"/>🔥 Top Movers</text:p>
        <text:p text:style-name="Preformatted_20_Text">⚡ Momentum</text:p>
        <text:p text:style-name="Preformatted_20_Text">💧 Liquidity Sweep</text:p>
      </text:section>
      <text:p text:style-name="Text_20_body">Esses três já existem na nossa engine.</text:p>
      <text:p text:style-name="Horizontal_20_Line"/>
      <text:h text:style-name="Heading_20_3" text:outline-level="3">🧾 Feed de posts</text:h>
      <text:p text:style-name="Text_20_body">Exemplo:</text:p>
      <text:section text:style-name="Sect1" text:name="Section10">
        <text:p text:style-name="P1"><text:bookmark text:name="code-block-viewer Copy 9"/>Share an idea ($AAPL)</text:p>
        <text:p text:style-name="Preformatted_20_Text">Bullish / Bearish</text:p>
      </text:section>
      <text:p text:style-name="Text_20_body">Isso é a <text:span text:style-name="Strong_20_Emphasis">parte social</text:span>.</text:p>
      <text:p text:style-name="Text_20_body">⚠️ Mas aqui tem uma decisão importante:</text:p>
      <text:p text:style-name="Text_20_body">StockNewsBR pode:</text:p>
      <text:h text:style-name="Heading_20_3" text:outline-level="3">OPÇÃO 1</text:h>
      <text:p text:style-name="Text_20_body">ser <text:span text:style-name="Strong_20_Emphasis">scanner + news terminal</text:span></text:p>
      <text:h text:style-name="Heading_20_3" text:outline-level="3">OPÇÃO 2</text:h>
      <text:p text:style-name="Text_20_body">ser <text:span text:style-name="Strong_20_Emphasis">rede social estilo StockTwits</text:span></text:p>
      <text:p text:style-name="Text_20_body">Minha recomendação inicial:</text:p>
      <text:p text:style-name="Text_20_body">➡️ <text:span text:style-name="Strong_20_Emphasis">não fazer rede social agora</text:span></text:p>
      <text:p text:style-name="Text_20_body">Muito complexo.</text:p>
      <text:p text:style-name="Text_20_body">Foco:</text:p>
      <text:section text:style-name="Sect1" text:name="Section11">
        <text:p text:style-name="P1"><text:bookmark text:name="code-block-viewer Copy 10"/>signals</text:p>
        <text:p text:style-name="Preformatted_20_Text">news</text:p>
        <text:p text:style-name="Preformatted_20_Text">market scanner</text:p>
      </text:section>
      <text:p text:style-name="Horizontal_20_Line"/>
      <text:h text:style-name="Heading_20_1" text:outline-level="1"><text:soft-page-break/>2️⃣ WATCHLIST (lado esquerdo)</text:h>
      <text:p text:style-name="Text_20_body">Você marcou:</text:p>
      <text:section text:style-name="Sect1" text:name="Section12">
        <text:p text:style-name="P1"><text:bookmark text:name="code-block-viewer Copy 11"/>AAPL</text:p>
        <text:p text:style-name="Preformatted_20_Text">AMD</text:p>
        <text:p text:style-name="Preformatted_20_Text">AMZN</text:p>
        <text:p text:style-name="Preformatted_20_Text">ADBE</text:p>
      </text:section>
      <text:p text:style-name="Text_20_body">Isso é <text:span text:style-name="Strong_20_Emphasis">uma das features mais importantes</text:span>.</text:p>
      <text:p text:style-name="Text_20_body">No StockNewsBR teremos:</text:p>
      <text:h text:style-name="Heading_20_3" text:outline-level="3">⭐ Watchlist do usuário</text:h>
      <text:p text:style-name="Text_20_body">Exemplo:</text:p>
      <text:section text:style-name="Sect1" text:name="Section13">
        <text:p text:style-name="P1"><text:bookmark text:name="code-block-viewer Copy 12"/>AAPL</text:p>
        <text:p text:style-name="Preformatted_20_Text">NVDA</text:p>
        <text:p text:style-name="Preformatted_20_Text">TSLA</text:p>
        <text:p text:style-name="Preformatted_20_Text">MSFT</text:p>
      </text:section>
      <text:p text:style-name="Text_20_body">Quando algo acontece:</text:p>
      <text:section text:style-name="Sect1" text:name="Section14">
        <text:p text:style-name="P1"><text:bookmark text:name="code-block-viewer Copy 13"/>⚡ NVDA MOMENTUM</text:p>
        <text:p text:style-name="Preformatted_20_Text">🔥 TSLA TOP MOVER</text:p>
        <text:p text:style-name="Preformatted_20_Text">💧 AAPL LIQUIDITY SWEEP</text:p>
      </text:section>
      <text:p text:style-name="Text_20_body">➡️ alerta.</text:p>
      <text:p text:style-name="Horizontal_20_Line"/>
      <text:h text:style-name="Heading_20_1" text:outline-level="1">3️⃣ PÁGINA DO TICKER</text:h>
      <text:p text:style-name="Text_20_body">Segunda e terceira imagem.</text:p>
      <text:p text:style-name="Text_20_body">Quando clicou em:</text:p>
      <text:section text:style-name="Sect1" text:name="Section15">
        <text:p text:style-name="P1"><text:bookmark text:name="code-block-viewer Copy 14"/>AAPL</text:p>
      </text:section>
      <text:p text:style-name="Text_20_body">abriu página da ação.</text:p>
      <text:p text:style-name="Text_20_body">Estrutura:</text:p>
      <text:p text:style-name="Horizontal_20_Line"/>
      <text:h text:style-name="Heading_20_3" text:outline-level="3">📊 Header do ativo</text:h>
      <text:section text:style-name="Sect1" text:name="Section16">
        <text:p text:style-name="P1"><text:bookmark text:name="code-block-viewer Copy 15"/>AAPL</text:p>
        <text:p text:style-name="Preformatted_20_Text">$261.16</text:p>
        <text:p text:style-name="Preformatted_20_Text">+0.49%</text:p>
      </text:section>
      <text:p text:style-name="Text_20_body">Isso é <text:span text:style-name="Strong_20_Emphasis">realtime price</text:span>.</text:p>
      <text:p text:style-name="Horizontal_20_Line"/>
      <text:h text:style-name="Heading_20_3" text:outline-level="3">📈 gráfico</text:h>
      <text:p text:style-name="Text_20_body">Com:</text:p>
      <text:section text:style-name="Sect1" text:name="Section17">
        <text:p text:style-name="P1"><text:bookmark text:name="code-block-viewer Copy 16"/><text:soft-page-break/>1D</text:p>
        <text:p text:style-name="Preformatted_20_Text">1W</text:p>
        <text:p text:style-name="Preformatted_20_Text">1M</text:p>
        <text:p text:style-name="Preformatted_20_Text">3M</text:p>
        <text:p text:style-name="Preformatted_20_Text">6M</text:p>
        <text:p text:style-name="Preformatted_20_Text">YTD</text:p>
        <text:p text:style-name="Preformatted_20_Text">1Y</text:p>
      </text:section>
      <text:p text:style-name="Text_20_body">Isso vamos integrar com:</text:p>
      <text:section text:style-name="Sect1" text:name="Section18">
        <text:p text:style-name="P1"><text:bookmark text:name="code-block-viewer Copy 17"/>TradingView widget</text:p>
      </text:section>
      <text:p text:style-name="Text_20_body">Muito mais fácil.</text:p>
      <text:p text:style-name="Horizontal_20_Line"/>
      <text:h text:style-name="Heading_20_3" text:outline-level="3">📊 Estatísticas</text:h>
      <text:p text:style-name="Text_20_body">Você marcou:</text:p>
      <text:section text:style-name="Sect1" text:name="Section19">
        <text:p text:style-name="P1"><text:bookmark text:name="code-block-viewer Copy 18"/>Market Cap</text:p>
        <text:p text:style-name="Preformatted_20_Text">Volume</text:p>
        <text:p text:style-name="Preformatted_20_Text">52W High</text:p>
        <text:p text:style-name="Preformatted_20_Text">52W Low</text:p>
        <text:p text:style-name="Preformatted_20_Text">PE Ratio</text:p>
      </text:section>
      <text:p text:style-name="Text_20_body">Esses dados vêm de:</text:p>
      <text:section text:style-name="Sect1" text:name="Section20">
        <text:p text:style-name="P1"><text:bookmark text:name="code-block-viewer Copy 19"/>yfinance</text:p>
        <text:p text:style-name="Preformatted_20_Text">polygon</text:p>
        <text:p text:style-name="Preformatted_20_Text">alpaca</text:p>
      </text:section>
      <text:p text:style-name="Horizontal_20_Line"/>
      <text:h text:style-name="Heading_20_1" text:outline-level="1">4️⃣ SENTIMENTO SOCIAL</text:h>
      <text:p text:style-name="Text_20_body">Você marcou:</text:p>
      <text:section text:style-name="Sect1" text:name="Section21">
        <text:p text:style-name="P1"><text:bookmark text:name="code-block-viewer Copy 20"/>Sentiment</text:p>
        <text:p text:style-name="Preformatted_20_Text">Bearish</text:p>
        <text:p text:style-name="Preformatted_20_Text">Message Volume</text:p>
      </text:section>
      <text:p text:style-name="Text_20_body">Isso é <text:span text:style-name="Strong_20_Emphasis">análise social do ticker</text:span>.</text:p>
      <text:p text:style-name="Text_20_body">StockNewsBR pode fazer isso com:</text:p>
      <text:section text:style-name="Sect1" text:name="Section22">
        <text:p text:style-name="P1"><text:bookmark text:name="code-block-viewer Copy 21"/>reddit</text:p>
        <text:p text:style-name="Preformatted_20_Text">twitter</text:p>
        <text:p text:style-name="Preformatted_20_Text">news</text:p>
      </text:section>
      <text:p text:style-name="Text_20_body">Engine calcula:</text:p>
      <text:section text:style-name="Sect1" text:name="Section23">
        <text:p text:style-name="P1"><text:bookmark text:name="code-block-viewer Copy 22"/>sentiment score</text:p>
      </text:section>
      <text:p text:style-name="Text_20_body">Exemplo:</text:p>
      <text:section text:style-name="Sect1" text:name="Section24">
        <text:p text:style-name="P1"><text:bookmark text:name="code-block-viewer Copy 23"/>AAPL</text:p>
        <text:p text:style-name="Preformatted_20_Text">Sentiment: Bullish</text:p>
        <text:p text:style-name="Preformatted_20_Text">Score: 72</text:p>
      </text:section>
      <text:p text:style-name="Horizontal_20_Line"/>
      <text:h text:style-name="Heading_20_1" text:outline-level="1"><text:soft-page-break/>5️⃣ POLL / DISCUSSÃO</text:h>
      <text:p text:style-name="Text_20_body">Você marcou:</text:p>
      <text:section text:style-name="Sect1" text:name="Section25">
        <text:p text:style-name="P1"><text:bookmark text:name="code-block-viewer Copy 24"/>Poll</text:p>
        <text:p text:style-name="Preformatted_20_Text">What do you expect from earnings?</text:p>
      </text:section>
      <text:p text:style-name="Text_20_body">Isso é puramente social.</text:p>
      <text:p text:style-name="Text_20_body">Podemos adicionar depois.</text:p>
      <text:p text:style-name="Text_20_body">Não é prioridade.</text:p>
      <text:p text:style-name="Horizontal_20_Line"/>
      <text:h text:style-name="Heading_20_1" text:outline-level="1">🧠 O QUE ISSO SIGNIFICA PARA O STOCKNEWSBR</text:h>
      <text:p text:style-name="Text_20_body">Você basicamente desenhou <text:span text:style-name="Strong_20_Emphasis">o produto completo</text:span>.</text:p>
      <text:p text:style-name="Text_20_body">Arquitetura final:</text:p>
      <text:section text:style-name="Sect1" text:name="Section26">
        <text:p text:style-name="P1"><text:bookmark text:name="code-block-viewer Copy 25"/>StockNewsBR</text:p>
      </text:section>
      <text:h text:style-name="Heading_20_3" text:outline-level="3">1️⃣ Market Scanner</text:h>
      <text:p text:style-name="Text_20_body">engine gera:</text:p>
      <text:section text:style-name="Sect1" text:name="Section27">
        <text:p text:style-name="P1"><text:bookmark text:name="code-block-viewer Copy 26"/>Top Movers</text:p>
        <text:p text:style-name="Preformatted_20_Text">Momentum</text:p>
        <text:p text:style-name="Preformatted_20_Text">Liquidity Sweep</text:p>
      </text:section>
      <text:p text:style-name="Horizontal_20_Line"/>
      <text:h text:style-name="Heading_20_3" text:outline-level="3">2️⃣ Dashboard</text:h>
      <text:p text:style-name="Text_20_body">Home mostra:</text:p>
      <text:section text:style-name="Sect1" text:name="Section28">
        <text:p text:style-name="P1"><text:bookmark text:name="code-block-viewer Copy 27"/>Trending</text:p>
        <text:p text:style-name="Preformatted_20_Text">Signals</text:p>
        <text:p text:style-name="Preformatted_20_Text">Market Overview</text:p>
      </text:section>
      <text:p text:style-name="Horizontal_20_Line"/>
      <text:h text:style-name="Heading_20_3" text:outline-level="3">3️⃣ Página do ativo</text:h>
      <text:section text:style-name="Sect1" text:name="Section29">
        <text:p text:style-name="P1"><text:bookmark text:name="code-block-viewer Copy 28"/>price</text:p>
        <text:p text:style-name="Preformatted_20_Text">chart</text:p>
        <text:p text:style-name="Preformatted_20_Text">stats</text:p>
        <text:p text:style-name="Preformatted_20_Text">signals</text:p>
        <text:p text:style-name="Preformatted_20_Text">news</text:p>
      </text:section>
      <text:p text:style-name="Horizontal_20_Line"/>
      <text:h text:style-name="Heading_20_3" text:outline-level="3">4️⃣ Watchlist</text:h>
      <text:p text:style-name="Text_20_body">usuário salva:</text:p>
      <text:section text:style-name="Sect1" text:name="Section30">
        <text:p text:style-name="P1"><text:bookmark text:name="code-block-viewer Copy 29"/><text:soft-page-break/>AAPL</text:p>
        <text:p text:style-name="Preformatted_20_Text">NVDA</text:p>
        <text:p text:style-name="Preformatted_20_Text">TSLA</text:p>
      </text:section>
      <text:p text:style-name="Text_20_body">recebe alertas.</text:p>
      <text:p text:style-name="Horizontal_20_Line"/>
      <text:h text:style-name="Heading_20_1" text:outline-level="1">📊 Roadmap realista do produto</text:h>
      <text:h text:style-name="Heading_20_3" text:outline-level="3">Fase 1 (agora)</text:h>
      <text:p text:style-name="Text_20_body">MVP funcional</text:p>
      <text:section text:style-name="Sect1" text:name="Section31">
        <text:p text:style-name="P1"><text:bookmark text:name="code-block-viewer Copy 30"/>engine signals</text:p>
        <text:p text:style-name="Preformatted_20_Text">scanner</text:p>
        <text:p text:style-name="Preformatted_20_Text">dashboard</text:p>
        <text:p text:style-name="Preformatted_20_Text">ticker page</text:p>
        <text:p text:style-name="Preformatted_20_Text">watchlist</text:p>
        <text:p text:style-name="Preformatted_20_Text">telegram alerts</text:p>
      </text:section>
      <text:p text:style-name="Horizontal_20_Line"/>
      <text:h text:style-name="Heading_20_3" text:outline-level="3">Fase 2</text:h>
      <text:section text:style-name="Sect1" text:name="Section32">
        <text:p text:style-name="P1"><text:bookmark text:name="code-block-viewer Copy 31"/>sentiment engine</text:p>
        <text:p text:style-name="Preformatted_20_Text">news AI</text:p>
        <text:p text:style-name="Preformatted_20_Text">ranking</text:p>
      </text:section>
      <text:p text:style-name="Horizontal_20_Line"/>
      <text:h text:style-name="Heading_20_3" text:outline-level="3">Fase 3</text:h>
      <text:section text:style-name="Sect1" text:name="Section33">
        <text:p text:style-name="P1"><text:bookmark text:name="code-block-viewer Copy 32"/>mobile app</text:p>
        <text:p text:style-name="Preformatted_20_Text">push alerts</text:p>
      </text:section>
      <text:p text:style-name="Horizontal_20_Line"/>
      <text:h text:style-name="Heading_20_3" text:outline-level="3">Fase 4</text:h>
      <text:section text:style-name="Sect1" text:name="Section34">
        <text:p text:style-name="P1"><text:bookmark text:name="code-block-viewer Copy 33"/>social features</text:p>
        <text:p text:style-name="Preformatted_20_Text">polls</text:p>
        <text:p text:style-name="Preformatted_20_Text">posts</text:p>
      </text:section>
      <text:p text:style-name="Horizontal_20_Line"/>
      <text:h text:style-name="Heading_20_1" text:outline-level="1">⚠️ MAS TEM UMA COISA MUITO IMPORTANTE</text:h>
      <text:p text:style-name="Text_20_body">Antes de tudo isso precisamos decidir <text:span text:style-name="Strong_20_Emphasis">as TABS do site</text:span>.</text:p>
      <text:p text:style-name="Text_20_body">Você escreveu na imagem:</text:p>
      <text:section text:style-name="Sect1" text:name="Section35">
        <text:p text:style-name="P1"><text:bookmark text:name="code-block-viewer Copy 34"/>AS TABS</text:p>
      </text:section>
      <text:p text:style-name="Text_20_body">Isso define toda navegação.</text:p>
      <text:p text:style-name="Text_20_body">Minha sugestão:</text:p>
      <text:h text:style-name="Heading_20_3" text:outline-level="3"><text:soft-page-break/>Top menu</text:h>
      <text:section text:style-name="Sect1" text:name="Section36">
        <text:p text:style-name="P1"><text:bookmark text:name="code-block-viewer Copy 35"/>Home</text:p>
        <text:p text:style-name="Preformatted_20_Text">Signals</text:p>
        <text:p text:style-name="Preformatted_20_Text">Trending</text:p>
        <text:p text:style-name="Preformatted_20_Text">Watchlist</text:p>
        <text:p text:style-name="Preformatted_20_Text">News</text:p>
        <text:p text:style-name="Preformatted_20_Text">Screener</text:p>
      </text:section>
      <text:p text:style-name="Horizontal_20_Line"/>
      <text:h text:style-name="Heading_20_1" text:outline-level="1">📊 Exemplo do StockNewsBR</text:h>
      <text:h text:style-name="Heading_20_3" text:outline-level="3">HOME</text:h>
      <text:section text:style-name="Sect1" text:name="Section37">
        <text:p text:style-name="P1"><text:bookmark text:name="code-block-viewer Copy 36"/>🔥 Top Movers</text:p>
        <text:p text:style-name="Preformatted_20_Text">⚡ Momentum</text:p>
        <text:p text:style-name="Preformatted_20_Text">💧 Liquidity Sweep</text:p>
      </text:section>
      <text:p text:style-name="Horizontal_20_Line"/>
      <text:h text:style-name="Heading_20_3" text:outline-level="3">SIGNALS</text:h>
      <text:p text:style-name="Text_20_body">lista todos sinais da engine.</text:p>
      <text:p text:style-name="Horizontal_20_Line"/>
      <text:h text:style-name="Heading_20_3" text:outline-level="3">TRENDING</text:h>
      <text:p text:style-name="Text_20_body">ativos mais ativos.</text:p>
      <text:p text:style-name="Horizontal_20_Line"/>
      <text:h text:style-name="Heading_20_3" text:outline-level="3">WATCHLIST</text:h>
      <text:p text:style-name="Text_20_body">ativos do usuário.</text:p>
      <text:p text:style-name="Horizontal_20_Line"/>
      <text:h text:style-name="Heading_20_3" text:outline-level="3">NEWS</text:h>
      <text:p text:style-name="Text_20_body">notícias filtradas.</text:p>
      <text:p text:style-name="Horizontal_20_Line"/>
      <text:h text:style-name="Heading_20_1" text:outline-level="1">🚨 Próximo passo crítico agora</text:h>
      <text:p text:style-name="Text_20_body">Antes de continuar o código precisamos definir:</text:p>
      <text:h text:style-name="Heading_20_3" text:outline-level="3">🎯 Layout oficial do site</text:h>
      <text:p text:style-name="Text_20_body">Pergunta importante:</text:p>
      <text:p text:style-name="Text_20_body">Você quer que o <text:span text:style-name="Strong_20_Emphasis">StockNewsBR fique mais parecido com</text:span>:</text:p>
      <text:h text:style-name="Heading_20_3" text:outline-level="3"><text:soft-page-break/>1️⃣ Stocktwits</text:h>
      <text:p text:style-name="Text_20_body">(rede social)</text:p>
      <text:h text:style-name="Heading_20_3" text:outline-level="3">2️⃣ TradingView</text:h>
      <text:p text:style-name="Text_20_body">(terminal de mercado)</text:p>
      <text:h text:style-name="Heading_20_3" text:outline-level="3">3️⃣ Finviz</text:h>
      <text:p text:style-name="Text_20_body">(scanner poderoso)</text:p>
      <text:p text:style-name="Horizontal_20_Line"/>
      <text:p text:style-name="Text_20_body">💡 Minha recomendação:</text:p>
      <text:p text:style-name="Text_20_body">👉 <text:span text:style-name="Strong_20_Emphasis">TradingView + Finviz</text:span></text:p>
      <text:p text:style-name="Text_20_body">e <text:span text:style-name="Strong_20_Emphasis">não Stocktwits</text:span>.</text:p>
      <text:p text:style-name="Text_20_body">Porque vira <text:span text:style-name="Strong_20_Emphasis">produto profissional</text:span>, não rede social.</text:p>
      <text:p text:style-name="Horizontal_20_Line"/>
      <text:p text:style-name="Text_20_body">Se quiser, posso também te mostrar algo MUITO importante agora:</text:p>
      <text:h text:style-name="Heading_20_3" text:outline-level="3">🔥 o layout que faria o StockNewsBR parecer um produto de <text:span text:style-name="Strong_20_Emphasis">$50M startup</text:span></text:h>
      <text:p text:style-name="Text_20_body">(e é diferente de todos esses).</text:p>
      <text:p text:style-name="Text_20_body">OPÇÃO 2 ser rede social estilo StockTwits. essa opcao. isso q vai unir todos os trades em uma plataforma. pq XP, Rico, Clear, Modamais, etc, tem chat, mas pra acessar o chat vc tem q ter a conta neles.. aqui no StocknewsBR vai juntar todo mundo falando de uma acao, comentando, etc.. por isso q o https://stocktwits.com/ e' tao bem visto perantes os traders no USA.</text:p>
      <text:p text:style-name="Text_20_body">Excelente decisão. 💡<text:line-break/>Se o <text:span text:style-name="Strong_20_Emphasis">StockNewsBR seguir o modelo de rede social estilo StockTwits</text:span>, você está criando algo <text:span text:style-name="Strong_20_Emphasis">muito mais poderoso do que apenas um scanner</text:span>.</text:p>
      <text:p text:style-name="Text_20_body">Você basicamente está criando o:</text:p>
      <text:p text:style-name="Quotations"><text:span text:style-name="Strong_20_Emphasis">“StockTwits do Brasil”</text:span> 🇧🇷📈</text:p>
      <text:p text:style-name="Text_20_body">E sua lógica está <text:span text:style-name="Strong_20_Emphasis">100% correta</text:span>.</text:p>
      <text:p text:style-name="Text_20_body">Corretoras como:</text:p>
      <text:list text:style-name="L5">
        <text:list-item>
          <text:p text:style-name="P7">XP</text:p>
        </text:list-item>
        <text:list-item>
          <text:p text:style-name="P7">Rico</text:p>
        </text:list-item>
        <text:list-item>
          <text:p text:style-name="P7">Clear</text:p>
        </text:list-item>
        <text:list-item>
          <text:p text:style-name="P7">ModalMais</text:p>
        </text:list-item>
      </text:list>
      <text:p text:style-name="Text_20_body"><text:soft-page-break/>têm chat <text:span text:style-name="Strong_20_Emphasis">fechado dentro da plataforma</text:span>.</text:p>
      <text:p text:style-name="Text_20_body">Ou seja:</text:p>
      <text:list text:style-name="L6">
        <text:list-item>
          <text:p text:style-name="P8">usuário XP → só fala com XP</text:p>
        </text:list-item>
        <text:list-item>
          <text:p text:style-name="P8">usuário Rico → só fala com Rico</text:p>
        </text:list-item>
        <text:list-item>
          <text:p text:style-name="P8">usuário Clear → só fala com Clear</text:p>
        </text:list-item>
      </text:list>
      <text:p text:style-name="Text_20_body">O <text:span text:style-name="Strong_20_Emphasis">StockNewsBR resolve exatamente esse problema</text:span>.</text:p>
      <text:p text:style-name="Text_20_body">👉 <text:span text:style-name="Strong_20_Emphasis">plataforma neutra</text:span><text:line-break/>👉 <text:span text:style-name="Strong_20_Emphasis">todos os traders juntos</text:span><text:line-break/>👉 <text:span text:style-name="Strong_20_Emphasis">conversa por ticker</text:span></text:p>
      <text:p text:style-name="Text_20_body">Isso é exatamente o que fez o StockTwits crescer nos EUA.</text:p>
      <text:p text:style-name="Horizontal_20_Line"/>
      <text:h text:style-name="Heading_20_1" text:outline-level="1">🧠 O conceito central do StockNewsBR</text:h>
      <text:p text:style-name="Text_20_body">Não é apenas um scanner.</text:p>
      <text:p text:style-name="Text_20_body">É:</text:p>
      <text:p text:style-name="Quotations"><text:span text:style-name="Strong_20_Emphasis">Rede social de mercado em tempo real.</text:span></text:p>
      <text:p text:style-name="Text_20_body">Estrutura:</text:p>
      <text:section text:style-name="Sect1" text:name="Section38">
        <text:p text:style-name="P1"><text:bookmark text:name="code-block-viewer Copy 37"/>Ticker = sala de conversa</text:p>
      </text:section>
      <text:p text:style-name="Text_20_body">Exemplo:</text:p>
      <text:section text:style-name="Sect1" text:name="Section39">
        <text:p text:style-name="P1"><text:bookmark text:name="code-block-viewer Copy 38"/>$PETR4</text:p>
        <text:p text:style-name="Preformatted_20_Text">$VALE3</text:p>
        <text:p text:style-name="Preformatted_20_Text">$ITUB4</text:p>
        <text:p text:style-name="Preformatted_20_Text">$AAPL</text:p>
        <text:p text:style-name="Preformatted_20_Text">$NVDA</text:p>
        <text:p text:style-name="Preformatted_20_Text">$TSLA</text:p>
      </text:section>
      <text:p text:style-name="Text_20_body">Cada ticker vira um <text:span text:style-name="Strong_20_Emphasis">chat global</text:span>.</text:p>
      <text:p text:style-name="Horizontal_20_Line"/>
      <text:h text:style-name="Heading_20_1" text:outline-level="1">📊 Estrutura do produto</text:h>
      <text:h text:style-name="Heading_20_2" text:outline-level="2">1️⃣ Home (feed global)</text:h>
      <text:p text:style-name="Text_20_body">Mostra:</text:p>
      <text:p text:style-name="Text_20_body">🔥 Trending Tickers<text:line-break/>⚡ Top Movers<text:line-break/>💬 Posts recentes</text:p>
      <text:p text:style-name="Text_20_body"><text:soft-page-break/>Exemplo:</text:p>
      <text:section text:style-name="Sect1" text:name="Section40">
        <text:p text:style-name="P1"><text:bookmark text:name="code-block-viewer Copy 39"/>$PETR4 - explodindo no volume hoje</text:p>
        <text:p text:style-name="Preformatted_20_Text">$NVDA - forte momentum</text:p>
        <text:p text:style-name="Preformatted_20_Text">$TSLA - possível short squeeze</text:p>
      </text:section>
      <text:p text:style-name="Horizontal_20_Line"/>
      <text:h text:style-name="Heading_20_1" text:outline-level="1">2️⃣ Página do ativo (ticker page)</text:h>
      <text:p text:style-name="Text_20_body">Igual você marcou nas imagens.</text:p>
      <text:p text:style-name="Text_20_body">Estrutura:</text:p>
      <text:section text:style-name="Sect1" text:name="Section41">
        <text:p text:style-name="P1"><text:bookmark text:name="code-block-viewer Copy 40"/>AAPL</text:p>
        <text:p text:style-name="Preformatted_20_Text">$261.37 (+0.57%)</text:p>
      </text:section>
      <text:h text:style-name="Heading_20_3" text:outline-level="3">Componentes</text:h>
      <text:p text:style-name="Text_20_body">📈 gráfico<text:line-break/>📊 estatísticas<text:line-break/>🧠 sentimento<text:line-break/>💬 feed de mensagens</text:p>
      <text:p text:style-name="Horizontal_20_Line"/>
      <text:h text:style-name="Heading_20_3" text:outline-level="3">Exemplo visual</text:h>
      <text:section text:style-name="Sect1" text:name="Section42">
        <text:p text:style-name="P1"><text:bookmark text:name="code-block-viewer Copy 41"/>AAPL</text:p>
        <text:p text:style-name="Preformatted_20_Text">Price: $261.37</text:p>
        <text:p text:style-name="Preformatted_20_Text">[Chart]</text:p>
        <text:p text:style-name="Preformatted_20_Text">Sentiment: Bullish</text:p>
        <text:p text:style-name="Preformatted_20_Text">Message Volume: High</text:p>
        <text:p text:style-name="Preformatted_20_Text">--------------------------------</text:p>
        <text:p text:style-name="Preformatted_20_Text">POSTS</text:p>
        <text:p text:style-name="Preformatted_20_Text">@TraderBR</text:p>
        <text:p text:style-name="Preformatted_20_Text">$AAPL breakout acima de 262</text:p>
        <text:p text:style-name="Preformatted_20_Text">@SwingMaster</text:p>
        <text:p text:style-name="Preformatted_20_Text">$AAPL suporte em 258</text:p>
        <text:p text:style-name="Preformatted_20_Text">@OptionsGuy</text:p>
        <text:p text:style-name="Preformatted_20_Text">fluxo forte em calls</text:p>
      </text:section>
      <text:p text:style-name="Horizontal_20_Line"/>
      <text:h text:style-name="Heading_20_1" text:outline-level="1">3️⃣ Sistema de posts</text:h>
      <text:p text:style-name="Text_20_body">Post simples:</text:p>
      <text:section text:style-name="Sect1" text:name="Section43">
        <text:p text:style-name="P1"><text:bookmark text:name="code-block-viewer Copy 42"/>$AAPL rompendo resistência</text:p>
        <text:p text:style-name="Preformatted_20_Text">Bullish</text:p>
      </text:section>
      <text:p text:style-name="Text_20_body">Ou:</text:p>
      <text:section text:style-name="Sect1" text:name="Section44">
        <text:p text:style-name="P1"><text:bookmark text:name="code-block-viewer Copy 43"/>$PETR4 petróleo forte hoje</text:p>
      </text:section>
      <text:p text:style-name="Text_20_body">Quando alguém usa:</text:p>
      <text:section text:style-name="Sect1" text:name="Section45">
        <text:p text:style-name="P1"><text:bookmark text:name="code-block-viewer Copy 44"/>$AAPL</text:p>
      </text:section>
      <text:p text:style-name="Text_20_body"><text:soft-page-break/>o sistema automaticamente envia o post para a <text:span text:style-name="Strong_20_Emphasis">sala do ticker</text:span>.</text:p>
      <text:p text:style-name="Horizontal_20_Line"/>
      <text:h text:style-name="Heading_20_1" text:outline-level="1">🧠 Sistema de sentimento</text:h>
      <text:p text:style-name="Text_20_body">Cada post pode marcar:</text:p>
      <text:section text:style-name="Sect1" text:name="Section46">
        <text:p text:style-name="P1"><text:bookmark text:name="code-block-viewer Copy 45"/>Bullish</text:p>
        <text:p text:style-name="Preformatted_20_Text">Bearish</text:p>
      </text:section>
      <text:p text:style-name="Text_20_body">Então o sistema calcula:</text:p>
      <text:section text:style-name="Sect1" text:name="Section47">
        <text:p text:style-name="P1"><text:bookmark text:name="code-block-viewer Copy 46"/>Sentiment Score</text:p>
      </text:section>
      <text:p text:style-name="Text_20_body">Exemplo:</text:p>
      <text:section text:style-name="Sect1" text:name="Section48">
        <text:p text:style-name="P1"><text:bookmark text:name="code-block-viewer Copy 47"/>PETR4</text:p>
        <text:p text:style-name="Preformatted_20_Text">Bullish: 72%</text:p>
        <text:p text:style-name="Preformatted_20_Text">Bearish: 28%</text:p>
      </text:section>
      <text:p text:style-name="Horizontal_20_Line"/>
      <text:h text:style-name="Heading_20_1" text:outline-level="1">📊 Message Volume</text:h>
      <text:p text:style-name="Text_20_body">Conta quantos posts existem sobre o ticker.</text:p>
      <text:p text:style-name="Text_20_body">Exemplo:</text:p>
      <text:section text:style-name="Sect1" text:name="Section49">
        <text:p text:style-name="P1"><text:bookmark text:name="code-block-viewer Copy 48"/>PETR4</text:p>
        <text:p text:style-name="Preformatted_20_Text">Message Volume</text:p>
        <text:p text:style-name="Preformatted_20_Text">HIGH</text:p>
      </text:section>
      <text:p text:style-name="Text_20_body">Isso vira <text:span text:style-name="Strong_20_Emphasis">um indicador poderoso de atenção do mercado</text:span>.</text:p>
      <text:p text:style-name="Horizontal_20_Line"/>
      <text:h text:style-name="Heading_20_1" text:outline-level="1">🚀 Onde o StockNewsBR pode ser ainda melhor</text:h>
      <text:p text:style-name="Text_20_body">Aqui entra a <text:span text:style-name="Strong_20_Emphasis">grande oportunidade</text:span>.</text:p>
      <text:p text:style-name="Text_20_body">O StockTwits tem:</text:p>
      <text:section text:style-name="Sect1" text:name="Section50">
        <text:p text:style-name="P1"><text:bookmark text:name="code-block-viewer Copy 49"/>social</text:p>
      </text:section>
      <text:p text:style-name="Text_20_body">Mas não tem:</text:p>
      <text:section text:style-name="Sect1" text:name="Section51">
        <text:p text:style-name="P1"><text:bookmark text:name="code-block-viewer Copy 50"/>scanner forte</text:p>
        <text:p text:style-name="Preformatted_20_Text">AI</text:p>
        <text:p text:style-name="Preformatted_20_Text">signals</text:p>
      </text:section>
      <text:p text:style-name="Text_20_body">O <text:span text:style-name="Strong_20_Emphasis">StockNewsBR terá os dois</text:span>.</text:p>
      <text:p text:style-name="Horizontal_20_Line"/>
      <text:h text:style-name="Heading_20_1" text:outline-level="1">🧠 Arquitetura poderosa</text:h>
      <text:section text:style-name="Sect1" text:name="Section52">
        <text:p text:style-name="P1"><text:bookmark text:name="code-block-viewer Copy 51"/>StockNewsBR</text:p>
      </text:section>
      <text:h text:style-name="Heading_20_3" text:outline-level="3"><text:soft-page-break/>SOCIAL</text:h>
      <text:section text:style-name="Sect1" text:name="Section53">
        <text:p text:style-name="P1"><text:bookmark text:name="code-block-viewer Copy 52"/>posts</text:p>
        <text:p text:style-name="Preformatted_20_Text">ticker chat</text:p>
        <text:p text:style-name="Preformatted_20_Text">sentiment</text:p>
        <text:p text:style-name="Preformatted_20_Text">polls</text:p>
        <text:p text:style-name="Preformatted_20_Text">watchlist</text:p>
      </text:section>
      <text:h text:style-name="Heading_20_3" text:outline-level="3">MARKET ENGINE</text:h>
      <text:section text:style-name="Sect1" text:name="Section54">
        <text:p text:style-name="P1"><text:bookmark text:name="code-block-viewer Copy 53"/>top movers</text:p>
        <text:p text:style-name="Preformatted_20_Text">momentum</text:p>
        <text:p text:style-name="Preformatted_20_Text">liquidity sweep</text:p>
        <text:p text:style-name="Preformatted_20_Text">volume spikes</text:p>
      </text:section>
      <text:p text:style-name="Horizontal_20_Line"/>
      <text:h text:style-name="Heading_20_1" text:outline-level="1">💥 Exemplo de feed poderoso</text:h>
      <text:section text:style-name="Sect1" text:name="Section55">
        <text:p text:style-name="P1"><text:bookmark text:name="code-block-viewer Copy 54"/>🔥 NVDA</text:p>
        <text:p text:style-name="Preformatted_20_Text">Momentum Signal</text:p>
        <text:p text:style-name="Preformatted_20_Text">💬 248 messages</text:p>
        <text:p text:style-name="Preformatted_20_Text">Sentiment: Bullish 81%</text:p>
        <text:p text:style-name="Preformatted_20_Text">--------------------------------</text:p>
        <text:p text:style-name="Preformatted_20_Text">@TraderPro</text:p>
        <text:p text:style-name="Preformatted_20_Text">$NVDA parece pronto para novo ATH</text:p>
        <text:p text:style-name="Preformatted_20_Text">@OptionsFlow</text:p>
        <text:p text:style-name="Preformatted_20_Text">fluxo institucional entrando</text:p>
        <text:p text:style-name="Preformatted_20_Text">@SwingBR</text:p>
        <text:p text:style-name="Preformatted_20_Text">entrada acima de 915</text:p>
      </text:section>
      <text:p text:style-name="Horizontal_20_Line"/>
      <text:h text:style-name="Heading_20_1" text:outline-level="1">📊 Watchlist</text:h>
      <text:p text:style-name="Text_20_body">Usuário salva:</text:p>
      <text:section text:style-name="Sect1" text:name="Section56">
        <text:p text:style-name="P1"><text:bookmark text:name="code-block-viewer Copy 55"/>PETR4</text:p>
        <text:p text:style-name="Preformatted_20_Text">VALE3</text:p>
        <text:p text:style-name="Preformatted_20_Text">ITUB4</text:p>
        <text:p text:style-name="Preformatted_20_Text">NVDA</text:p>
        <text:p text:style-name="Preformatted_20_Text">TSLA</text:p>
      </text:section>
      <text:p text:style-name="Text_20_body">Recebe alerta quando:</text:p>
      <text:section text:style-name="Sect1" text:name="Section57">
        <text:p text:style-name="P1"><text:bookmark text:name="code-block-viewer Copy 56"/>⚡ Momentum</text:p>
        <text:p text:style-name="Preformatted_20_Text">🔥 Top mover</text:p>
        <text:p text:style-name="Preformatted_20_Text">💧 Liquidity sweep</text:p>
      </text:section>
      <text:p text:style-name="Horizontal_20_Line"/>
      <text:h text:style-name="Heading_20_1" text:outline-level="1">🔥 Funcionalidade que pode explodir o StockNewsBR</text:h>
      <text:p text:style-name="Text_20_body">Pouquíssimas plataformas fazem isso:</text:p>
      <text:h text:style-name="Heading_20_3" text:outline-level="3"><text:soft-page-break/>Trending por mensagens</text:h>
      <text:p text:style-name="Text_20_body">Exemplo:</text:p>
      <text:section text:style-name="Sect1" text:name="Section58">
        <text:p text:style-name="P1"><text:bookmark text:name="code-block-viewer Copy 57"/>Trending Now</text:p>
        <text:p text:style-name="Preformatted_20_Text">1️⃣ NVDA</text:p>
        <text:p text:style-name="Preformatted_20_Text">2️⃣ TSLA</text:p>
        <text:p text:style-name="Preformatted_20_Text">3️⃣ PETR4</text:p>
        <text:p text:style-name="Preformatted_20_Text">4️⃣ MGLU3</text:p>
      </text:section>
      <text:p text:style-name="Text_20_body">Baseado em:</text:p>
      <text:section text:style-name="Sect1" text:name="Section59">
        <text:p text:style-name="P1"><text:bookmark text:name="code-block-viewer Copy 58"/>message velocity</text:p>
      </text:section>
      <text:p text:style-name="Text_20_body">isso é <text:span text:style-name="Strong_20_Emphasis">super poderoso</text:span>.</text:p>
      <text:p text:style-name="Horizontal_20_Line"/>
      <text:h text:style-name="Heading_20_1" text:outline-level="1">📱 Futuro (mobile)</text:h>
      <text:p text:style-name="Text_20_body">Isso vira algo estilo:</text:p>
      <text:section text:style-name="Sect1" text:name="Section60">
        <text:p text:style-name="P1"><text:bookmark text:name="code-block-viewer Copy 59"/>Twitter + TradingView</text:p>
      </text:section>
      <text:p text:style-name="Text_20_body">para traders.</text:p>
      <text:p text:style-name="Text_20_body">Notificação:</text:p>
      <text:section text:style-name="Sect1" text:name="Section61">
        <text:p text:style-name="P1"><text:bookmark text:name="code-block-viewer Copy 60"/>🔥 TSLA trending</text:p>
        <text:p text:style-name="Preformatted_20_Text">⚡ NVDA momentum signal</text:p>
        <text:p text:style-name="Preformatted_20_Text">💬 350 new messages</text:p>
      </text:section>
      <text:p text:style-name="Horizontal_20_Line"/>
      <text:h text:style-name="Heading_20_1" text:outline-level="1">📊 Monetização futura</text:h>
      <text:p text:style-name="Text_20_body">Muito forte:</text:p>
      <text:section text:style-name="Sect1" text:name="Section62">
        <text:p text:style-name="P1"><text:bookmark text:name="code-block-viewer Copy 61"/>Premium signals</text:p>
        <text:p text:style-name="Preformatted_20_Text">Ads</text:p>
        <text:p text:style-name="Preformatted_20_Text">Pro scanner</text:p>
        <text:p text:style-name="Preformatted_20_Text">API</text:p>
        <text:p text:style-name="Preformatted_20_Text">Broker integrations</text:p>
      </text:section>
      <text:p text:style-name="Horizontal_20_Line"/>
      <text:h text:style-name="Heading_20_1" text:outline-level="1">🚨 Mas agora vem a parte mais importante</text:h>
      <text:p text:style-name="Text_20_body">Se vamos fazer rede social, precisamos criar <text:span text:style-name="Strong_20_Emphasis">3 sistemas fundamentais</text:span>:</text:p>
      <text:h text:style-name="Heading_20_3" text:outline-level="3">1️⃣ Sistema de usuários</text:h>
      <text:section text:style-name="Sect1" text:name="Section63">
        <text:p text:style-name="P1"><text:bookmark text:name="code-block-viewer Copy 62"/>signup</text:p>
        <text:p text:style-name="Preformatted_20_Text">login</text:p>
        <text:p text:style-name="Preformatted_20_Text">profile</text:p>
        <text:p text:style-name="Preformatted_20_Text">followers</text:p>
      </text:section>
      <text:p text:style-name="Horizontal_20_Line"/>
      <text:h text:style-name="Heading_20_3" text:outline-level="3"><text:soft-page-break/>2️⃣ Sistema de posts</text:h>
      <text:section text:style-name="Sect1" text:name="Section64">
        <text:p text:style-name="P1"><text:bookmark text:name="code-block-viewer Copy 63"/>create post</text:p>
        <text:p text:style-name="Preformatted_20_Text">reply</text:p>
        <text:p text:style-name="Preformatted_20_Text">like</text:p>
        <text:p text:style-name="Preformatted_20_Text">bullish/bearish</text:p>
        <text:p text:style-name="Preformatted_20_Text">ticker tag</text:p>
      </text:section>
      <text:p text:style-name="Horizontal_20_Line"/>
      <text:h text:style-name="Heading_20_3" text:outline-level="3">3️⃣ Sistema de ticker rooms</text:h>
      <text:section text:style-name="Sect1" text:name="Section65">
        <text:p text:style-name="P1"><text:bookmark text:name="code-block-viewer Copy 64"/>/ticker/AAPL</text:p>
        <text:p text:style-name="Preformatted_20_Text">/ticker/PETR4</text:p>
        <text:p text:style-name="Preformatted_20_Text">/ticker/NVDA</text:p>
      </text:section>
      <text:p text:style-name="Text_20_body">cada ticker = feed.</text:p>
      <text:p text:style-name="Horizontal_20_Line"/>
      <text:h text:style-name="Heading_20_1" text:outline-level="1">📊 Arquitetura nova do projeto</text:h>
      <text:section text:style-name="Sect1" text:name="Section66">
        <text:p text:style-name="P1"><text:bookmark text:name="code-block-viewer Copy 65"/>StockNewsBR</text:p>
      </text:section>
      <text:section text:style-name="Sect1" text:name="Section67">
        <text:p text:style-name="P1"><text:bookmark text:name="code-block-viewer Copy 66"/>app</text:p>
        <text:p text:style-name="Preformatted_20_Text"><text:s text:c="3"/>engine</text:p>
        <text:p text:style-name="Preformatted_20_Text"><text:s text:c="3"/>social</text:p>
        <text:p text:style-name="Preformatted_20_Text"><text:s text:c="3"/>posts</text:p>
        <text:p text:style-name="Preformatted_20_Text"><text:s text:c="3"/>users</text:p>
        <text:p text:style-name="Preformatted_20_Text"><text:s text:c="3"/>sentiment</text:p>
        <text:p text:style-name="Preformatted_20_Text"><text:s text:c="3"/>ranking</text:p>
      </text:section>
      <text:p text:style-name="Horizontal_20_Line"/>
      <text:h text:style-name="Heading_20_1" text:outline-level="1">🚨 Próxima decisão crítica</text:h>
      <text:p text:style-name="Text_20_body">Para a rede social funcionar precisamos definir:</text:p>
      <text:h text:style-name="Heading_20_3" text:outline-level="3">banco de dados.</text:h>
      <text:p text:style-name="Text_20_body">Recomendado:</text:p>
      <text:section text:style-name="Sect1" text:name="Section68">
        <text:p text:style-name="P1"><text:bookmark text:name="code-block-viewer Copy 67"/>PostgreSQL</text:p>
      </text:section>
      <text:p text:style-name="Text_20_body">estrutura:</text:p>
      <text:section text:style-name="Sect1" text:name="Section69">
        <text:p text:style-name="P1"><text:bookmark text:name="code-block-viewer Copy 68"/>users</text:p>
        <text:p text:style-name="Preformatted_20_Text">posts</text:p>
        <text:p text:style-name="Preformatted_20_Text">likes</text:p>
        <text:p text:style-name="Preformatted_20_Text">tickers</text:p>
        <text:p text:style-name="Preformatted_20_Text">watchlists</text:p>
        <text:p text:style-name="Preformatted_20_Text">sentiment</text:p>
      </text:section>
      <text:p text:style-name="Horizontal_20_Line"/>
      <text:h text:style-name="Heading_20_1" text:outline-level="1"><text:soft-page-break/>🔥 Agora vem uma pergunta MUITO importante</text:h>
      <text:p text:style-name="Text_20_body">Que pode decidir se o StockNewsBR vira <text:span text:style-name="Strong_20_Emphasis">10x maior</text:span>.</text:p>
      <text:p text:style-name="Text_20_body">Você quer que o StockNewsBR foque mais em:</text:p>
      <text:h text:style-name="Heading_20_3" text:outline-level="3">1️⃣ Brasil</text:h>
      <text:section text:style-name="Sect1" text:name="Section70">
        <text:p text:style-name="P1"><text:bookmark text:name="code-block-viewer Copy 69"/>PETR4</text:p>
        <text:p text:style-name="Preformatted_20_Text">VALE3</text:p>
        <text:p text:style-name="Preformatted_20_Text">ITUB4</text:p>
        <text:p text:style-name="Preformatted_20_Text">B3</text:p>
      </text:section>
      <text:p text:style-name="Text_20_body">ou</text:p>
      <text:h text:style-name="Heading_20_3" text:outline-level="3">2️⃣ Global</text:h>
      <text:section text:style-name="Sect1" text:name="Section71">
        <text:p text:style-name="P1"><text:bookmark text:name="code-block-viewer Copy 70"/>AAPL</text:p>
        <text:p text:style-name="Preformatted_20_Text">NVDA</text:p>
        <text:p text:style-name="Preformatted_20_Text">TSLA</text:p>
        <text:p text:style-name="Preformatted_20_Text">crypto</text:p>
        <text:p text:style-name="Preformatted_20_Text">forex</text:p>
      </text:section>
      <text:p text:style-name="Horizontal_20_Line"/>
      <text:p text:style-name="Text_20_body">💡 Minha recomendação estratégica:</text:p>
      <text:section text:style-name="Sect1" text:name="Section72">
        <text:p text:style-name="P1"><text:bookmark text:name="code-block-viewer Copy 71"/>GLOBAL</text:p>
        <text:p text:style-name="Preformatted_20_Text">+</text:p>
        <text:p text:style-name="Preformatted_20_Text">Brasil</text:p>
      </text:section>
      <text:p text:style-name="Text_20_body">porque escala muito mais.</text:p>
      <text:p text:style-name="Horizontal_20_Line"/>
      <text:p text:style-name="Text_20_body">Se quiser, eu também posso te mostrar algo <text:span text:style-name="Strong_20_Emphasis">muito importante agora</text:span>:</text:p>
      <text:p text:style-name="Text_20_body">👉 <text:span text:style-name="Strong_20_Emphasis">a arquitetura técnica completa de uma rede social de trading</text:span></text:p>
      <text:p text:style-name="Text_20_body">(tipo StockTwits + Reddit + TradingView)</text:p>
      <text:p text:style-name="Text_20_body">e <text:span text:style-name="Strong_20_Emphasis">como construir isso sem o projeto virar um monstro impossível de manter</text:span>. 🚀</text:p>
      <text:p text:style-name="P6"><draw:frame draw:style-name="fr1" draw:name="Image4" text:anchor-type="as-char" svg:width="9.6874in" svg:height="2.1457in" draw:z-index="3"><draw:image xlink:href="https://chatgpt.com/backend-api/estuary/content?id=file_00000000324c71f58c55db13814174e7&amp;ts=492547&amp;p=fs&amp;cid=1&amp;sig=aaaa1591694f8678de3b70f4c8bd1fe6778e3b93432eb8ca5f5120cd35ce3841&amp;v=0" xlink:type="simple" xlink:show="embed" xlink:actuate="onLoad"/><svg:title>Uploaded image</svg:title></draw:frame></text:p>
      <text:p text:style-name="Text_20_body"><text:soft-page-break/>vamos mudar uma coisas. somente Brasil, especificamente acoes B3 e acoes USA somente as BDRs. e Crypto. e colocar tudo o q for possivel e mportugues no website, APP, telegram alertas. olhe o q os brasileiros usam em ingles ai deixa em ingles. mais pra frente (deixe no projeto fururo) colocar uma bandeira brasil e USA no topo da webpage e APP ai teria tudo em ingles e mudaria somente pra acoes USA e crypto). mas isso seria pro futuro nao agora. faca uma lista a onde estamos, e tudo q tem q ser feirto, vo salvar isso pra nao perdermos o caminho ja falado. </text:p>
      <text:p text:style-name="Text_20_body">Perfeito. 👍<text:line-break/>Essa decisão deixa o <text:span text:style-name="Strong_20_Emphasis">StockNewsBR muito mais focado e viável para lançar rápido</text:span>. Vamos estruturar tudo claramente para você salvar e nunca perder o caminho do projeto. 📌</text:p>
      <text:p text:style-name="Horizontal_20_Line"/>
      <text:h text:style-name="Heading_20_1" text:outline-level="1">🎯 Estratégia Oficial do Produto (Definida)</text:h>
      <text:h text:style-name="Heading_20_2" text:outline-level="2">🌎 Mercado foco inicial</text:h>
      <text:p text:style-name="Text_20_body"><text:span text:style-name="Strong_20_Emphasis">Brasil</text:span></text:p>
      <text:p text:style-name="Text_20_body">Ativos suportados no lançamento:</text:p>
      <text:p text:style-name="Text_20_body">📈 <text:span text:style-name="Strong_20_Emphasis">Ações B3</text:span><text:line-break/>📈 <text:span text:style-name="Strong_20_Emphasis">BDRs (ações USA listadas no Brasil)</text:span><text:line-break/>🪙 <text:span text:style-name="Strong_20_Emphasis">Crypto</text:span></text:p>
      <text:p text:style-name="Text_20_body">Exemplos:</text:p>
      <text:section text:style-name="Sect1" text:name="Section73">
        <text:p text:style-name="P1"><text:bookmark text:name="code-block-viewer Copy 72"/>PETR4</text:p>
        <text:p text:style-name="Preformatted_20_Text">VALE3</text:p>
        <text:p text:style-name="Preformatted_20_Text">ITUB4</text:p>
        <text:p text:style-name="Preformatted_20_Text">MGLU3</text:p>
      </text:section>
      <text:p text:style-name="Text_20_body">BDRs:</text:p>
      <text:section text:style-name="Sect1" text:name="Section74">
        <text:p text:style-name="P1"><text:bookmark text:name="code-block-viewer Copy 73"/>AAPL34</text:p>
        <text:p text:style-name="Preformatted_20_Text">NVDC34</text:p>
        <text:p text:style-name="Preformatted_20_Text">TSLA34</text:p>
        <text:p text:style-name="Preformatted_20_Text">MSFT34</text:p>
      </text:section>
      <text:p text:style-name="Text_20_body">Crypto:</text:p>
      <text:section text:style-name="Sect1" text:name="Section75">
        <text:p text:style-name="P1"><text:bookmark text:name="code-block-viewer Copy 74"/>BTC</text:p>
        <text:p text:style-name="Preformatted_20_Text">ETH</text:p>
        <text:p text:style-name="Preformatted_20_Text">SOL</text:p>
      </text:section>
      <text:p text:style-name="Horizontal_20_Line"/>
      <text:h text:style-name="Heading_20_1" text:outline-level="1">🌐 Idioma da plataforma</text:h>
      <text:p text:style-name="Text_20_body"><text:span text:style-name="Strong_20_Emphasis">Idioma principal: Português 🇧🇷</text:span></text:p>
      <text:p text:style-name="Text_20_body">Aplicado em:</text:p>
      <text:list text:style-name="L7">
        <text:list-item>
          <text:p text:style-name="P9"><text:soft-page-break/>Website</text:p>
        </text:list-item>
        <text:list-item>
          <text:p text:style-name="P9">App Mobile</text:p>
        </text:list-item>
        <text:list-item>
          <text:p text:style-name="P9">Telegram Alerts</text:p>
        </text:list-item>
        <text:list-item>
          <text:p text:style-name="P9">Emails</text:p>
        </text:list-item>
        <text:list-item>
          <text:p text:style-name="P9">Interface</text:p>
        </text:list-item>
        <text:list-item>
          <text:p text:style-name="P9">Mensagens do sistema</text:p>
        </text:list-item>
      </text:list>
      <text:p text:style-name="Text_20_body">Exemplo:</text:p>
      <text:section text:style-name="Sect1" text:name="Section76">
        <text:p text:style-name="P1"><text:bookmark text:name="code-block-viewer Copy 75"/>Alta</text:p>
        <text:p text:style-name="Preformatted_20_Text">Baixa</text:p>
        <text:p text:style-name="Preformatted_20_Text">Sentimento</text:p>
        <text:p text:style-name="Preformatted_20_Text">Volume de mensagens</text:p>
        <text:p text:style-name="Preformatted_20_Text">Mais comentadas</text:p>
        <text:p text:style-name="Preformatted_20_Text">Tendências</text:p>
      </text:section>
      <text:p text:style-name="Text_20_body">Alguns termos permanecerão em inglês porque os traders já usam:</text:p>
      <text:section text:style-name="Sect1" text:name="Section77">
        <text:p text:style-name="P1"><text:bookmark text:name="code-block-viewer Copy 76"/>Bullish</text:p>
        <text:p text:style-name="Preformatted_20_Text">Bearish</text:p>
        <text:p text:style-name="Preformatted_20_Text">Momentum</text:p>
        <text:p text:style-name="Preformatted_20_Text">Breakout</text:p>
        <text:p text:style-name="Preformatted_20_Text">Short</text:p>
        <text:p text:style-name="Preformatted_20_Text">Long</text:p>
      </text:section>
      <text:p text:style-name="Horizontal_20_Line"/>
      <text:h text:style-name="Heading_20_1" text:outline-level="1">🔮 Feature futura (não agora)</text:h>
      <text:p text:style-name="Text_20_body">Suporte multilíngue.</text:p>
      <text:p text:style-name="Text_20_body">No topo do site:</text:p>
      <text:section text:style-name="Sect1" text:name="Section78">
        <text:p text:style-name="P1"><text:bookmark text:name="code-block-viewer Copy 77"/>🇧🇷 Português</text:p>
        <text:p text:style-name="Preformatted_20_Text">🇺🇸 English</text:p>
      </text:section>
      <text:p text:style-name="Text_20_body">Quando mudar idioma:</text:p>
      <text:p text:style-name="Text_20_body">Brasil:</text:p>
      <text:section text:style-name="Sect1" text:name="Section79">
        <text:p text:style-name="P1"><text:bookmark text:name="code-block-viewer Copy 78"/>PETR4</text:p>
        <text:p text:style-name="Preformatted_20_Text">VALE3</text:p>
      </text:section>
      <text:p text:style-name="Text_20_body">USA:</text:p>
      <text:section text:style-name="Sect1" text:name="Section80">
        <text:p text:style-name="P1"><text:bookmark text:name="code-block-viewer Copy 79"/>AAPL</text:p>
        <text:p text:style-name="Preformatted_20_Text">NVDA</text:p>
        <text:p text:style-name="Preformatted_20_Text">TSLA</text:p>
      </text:section>
      <text:p text:style-name="Text_20_body">Crypto permanece igual.</text:p>
      <text:p text:style-name="Text_20_body">📌 <text:span text:style-name="Strong_20_Emphasis">Isso fica no roadmap futuro.</text:span></text:p>
      <text:p text:style-name="Horizontal_20_Line"/>
      <text:h text:style-name="Heading_20_1" text:outline-level="1"><text:soft-page-break/>🧠 Conceito central do StockNewsBR</text:h>
      <text:p text:style-name="Text_20_body">Cada <text:span text:style-name="Strong_20_Emphasis">ticker é uma sala de conversa</text:span>.</text:p>
      <text:p text:style-name="Text_20_body">Exemplo:</text:p>
      <text:section text:style-name="Sect1" text:name="Section81">
        <text:p text:style-name="P1"><text:bookmark text:name="code-block-viewer Copy 80"/>/ticker/PETR4</text:p>
        <text:p text:style-name="Preformatted_20_Text">/ticker/VALE3</text:p>
        <text:p text:style-name="Preformatted_20_Text">/ticker/BTC</text:p>
      </text:section>
      <text:p text:style-name="Text_20_body">Dentro dessa sala:</text:p>
      <text:list text:style-name="L8">
        <text:list-item>
          <text:p text:style-name="P10">gráfico</text:p>
        </text:list-item>
        <text:list-item>
          <text:p text:style-name="P10">estatísticas</text:p>
        </text:list-item>
        <text:list-item>
          <text:p text:style-name="P10">sentimento</text:p>
        </text:list-item>
        <text:list-item>
          <text:p text:style-name="P10">feed de mensagens</text:p>
        </text:list-item>
        <text:list-item>
          <text:p text:style-name="P10">alertas da engine</text:p>
        </text:list-item>
      </text:list>
      <text:p text:style-name="Horizontal_20_Line"/>
      <text:h text:style-name="Heading_20_1" text:outline-level="1">🏗️ Arquitetura do Produto</text:h>
      <text:section text:style-name="Sect1" text:name="Section82">
        <text:p text:style-name="P1"><text:bookmark text:name="code-block-viewer Copy 81"/>StockNewsBR</text:p>
      </text:section>
      <text:h text:style-name="Heading_20_2" text:outline-level="2">1️⃣ Market Engine</text:h>
      <text:p text:style-name="Text_20_body">Sistema que analisa o mercado.</text:p>
      <text:p text:style-name="Text_20_body">Sinais:</text:p>
      <text:section text:style-name="Sect1" text:name="Section83">
        <text:p text:style-name="P1"><text:bookmark text:name="code-block-viewer Copy 82"/>Top Movers</text:p>
        <text:p text:style-name="Preformatted_20_Text">Momentum</text:p>
        <text:p text:style-name="Preformatted_20_Text">Liquidity Sweep</text:p>
        <text:p text:style-name="Preformatted_20_Text">Volume Spike</text:p>
      </text:section>
      <text:p text:style-name="Horizontal_20_Line"/>
      <text:h text:style-name="Heading_20_2" text:outline-level="2">2️⃣ Rede Social</text:h>
      <text:p text:style-name="Text_20_body">Usuários podem:</text:p>
      <text:section text:style-name="Sect1" text:name="Section84">
        <text:p text:style-name="P1"><text:bookmark text:name="code-block-viewer Copy 83"/>postar ideias</text:p>
        <text:p text:style-name="Preformatted_20_Text">comentar</text:p>
        <text:p text:style-name="Preformatted_20_Text">curtir</text:p>
        <text:p text:style-name="Preformatted_20_Text">marcar bullish/bearish</text:p>
        <text:p text:style-name="Preformatted_20_Text">seguir usuários</text:p>
      </text:section>
      <text:p text:style-name="Text_20_body">Posts são vinculados a tickers:</text:p>
      <text:section text:style-name="Sect1" text:name="Section85">
        <text:p text:style-name="P1"><text:bookmark text:name="code-block-viewer Copy 84"/>$PETR4</text:p>
        <text:p text:style-name="Preformatted_20_Text">$VALE3</text:p>
        <text:p text:style-name="Preformatted_20_Text">$BTC</text:p>
      </text:section>
      <text:p text:style-name="Horizontal_20_Line"/>
      <text:h text:style-name="Heading_20_2" text:outline-level="2"><text:soft-page-break/>3️⃣ Página do Ativo</text:h>
      <text:p text:style-name="Text_20_body">Cada ativo terá uma página.</text:p>
      <text:p text:style-name="Text_20_body">Exemplo:</text:p>
      <text:section text:style-name="Sect1" text:name="Section86">
        <text:p text:style-name="P1"><text:bookmark text:name="code-block-viewer Copy 85"/>/ticker/PETR4</text:p>
      </text:section>
      <text:p text:style-name="Text_20_body">Conteúdo:</text:p>
      <text:p text:style-name="Text_20_body">📈 gráfico<text:line-break/>📊 estatísticas<text:line-break/>🧠 sentimento<text:line-break/>💬 feed de posts<text:line-break/>🗳 polls</text:p>
      <text:p text:style-name="Horizontal_20_Line"/>
      <text:h text:style-name="Heading_20_2" text:outline-level="2">4️⃣ Watchlist</text:h>
      <text:p text:style-name="Text_20_body">Usuário salva ativos:</text:p>
      <text:section text:style-name="Sect1" text:name="Section87">
        <text:p text:style-name="P1"><text:bookmark text:name="code-block-viewer Copy 86"/>PETR4</text:p>
        <text:p text:style-name="Preformatted_20_Text">VALE3</text:p>
        <text:p text:style-name="Preformatted_20_Text">BTC</text:p>
      </text:section>
      <text:p text:style-name="Text_20_body">Recebe alertas quando:</text:p>
      <text:section text:style-name="Sect1" text:name="Section88">
        <text:p text:style-name="P1"><text:bookmark text:name="code-block-viewer Copy 87"/>🔥 Top mover</text:p>
        <text:p text:style-name="Preformatted_20_Text">⚡ Momentum</text:p>
        <text:p text:style-name="Preformatted_20_Text">💧 Liquidity Sweep</text:p>
      </text:section>
      <text:p text:style-name="Horizontal_20_Line"/>
      <text:h text:style-name="Heading_20_2" text:outline-level="2">5️⃣ Feed Global</text:h>
      <text:p text:style-name="Text_20_body">Página inicial.</text:p>
      <text:p text:style-name="Text_20_body">Mostra:</text:p>
      <text:section text:style-name="Sect1" text:name="Section89">
        <text:p text:style-name="P1"><text:bookmark text:name="code-block-viewer Copy 88"/>Trending ativos</text:p>
        <text:p text:style-name="Preformatted_20_Text">Últimos posts</text:p>
        <text:p text:style-name="Preformatted_20_Text">Top sinais</text:p>
        <text:p text:style-name="Preformatted_20_Text">News</text:p>
      </text:section>
      <text:p text:style-name="Horizontal_20_Line"/>
      <text:h text:style-name="Heading_20_1" text:outline-level="1">🏗️ Arquitetura Técnica do Projeto</text:h>
      <text:p text:style-name="Text_20_body">Estrutura atual:</text:p>
      <text:section text:style-name="Sect1" text:name="Section90">
        <text:p text:style-name="P1"><text:bookmark text:name="code-block-viewer Copy 89"/>StockNewsBR</text:p>
      </text:section>
      <text:section text:style-name="Sect1" text:name="Section91">
        <text:p text:style-name="P1"><text:bookmark text:name="code-block-viewer Copy 90"/>app</text:p>
        <text:p text:style-name="Preformatted_20_Text"><text:s text:c="3"/>engine</text:p>
        <text:p text:style-name="Preformatted_20_Text"><text:s text:c="3"/>scanners</text:p>
        <text:p text:style-name="Preformatted_20_Text"><text:s text:c="3"/>scheduler</text:p>
        <text:p text:style-name="Preformatted_20_Text"><text:s text:c="3"/>api</text:p>
      </text:section>
      <text:p text:style-name="Text_20_body"><text:soft-page-break/>Nova estrutura futura:</text:p>
      <text:section text:style-name="Sect1" text:name="Section92">
        <text:p text:style-name="P1"><text:bookmark text:name="code-block-viewer Copy 91"/>app</text:p>
        <text:p text:style-name="Preformatted_20_Text"><text:s text:c="3"/>engine</text:p>
        <text:p text:style-name="Preformatted_20_Text"><text:s text:c="3"/>social</text:p>
        <text:p text:style-name="Preformatted_20_Text"><text:s text:c="3"/>users</text:p>
        <text:p text:style-name="Preformatted_20_Text"><text:s text:c="3"/>posts</text:p>
        <text:p text:style-name="Preformatted_20_Text"><text:s text:c="3"/>sentiment</text:p>
        <text:p text:style-name="Preformatted_20_Text"><text:s text:c="3"/>watchlist</text:p>
        <text:p text:style-name="Preformatted_20_Text"><text:s text:c="3"/>alerts</text:p>
      </text:section>
      <text:p text:style-name="Horizontal_20_Line"/>
      <text:h text:style-name="Heading_20_1" text:outline-level="1">📊 Onde estamos no projeto</text:h>
      <text:p text:style-name="Text_20_body">Estimativa atual:</text:p>
      <text:section text:style-name="Sect1" text:name="Section93">
        <text:p text:style-name="P1"><text:bookmark text:name="code-block-viewer Copy 92"/>Engine mercado <text:s text:c="5"/>██████████ 90%</text:p>
        <text:p text:style-name="Preformatted_20_Text">Backend API <text:s text:c="8"/>████████░░ 70%</text:p>
        <text:p text:style-name="Preformatted_20_Text">Web dashboard <text:s text:c="6"/>█████░░░░░ 40%</text:p>
        <text:p text:style-name="Preformatted_20_Text">Telegram bot <text:s text:c="7"/>█████░░░░░ 50%</text:p>
        <text:p text:style-name="Preformatted_20_Text">Sistema social <text:s text:c="5"/>░░░░░░░░░░ 0%</text:p>
        <text:p text:style-name="Preformatted_20_Text">App mobile <text:s text:c="9"/>░░░░░░░░░░ 0%</text:p>
      </text:section>
      <text:p text:style-name="Text_20_body">Status geral:</text:p>
      <text:p text:style-name="Text_20_body"><text:span text:style-name="Strong_20_Emphasis">~55% da infraestrutura base</text:span></text:p>
      <text:p text:style-name="Horizontal_20_Line"/>
      <text:h text:style-name="Heading_20_1" text:outline-level="1">📋 O que já foi construído</text:h>
      <text:p text:style-name="Text_20_body">✔ Engine de sinais<text:line-break/>✔ Scheduler do mercado<text:line-break/>✔ Estrutura do projeto<text:line-break/>✔ Signal ranking<text:line-break/>✔ Cache de market data<text:line-break/>✔ Worker da engine</text:p>
      <text:p text:style-name="Text_20_body">Infra:</text:p>
      <text:p text:style-name="Text_20_body">✔ domínio criado<text:line-break/>✔ email profissional criado</text:p>
      <text:section text:style-name="Sect1" text:name="Section94">
        <text:p text:style-name="P1"><text:bookmark text:name="code-block-viewer Copy 93"/>support@stocknewsbr.com</text:p>
      </text:section>
      <text:p text:style-name="Horizontal_20_Line"/>
      <text:h text:style-name="Heading_20_1" text:outline-level="1">🚧 O que falta construir</text:h>
      <text:h text:style-name="Heading_20_2" text:outline-level="2">🔹 Fase 1 — MVP funcional</text:h>
      <text:p text:style-name="Text_20_body">Objetivo: <text:span text:style-name="Strong_20_Emphasis">lançar a plataforma</text:span></text:p>
      <text:h text:style-name="Heading_20_3" text:outline-level="3"><text:soft-page-break/>Backend</text:h>
      <text:p text:style-name="Text_20_body">Construir:</text:p>
      <text:section text:style-name="Sect1" text:name="Section95">
        <text:p text:style-name="P1"><text:bookmark text:name="code-block-viewer Copy 94"/>users system</text:p>
        <text:p text:style-name="Preformatted_20_Text">posts system</text:p>
        <text:p text:style-name="Preformatted_20_Text">ticker pages</text:p>
        <text:p text:style-name="Preformatted_20_Text">watchlist</text:p>
        <text:p text:style-name="Preformatted_20_Text">sentiment engine</text:p>
      </text:section>
      <text:p text:style-name="Horizontal_20_Line"/>
      <text:h text:style-name="Heading_20_3" text:outline-level="3">Web Dashboard</text:h>
      <text:p text:style-name="Text_20_body">Criar páginas:</text:p>
      <text:section text:style-name="Sect1" text:name="Section96">
        <text:p text:style-name="P1"><text:bookmark text:name="code-block-viewer Copy 95"/>Home</text:p>
        <text:p text:style-name="Preformatted_20_Text">Ticker Page</text:p>
        <text:p text:style-name="Preformatted_20_Text">Signals</text:p>
        <text:p text:style-name="Preformatted_20_Text">Watchlist</text:p>
        <text:p text:style-name="Preformatted_20_Text">Login</text:p>
        <text:p text:style-name="Preformatted_20_Text">Signup</text:p>
      </text:section>
      <text:p text:style-name="Horizontal_20_Line"/>
      <text:h text:style-name="Heading_20_3" text:outline-level="3">Social Feed</text:h>
      <text:p text:style-name="Text_20_body">Sistema de posts:</text:p>
      <text:section text:style-name="Sect1" text:name="Section97">
        <text:p text:style-name="P1"><text:bookmark text:name="code-block-viewer Copy 96"/>post</text:p>
        <text:p text:style-name="Preformatted_20_Text">reply</text:p>
        <text:p text:style-name="Preformatted_20_Text">like</text:p>
        <text:p text:style-name="Preformatted_20_Text">bullish/bearish</text:p>
        <text:p text:style-name="Preformatted_20_Text">ticker tag</text:p>
      </text:section>
      <text:p text:style-name="Horizontal_20_Line"/>
      <text:h text:style-name="Heading_20_3" text:outline-level="3">Telegram</text:h>
      <text:p text:style-name="Text_20_body">Bot envia:</text:p>
      <text:section text:style-name="Sect1" text:name="Section98">
        <text:p text:style-name="P1"><text:bookmark text:name="code-block-viewer Copy 97"/>Top movers</text:p>
        <text:p text:style-name="Preformatted_20_Text">Momentum</text:p>
        <text:p text:style-name="Preformatted_20_Text">Liquidity sweep</text:p>
        <text:p text:style-name="Preformatted_20_Text">Trending tickers</text:p>
      </text:section>
      <text:p text:style-name="Horizontal_20_Line"/>
      <text:h text:style-name="Heading_20_1" text:outline-level="1">📊 Fase 2 — Inteligência</text:h>
      <text:p text:style-name="Text_20_body">Depois do MVP.</text:p>
      <text:p text:style-name="Text_20_body">Adicionar:</text:p>
      <text:section text:style-name="Sect1" text:name="Section99">
        <text:p text:style-name="P1"><text:bookmark text:name="code-block-viewer Copy 98"/>sentiment AI</text:p>
        <text:p text:style-name="Preformatted_20_Text">ranking de traders</text:p>
        <text:p text:style-name="Preformatted_20_Text">heatmap do mercado</text:p>
        <text:p text:style-name="Preformatted_20_Text">trending por mensagens</text:p>
      </text:section>
      <text:p text:style-name="Horizontal_20_Line"/>
      <text:h text:style-name="Heading_20_1" text:outline-level="1"><text:soft-page-break/>📊 Fase 3 — Mobile App</text:h>
      <text:p text:style-name="Text_20_body">Criar apps:</text:p>
      <text:section text:style-name="Sect1" text:name="Section100">
        <text:p text:style-name="P1"><text:bookmark text:name="code-block-viewer Copy 99"/>iOS</text:p>
        <text:p text:style-name="Preformatted_20_Text">Android</text:p>
      </text:section>
      <text:p text:style-name="Text_20_body">Funcionalidades:</text:p>
      <text:section text:style-name="Sect1" text:name="Section101">
        <text:p text:style-name="P1"><text:bookmark text:name="code-block-viewer Copy 100"/>push alerts</text:p>
        <text:p text:style-name="Preformatted_20_Text">feed social</text:p>
        <text:p text:style-name="Preformatted_20_Text">watchlist</text:p>
        <text:p text:style-name="Preformatted_20_Text">signals</text:p>
      </text:section>
      <text:p text:style-name="Horizontal_20_Line"/>
      <text:h text:style-name="Heading_20_1" text:outline-level="1">📊 Fase 4 — Recursos avançados</text:h>
      <text:p text:style-name="Text_20_body">Futuro:</text:p>
      <text:section text:style-name="Sect1" text:name="Section102">
        <text:p text:style-name="P1"><text:bookmark text:name="code-block-viewer Copy 101"/>polls</text:p>
        <text:p text:style-name="Preformatted_20_Text">live chat</text:p>
        <text:p text:style-name="Preformatted_20_Text">trader rankings</text:p>
        <text:p text:style-name="Preformatted_20_Text">broker integrations</text:p>
        <text:p text:style-name="Preformatted_20_Text">copy trading</text:p>
      </text:section>
      <text:p text:style-name="Horizontal_20_Line"/>
      <text:h text:style-name="Heading_20_1" text:outline-level="1">💰 Monetização futura</text:h>
      <text:p text:style-name="Text_20_body">Plano free:</text:p>
      <text:section text:style-name="Sect1" text:name="Section103">
        <text:p text:style-name="P1"><text:bookmark text:name="code-block-viewer Copy 102"/>feed social</text:p>
        <text:p text:style-name="Preformatted_20_Text">posts</text:p>
        <text:p text:style-name="Preformatted_20_Text">ticker pages</text:p>
        <text:p text:style-name="Preformatted_20_Text">watchlist</text:p>
      </text:section>
      <text:p text:style-name="Text_20_body">Plano premium:</text:p>
      <text:section text:style-name="Sect1" text:name="Section104">
        <text:p text:style-name="P1"><text:bookmark text:name="code-block-viewer Copy 103"/>signals avançados</text:p>
        <text:p text:style-name="Preformatted_20_Text">scanner completo</text:p>
        <text:p text:style-name="Preformatted_20_Text">alerts ilimitados</text:p>
        <text:p text:style-name="Preformatted_20_Text">analytics</text:p>
      </text:section>
      <text:p text:style-name="Horizontal_20_Line"/>
      <text:h text:style-name="Heading_20_1" text:outline-level="1">🚀 Visão final do produto</text:h>
      <text:p text:style-name="Text_20_body">StockNewsBR será:</text:p>
      <text:section text:style-name="Sect1" text:name="Section105">
        <text:p text:style-name="P1"><text:bookmark text:name="code-block-viewer Copy 104"/>StockTwits</text:p>
        <text:p text:style-name="Preformatted_20_Text">+</text:p>
        <text:p text:style-name="Preformatted_20_Text">TradingView</text:p>
        <text:p text:style-name="Preformatted_20_Text">+</text:p>
        <text:p text:style-name="Preformatted_20_Text">Scanner de mercado</text:p>
      </text:section>
      <text:p text:style-name="Text_20_body">Tudo focado em:</text:p>
      <text:section text:style-name="Sect1" text:name="Section106">
        <text:p text:style-name="P1"><text:bookmark text:name="code-block-viewer Copy 105"/>Brasil</text:p>
        <text:p text:style-name="Preformatted_20_Text"><text:soft-page-break/>B3</text:p>
        <text:p text:style-name="Preformatted_20_Text">BDRs</text:p>
        <text:p text:style-name="Preformatted_20_Text">Crypto</text:p>
      </text:section>
      <text:p text:style-name="Horizontal_20_Line"/>
      <text:h text:style-name="Heading_20_1" text:outline-level="1">⭐ Próximo passo (muito importante)</text:h>
      <text:p text:style-name="Text_20_body">Precisamos definir <text:span text:style-name="Strong_20_Emphasis">a estrutura das páginas do site</text:span>.</text:p>
      <text:p text:style-name="Text_20_body">Exemplo:</text:p>
      <text:p text:style-name="Text_20_body">Menu principal:</text:p>
      <text:section text:style-name="Sect1" text:name="Section107">
        <text:p text:style-name="P1"><text:bookmark text:name="code-block-viewer Copy 106"/>Home</text:p>
        <text:p text:style-name="Preformatted_20_Text">Trending</text:p>
        <text:p text:style-name="Preformatted_20_Text">Signals</text:p>
        <text:p text:style-name="Preformatted_20_Text">Watchlist</text:p>
        <text:p text:style-name="Preformatted_20_Text">Crypto</text:p>
        <text:p text:style-name="Preformatted_20_Text">News</text:p>
      </text:section>
      <text:p text:style-name="Horizontal_20_Line"/>
      <text:p text:style-name="Text_20_body">Se quiser, no próximo passo posso te mostrar também algo <text:span text:style-name="Strong_20_Emphasis">extremamente importante para o sucesso do StockNewsBR</text:span>:</text:p>
      <text:p text:style-name="Text_20_body">👉 <text:span text:style-name="Strong_20_Emphasis">as 7 features que fazem traders entrarem todos os dias em uma plataforma</text:span> (é exatamente o que fez StockTwits crescer).</text:p>
      <text:p text:style-name="Text_20_body">quando a pessoa abre oi grafico, ja aparece a ferramenta ligada, e pode ser desligada, comprar, vender, comprar vendido, encerrar compra vendido. com setas no grafico. e Vwap tb aparece automatico. essa ferramenta ja foi discutida.. pra ser com IA. vc tem ela no projeto?</text:p>
      <text:p text:style-name="Text_20_body">Sim — <text:span text:style-name="Strong_20_Emphasis">essa ferramenta já foi discutida no projeto</text:span>, mas <text:span text:style-name="Strong_20_Emphasis">ainda não está implementada no código</text:span>.<text:line-break/>Ela faz parte da <text:span text:style-name="Strong_20_Emphasis">camada de análise inteligente do gráfico</text:span>, que vamos integrar com a engine. 📈🤖</text:p>
      <text:p text:style-name="Text_20_body">Mas a boa notícia: <text:span text:style-name="Strong_20_Emphasis">ela encaixa perfeitamente no que já construímos</text:span>.</text:p>
      <text:p text:style-name="Text_20_body">Vou explicar como ela entra no <text:span text:style-name="Strong_20_Emphasis">StockNewsBR</text:span>.</text:p>
      <text:p text:style-name="Horizontal_20_Line"/>
      <text:h text:style-name="Heading_20_1" text:outline-level="1">🧠 Ferramenta de Trade Assist (IA no gráfico)</text:h>
      <text:p text:style-name="Text_20_body">Quando o usuário abre um ticker:</text:p>
      <text:section text:style-name="Sect1" text:name="Section108">
        <text:p text:style-name="P1"><text:bookmark text:name="code-block-viewer Copy 107"/>/ticker/PETR4</text:p>
      </text:section>
      <text:p text:style-name="Text_20_body">O gráfico já abre com:</text:p>
      <text:h text:style-name="Heading_20_3" text:outline-level="3"><text:soft-page-break/>📊 VWAP automático</text:h>
      <text:h text:style-name="Heading_20_3" text:outline-level="3">🤖 IA ativa</text:h>
      <text:h text:style-name="Heading_20_3" text:outline-level="3">🎯 sugestões de trade</text:h>
      <text:p text:style-name="Text_20_body">Interface:</text:p>
      <text:section text:style-name="Sect1" text:name="Section109">
        <text:p text:style-name="P1"><text:bookmark text:name="code-block-viewer Copy 108"/>[✔ IA Assist ligada]</text:p>
        <text:p text:style-name="Preformatted_20_Text">⬆ Compra</text:p>
        <text:p text:style-name="Preformatted_20_Text">⬇ Venda</text:p>
        <text:p text:style-name="Preformatted_20_Text">🔴 Short</text:p>
        <text:p text:style-name="Preformatted_20_Text">🟢 Encerrar Short</text:p>
      </text:section>
      <text:p text:style-name="Text_20_body">Com <text:span text:style-name="Strong_20_Emphasis">setas no gráfico</text:span>.</text:p>
      <text:p text:style-name="Horizontal_20_Line"/>
      <text:h text:style-name="Heading_20_1" text:outline-level="1">📈 Exemplo visual no gráfico</text:h>
      <text:section text:style-name="Sect1" text:name="Section110">
        <text:p text:style-name="P1"><text:bookmark text:name="code-block-viewer Copy 109"/>PETR4</text:p>
        <text:p text:style-name="Preformatted_20_Text"><text:s text:c="9"/>↑ BUY</text:p>
        <text:p text:style-name="Preformatted_20_Text"><text:s text:c="8"/>/</text:p>
        <text:p text:style-name="Preformatted_20_Text">------/---------------- VWAP</text:p>
        <text:p text:style-name="Preformatted_20_Text"><text:s text:c="5"/>/</text:p>
        <text:p text:style-name="Preformatted_20_Text"><text:s text:c="4"/>↓ SELL</text:p>
      </text:section>
      <text:p text:style-name="Text_20_body">ou</text:p>
      <text:section text:style-name="Sect1" text:name="Section111">
        <text:p text:style-name="P1"><text:bookmark text:name="code-block-viewer Copy 110"/>SHORT ↓</text:p>
        <text:p text:style-name="Preformatted_20_Text">COVER ↑</text:p>
      </text:section>
      <text:p text:style-name="Horizontal_20_Line"/>
      <text:h text:style-name="Heading_20_1" text:outline-level="1">⚙️ Como a IA decide os sinais</text:h>
      <text:p text:style-name="Text_20_body">A engine analisa:</text:p>
      <text:section text:style-name="Sect1" text:name="Section112">
        <text:p text:style-name="P1"><text:bookmark text:name="code-block-viewer Copy 111"/>VWAP</text:p>
        <text:p text:style-name="Preformatted_20_Text">volume</text:p>
        <text:p text:style-name="Preformatted_20_Text">momentum</text:p>
        <text:p text:style-name="Preformatted_20_Text">liquidity sweep</text:p>
        <text:p text:style-name="Preformatted_20_Text">breakouts</text:p>
      </text:section>
      <text:p text:style-name="Text_20_body">E gera eventos.</text:p>
      <text:p text:style-name="Text_20_body">Exemplo:</text:p>
      <text:section text:style-name="Sect1" text:name="Section113">
        <text:p text:style-name="P1"><text:bookmark text:name="code-block-viewer Copy 112"/>Signal:</text:p>
        <text:p text:style-name="Preformatted_20_Text">Ticker: PETR4</text:p>
        <text:p text:style-name="Preformatted_20_Text">Type: BUY</text:p>
        <text:p text:style-name="Preformatted_20_Text">Confidence: 78%</text:p>
        <text:p text:style-name="Preformatted_20_Text">Reason: VWAP reclaim + volume spike</text:p>
      </text:section>
      <text:p text:style-name="Horizontal_20_Line"/>
      <text:h text:style-name="Heading_20_1" text:outline-level="1"><text:soft-page-break/>📊 Sinais possíveis</text:h>
      <text:p text:style-name="Text_20_body">A IA pode gerar:</text:p>
      <text:section text:style-name="Sect1" text:name="Section114">
        <text:p text:style-name="P1"><text:bookmark text:name="code-block-viewer Copy 113"/>BUY</text:p>
        <text:p text:style-name="Preformatted_20_Text">SELL</text:p>
        <text:p text:style-name="Preformatted_20_Text">SHORT</text:p>
        <text:p text:style-name="Preformatted_20_Text">COVER</text:p>
        <text:p text:style-name="Preformatted_20_Text">BREAKOUT</text:p>
        <text:p text:style-name="Preformatted_20_Text">VWAP RECLAIM</text:p>
        <text:p text:style-name="Preformatted_20_Text">VWAP REJECTION</text:p>
      </text:section>
      <text:p text:style-name="Horizontal_20_Line"/>
      <text:h text:style-name="Heading_20_1" text:outline-level="1">📈 VWAP</text:h>
      <text:p text:style-name="Text_20_body">VWAP já aparece automaticamente.</text:p>
      <text:p text:style-name="Text_20_body">Linha no gráfico:</text:p>
      <text:section text:style-name="Sect1" text:name="Section115">
        <text:p text:style-name="P1"><text:bookmark text:name="code-block-viewer Copy 114"/>VWAP</text:p>
      </text:section>
      <text:p text:style-name="Text_20_body">Traders usam isso <text:span text:style-name="Strong_20_Emphasis">o dia inteiro</text:span>.</text:p>
      <text:p text:style-name="Text_20_body">Exemplo:</text:p>
      <text:section text:style-name="Sect1" text:name="Section116">
        <text:p text:style-name="P1"><text:bookmark text:name="code-block-viewer Copy 115"/>acima VWAP → bullish</text:p>
        <text:p text:style-name="Preformatted_20_Text">abaixo VWAP → bearish</text:p>
      </text:section>
      <text:p text:style-name="Horizontal_20_Line"/>
      <text:h text:style-name="Heading_20_1" text:outline-level="1">🤖 IA assist (ligada por padrão)</text:h>
      <text:p text:style-name="Text_20_body">No gráfico aparece botão:</text:p>
      <text:section text:style-name="Sect1" text:name="Section117">
        <text:p text:style-name="P1"><text:bookmark text:name="code-block-viewer Copy 116"/>🤖 IA Assist: ON</text:p>
      </text:section>
      <text:p text:style-name="Text_20_body">Usuário pode desligar:</text:p>
      <text:section text:style-name="Sect1" text:name="Section118">
        <text:p text:style-name="P1"><text:bookmark text:name="code-block-viewer Copy 117"/>OFF</text:p>
      </text:section>
      <text:p text:style-name="Text_20_body">Quando desligado:</text:p>
      <text:p text:style-name="Text_20_body">apenas gráfico normal.</text:p>
      <text:p text:style-name="Horizontal_20_Line"/>
      <text:h text:style-name="Heading_20_1" text:outline-level="1">📊 Exemplo completo</text:h>
      <text:p text:style-name="Text_20_body">Ticker:</text:p>
      <text:section text:style-name="Sect1" text:name="Section119">
        <text:p text:style-name="P1"><text:bookmark text:name="code-block-viewer Copy 118"/>VALE3</text:p>
      </text:section>
      <text:p text:style-name="Text_20_body">Interface:</text:p>
      <text:section text:style-name="Sect1" text:name="Section120">
        <text:p text:style-name="P1"><text:bookmark text:name="code-block-viewer Copy 119"/>Preço: 64.20</text:p>
        <text:p text:style-name="Preformatted_20_Text">VWAP: 63.90</text:p>
        <text:p text:style-name="Preformatted_20_Text">Sentimento: Bullish</text:p>
        <text:p text:style-name="Preformatted_20_Text">Mensagens: 142</text:p>
      </text:section>
      <text:p text:style-name="Text_20_body"><text:soft-page-break/>Gráfico mostra:</text:p>
      <text:section text:style-name="Sect1" text:name="Section121">
        <text:p text:style-name="P1"><text:bookmark text:name="code-block-viewer Copy 120"/>↑ BUY</text:p>
        <text:p text:style-name="Preformatted_20_Text">↓ SELL</text:p>
      </text:section>
      <text:p text:style-name="Horizontal_20_Line"/>
      <text:h text:style-name="Heading_20_1" text:outline-level="1">🧠 Diferença importante</text:h>
      <text:p text:style-name="Text_20_body">Isso <text:span text:style-name="Strong_20_Emphasis">não é trading automático</text:span>.</text:p>
      <text:p text:style-name="Text_20_body">É:</text:p>
      <text:section text:style-name="Sect1" text:name="Section122">
        <text:p text:style-name="P1"><text:bookmark text:name="code-block-viewer Copy 121"/>Trade suggestions</text:p>
      </text:section>
      <text:p text:style-name="Text_20_body">Ou seja:</text:p>
      <text:section text:style-name="Sect1" text:name="Section123">
        <text:p text:style-name="P1"><text:bookmark text:name="code-block-viewer Copy 122"/>assistente de trade</text:p>
      </text:section>
      <text:p text:style-name="Horizontal_20_Line"/>
      <text:h text:style-name="Heading_20_1" text:outline-level="1">🚀 Isso é MUITO poderoso para o StockNewsBR</text:h>
      <text:p text:style-name="Text_20_body">Porque combina:</text:p>
      <text:section text:style-name="Sect1" text:name="Section124">
        <text:p text:style-name="P1"><text:bookmark text:name="code-block-viewer Copy 123"/>rede social</text:p>
        <text:p text:style-name="Preformatted_20_Text">+</text:p>
        <text:p text:style-name="Preformatted_20_Text">IA</text:p>
        <text:p text:style-name="Preformatted_20_Text">+</text:p>
        <text:p text:style-name="Preformatted_20_Text">sinais</text:p>
        <text:p text:style-name="Preformatted_20_Text">+</text:p>
        <text:p text:style-name="Preformatted_20_Text">gráfico</text:p>
      </text:section>
      <text:p text:style-name="Text_20_body">Pouquíssimas plataformas fazem isso.</text:p>
      <text:p text:style-name="Text_20_body">Nem:</text:p>
      <text:list text:style-name="L9">
        <text:list-item>
          <text:p text:style-name="P11">TradingView</text:p>
        </text:list-item>
        <text:list-item>
          <text:p text:style-name="P11">StockTwits</text:p>
        </text:list-item>
        <text:list-item>
          <text:p text:style-name="P11">Finviz</text:p>
        </text:list-item>
      </text:list>
      <text:p text:style-name="Text_20_body">tem essa integração completa.</text:p>
      <text:p text:style-name="Horizontal_20_Line"/>
      <text:h text:style-name="Heading_20_1" text:outline-level="1">🏗️ Onde isso entra na arquitetura</text:h>
      <text:p text:style-name="Text_20_body">Novo módulo:</text:p>
      <text:section text:style-name="Sect1" text:name="Section125">
        <text:p text:style-name="P1"><text:bookmark text:name="code-block-viewer Copy 124"/>app/ai</text:p>
      </text:section>
      <text:p text:style-name="Text_20_body">estrutura:</text:p>
      <text:section text:style-name="Sect1" text:name="Section126">
        <text:p text:style-name="P1"><text:bookmark text:name="code-block-viewer Copy 125"/>ai</text:p>
        <text:p text:style-name="Preformatted_20_Text"><text:soft-page-break/><text:s text:c="3"/>vwap_engine.py</text:p>
        <text:p text:style-name="Preformatted_20_Text"><text:s text:c="3"/>trade_ai.py</text:p>
        <text:p text:style-name="Preformatted_20_Text"><text:s text:c="3"/>signal_generator.py</text:p>
      </text:section>
      <text:p text:style-name="Horizontal_20_Line"/>
      <text:h text:style-name="Heading_20_1" text:outline-level="1">📊 Fluxo da análise</text:h>
      <text:section text:style-name="Sect1" text:name="Section127">
        <text:p text:style-name="P1"><text:bookmark text:name="code-block-viewer Copy 126"/>market data</text:p>
        <text:p text:style-name="Preformatted_20_Text"><text:s text:c="5"/>↓</text:p>
        <text:p text:style-name="Preformatted_20_Text">engine</text:p>
        <text:p text:style-name="Preformatted_20_Text"><text:s text:c="5"/>↓</text:p>
        <text:p text:style-name="Preformatted_20_Text">AI analysis</text:p>
        <text:p text:style-name="Preformatted_20_Text"><text:s text:c="5"/>↓</text:p>
        <text:p text:style-name="Preformatted_20_Text">trade signals</text:p>
        <text:p text:style-name="Preformatted_20_Text"><text:s text:c="5"/>↓</text:p>
        <text:p text:style-name="Preformatted_20_Text">grafico</text:p>
      </text:section>
      <text:p text:style-name="Horizontal_20_Line"/>
      <text:h text:style-name="Heading_20_1" text:outline-level="1">📈 Resultado no gráfico</text:h>
      <text:p text:style-name="Text_20_body">O frontend recebe:</text:p>
      <text:section text:style-name="Sect1" text:name="Section128">
        <text:p text:style-name="P1"><text:bookmark text:name="code-block-viewer Copy 127"/>{</text:p>
        <text:p text:style-name="Preformatted_20_Text"><text:s/>"ticker": "PETR4",</text:p>
        <text:p text:style-name="Preformatted_20_Text"><text:s/>"signals": [</text:p>
        <text:p text:style-name="Preformatted_20_Text"><text:s text:c="3"/>{"type":"BUY","price":63.80},</text:p>
        <text:p text:style-name="Preformatted_20_Text"><text:s text:c="3"/>{"type":"SELL","price":65.10}</text:p>
        <text:p text:style-name="Preformatted_20_Text"><text:s/>]</text:p>
        <text:p text:style-name="Preformatted_20_Text">}</text:p>
      </text:section>
      <text:p text:style-name="Text_20_body">E desenha as <text:span text:style-name="Strong_20_Emphasis">setas</text:span>.</text:p>
      <text:p text:style-name="Horizontal_20_Line"/>
      <text:h text:style-name="Heading_20_1" text:outline-level="1">📊 Prioridade dessa ferramenta</text:h>
      <text:p text:style-name="Text_20_body">Ela é <text:span text:style-name="Strong_20_Emphasis">extremamente poderosa</text:span>, mas <text:span text:style-name="Strong_20_Emphasis">não precisa entrar no MVP inicial</text:span>.</text:p>
      <text:p text:style-name="Text_20_body">Prioridade real:</text:p>
      <text:h text:style-name="Heading_20_3" text:outline-level="3">MVP</text:h>
      <text:section text:style-name="Sect1" text:name="Section129">
        <text:p text:style-name="P1"><text:bookmark text:name="code-block-viewer Copy 128"/>engine</text:p>
        <text:p text:style-name="Preformatted_20_Text">rede social</text:p>
        <text:p text:style-name="Preformatted_20_Text">ticker pages</text:p>
        <text:p text:style-name="Preformatted_20_Text">watchlist</text:p>
        <text:p text:style-name="Preformatted_20_Text">signals</text:p>
        <text:p text:style-name="Preformatted_20_Text">telegram</text:p>
      </text:section>
      <text:p text:style-name="Horizontal_20_Line"/>
      <text:h text:style-name="Heading_20_3" text:outline-level="3">Fase 2</text:h>
      <text:section text:style-name="Sect1" text:name="Section130">
        <text:p text:style-name="P1"><text:bookmark text:name="code-block-viewer Copy 129"/>AI chart assistant</text:p>
        <text:p text:style-name="Preformatted_20_Text">VWAP engine</text:p>
        <text:p text:style-name="Preformatted_20_Text"><text:soft-page-break/>trade signals</text:p>
      </text:section>
      <text:p text:style-name="Horizontal_20_Line"/>
      <text:h text:style-name="Heading_20_1" text:outline-level="1">🔥 Mas tem algo ainda melhor</text:h>
      <text:p text:style-name="Text_20_body">Existe uma versão <text:span text:style-name="Strong_20_Emphasis">muito mais poderosa dessa ferramenta</text:span>.</text:p>
      <text:p text:style-name="Text_20_body">Algo que pode fazer o <text:span text:style-name="Strong_20_Emphasis">StockNewsBR viralizar entre traders</text:span>.</text:p>
      <text:p text:style-name="Text_20_body">É uma função chamada:</text:p>
      <text:section text:style-name="Sect1" text:name="Section131">
        <text:p text:style-name="P1"><text:bookmark text:name="code-block-viewer Copy 130"/>Smart Trade Replay</text:p>
      </text:section>
      <text:p text:style-name="Text_20_body">Ela mostra no gráfico:</text:p>
      <text:section text:style-name="Sect1" text:name="Section132">
        <text:p text:style-name="P1"><text:bookmark text:name="code-block-viewer Copy 131"/>"onde a IA teria comprado e vendido"</text:p>
      </text:section>
      <text:p text:style-name="Text_20_body">tipo um <text:span text:style-name="Strong_20_Emphasis">backtest visual automático</text:span>.</text:p>
      <text:p text:style-name="Text_20_body">Se quiser, eu te mostro porque <text:span text:style-name="Strong_20_Emphasis">essa função pode ser a feature mais viciante da plataforma</text:span>. 📈🔥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0T16:31:29.988000000</meta:creation-date>
    <dc:date>2026-03-10T17:00:34.778000000</dc:date>
    <meta:editing-duration>PT29M5S</meta:editing-duration>
    <meta:editing-cycles>1</meta:editing-cycles>
    <meta:document-statistic meta:table-count="0" meta:image-count="4" meta:object-count="0" meta:page-count="34" meta:paragraph-count="917" meta:word-count="2978" meta:character-count="17733" meta:non-whitespace-character-count="15487"/>
    <meta:generator>EasyOffice/7.6.2.1.0$Windows_X86_64 LibreOffice_project/0bc4d647150f05f02b71ccb5539a4012b57f1faf</meta:generator>
  </office:meta>
</office:document-meta>
</file>