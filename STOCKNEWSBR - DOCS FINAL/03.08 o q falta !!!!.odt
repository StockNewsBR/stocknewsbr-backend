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6333in" table:align="left"/>
    </style:style>
    <style:style style:name="Table1.A" style:family="table-column">
      <style:table-column-properties style:column-width="1.1861in"/>
    </style:style>
    <style:style style:name="Table1.B" style:family="table-column">
      <style:table-column-properties style:column-width="0.447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225in" table:align="left"/>
    </style:style>
    <style:style style:name="Table2.A" style:family="table-column">
      <style:table-column-properties style:column-width="1.1278in"/>
    </style:style>
    <style:style style:name="Table2.B" style:family="table-column">
      <style:table-column-properties style:column-width="1.097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0729in" table:align="left"/>
    </style:style>
    <style:style style:name="Table3.A" style:family="table-column">
      <style:table-column-properties style:column-width="1.3757in"/>
    </style:style>
    <style:style style:name="Table3.B" style:family="table-column">
      <style:table-column-properties style:column-width="0.697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1833in" table:align="left"/>
    </style:style>
    <style:style style:name="Table4.A" style:family="table-column">
      <style:table-column-properties style:column-width="1.2361in"/>
    </style:style>
    <style:style style:name="Table4.B" style:family="table-column">
      <style:table-column-properties style:column-width="0.947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3875in" table:align="left"/>
    </style:style>
    <style:style style:name="Table5.A" style:family="table-column">
      <style:table-column-properties style:column-width="0.9403in"/>
    </style:style>
    <style:style style:name="Table5.B" style:family="table-column">
      <style:table-column-properties style:column-width="0.4472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1" text:outline-level="1">📂 Pastas que NÃO precisamos revisar</text:h>
      <text:p text:style-name="Text_20_body">Essas são <text:span text:style-name="Strong_20_Emphasis">geradas automaticamente pelo Flutter</text:span>.</text:p>
      <text:p text:style-name="Text_20_body">Podemos ignorar.</text:p>
      <text:section text:style-name="Sect1" text:name="code-block-viewer">
        <text:p text:style-name="P1">.dart_tool</text:p>
        <text:p text:style-name="Preformatted_20_Text">.idea</text:p>
        <text:p text:style-name="Preformatted_20_Text">build</text:p>
        <text:p text:style-name="Preformatted_20_Text">android</text:p>
        <text:p text:style-name="Preformatted_20_Text">ios</text:p>
        <text:p text:style-name="Preformatted_20_Text">linux</text:p>
        <text:p text:style-name="Preformatted_20_Text">macos</text:p>
        <text:p text:style-name="Preformatted_20_Text">windows</text:p>
        <text:p text:style-name="Preformatted_20_Text">test</text:p>
      </text:section>
      <text:p text:style-name="Text_20_body">Elas só são usadas para <text:span text:style-name="Strong_20_Emphasis">compilar o app</text:span>.</text:p>
      <text:p text:style-name="Text_20_body">Não tem lógica do produto ali.</text:p>
      <text:p text:style-name="Horizontal_20_Line"/>
      <text:h text:style-name="Heading_20_1" text:outline-level="1">📂 Arquivos que valem revisar</text:h>
      <text:p text:style-name="Text_20_body">Na raiz do projeto apenas dois arquivos são relevantes:</text:p>
      <text:h text:style-name="Heading_20_3" text:outline-level="3">1️⃣ pubspec.yaml</text:h>
      <text:p text:style-name="Text_20_body">Define:</text:p>
      <text:section text:style-name="Sect1" text:name="Section1">
        <text:p text:style-name="P1"><text:bookmark text:name="code-block-viewer"/>dependências</text:p>
        <text:p text:style-name="Preformatted_20_Text">bibliotecas</text:p>
        <text:p text:style-name="Preformatted_20_Text">assets</text:p>
      </text:section>
      <text:p text:style-name="Text_20_body">Exemplo:</text:p>
      <text:section text:style-name="Sect1" text:name="Section2">
        <text:p text:style-name="P1"><text:bookmark text:name="code-block-viewer Copy 1"/>http</text:p>
        <text:p text:style-name="Preformatted_20_Text">provider</text:p>
        <text:p text:style-name="Preformatted_20_Text">firebase</text:p>
        <text:p text:style-name="Preformatted_20_Text">charts</text:p>
      </text:section>
      <text:p text:style-name="Horizontal_20_Line"/>
      <text:h text:style-name="Heading_20_3" text:outline-level="3">2️⃣ assets/</text:h>
      <text:p text:style-name="Text_20_body">Imagens:</text:p>
      <text:section text:style-name="Sect1" text:name="Section3">
        <text:p text:style-name="P1"><text:bookmark text:name="code-block-viewer Copy 2"/>logo</text:p>
        <text:p text:style-name="Preformatted_20_Text">icons</text:p>
        <text:p text:style-name="Preformatted_20_Text">gif</text:p>
      </text:section>
      <text:p text:style-name="Horizontal_20_Line"/>
      <text:h text:style-name="Heading_20_1" text:outline-level="1"><text:soft-page-break/>📂 Estrutura ideal do seu APP</text:h>
      <text:p text:style-name="Text_20_body">Dentro de <text:span text:style-name="Strong_20_Emphasis">lib</text:span> idealmente deve ficar assim:</text:p>
      <text:section text:style-name="Sect1" text:name="Section4">
        <text:p text:style-name="P1"><text:bookmark text:name="code-block-viewer Copy 3"/>lib/</text:p>
        <text:p text:style-name="Preformatted_20_Text">main.dart</text:p>
        <text:p text:style-name="Preformatted_20_Text">screens/</text:p>
        <text:p text:style-name="Preformatted_20_Text"><text:s text:c="3"/>home_page.dart</text:p>
        <text:p text:style-name="Preformatted_20_Text"><text:s text:c="3"/>stock_page.dart</text:p>
        <text:p text:style-name="Preformatted_20_Text"><text:s text:c="3"/>news_page.dart</text:p>
        <text:p text:style-name="Preformatted_20_Text"><text:s text:c="3"/>profile_page.dart</text:p>
        <text:p text:style-name="Preformatted_20_Text">widgets/</text:p>
        <text:p text:style-name="Preformatted_20_Text"><text:s text:c="3"/>post_card.dart</text:p>
        <text:p text:style-name="Preformatted_20_Text"><text:s text:c="3"/>comment_card.dart</text:p>
        <text:p text:style-name="Preformatted_20_Text"><text:s text:c="3"/>signal_card.dart</text:p>
        <text:p text:style-name="Preformatted_20_Text">services/</text:p>
        <text:p text:style-name="Preformatted_20_Text"><text:s text:c="3"/>api_service.dart</text:p>
        <text:p text:style-name="Preformatted_20_Text"><text:s text:c="3"/>auth_service.dart</text:p>
        <text:p text:style-name="Preformatted_20_Text">models/</text:p>
        <text:p text:style-name="Preformatted_20_Text"><text:s text:c="3"/>stock.dart</text:p>
        <text:p text:style-name="Preformatted_20_Text"><text:s text:c="3"/>post.dart</text:p>
        <text:p text:style-name="Preformatted_20_Text"><text:s text:c="3"/>user.dart</text:p>
      </text:section>
      <text:p text:style-name="Horizontal_20_Line"/>
      <text:h text:style-name="Heading_20_1" text:outline-level="1">⚙️ Coisa importante que vou revisar</text:h>
      <text:p text:style-name="Text_20_body">Quando você enviar os arquivos eu vou olhar:</text:p>
      <text:h text:style-name="Heading_20_3" text:outline-level="3">Performance</text:h>
      <text:section text:style-name="Sect1" text:name="Section5">
        <text:p text:style-name="P1"><text:bookmark text:name="code-block-viewer Copy 4"/>state management</text:p>
        <text:p text:style-name="Preformatted_20_Text">rebuild widgets</text:p>
        <text:p text:style-name="Preformatted_20_Text">API calls</text:p>
      </text:section>
      <text:p text:style-name="Horizontal_20_Line"/>
      <text:h text:style-name="Heading_20_3" text:outline-level="3">Arquitetura</text:h>
      <text:p text:style-name="Text_20_body">se o app está organizado assim:</text:p>
      <text:section text:style-name="Sect1" text:name="Section6">
        <text:p text:style-name="P1"><text:bookmark text:name="code-block-viewer Copy 5"/>UI</text:p>
        <text:p text:style-name="Preformatted_20_Text">logic</text:p>
        <text:p text:style-name="Preformatted_20_Text">API</text:p>
        <text:p text:style-name="Preformatted_20_Text">models</text:p>
      </text:section>
      <text:p text:style-name="Horizontal_20_Line"/>
      <text:h text:style-name="Heading_20_3" text:outline-level="3">Integração com backend</text:h>
      <text:p text:style-name="Text_20_body">verificar:</text:p>
      <text:section text:style-name="Sect1" text:name="Section7">
        <text:p text:style-name="P1"><text:bookmark text:name="code-block-viewer Copy 6"/>FastAPI</text:p>
        <text:p text:style-name="Preformatted_20_Text">signals</text:p>
        <text:p text:style-name="Preformatted_20_Text">posts</text:p>
        <text:p text:style-name="Preformatted_20_Text">comments</text:p>
      </text:section>
      <text:p text:style-name="Horizontal_20_Line"/>
      <text:h text:style-name="Heading_20_3" text:outline-level="3"><text:soft-page-break/>Features da comunidade</text:h>
      <text:section text:style-name="Sect1" text:name="Section8">
        <text:p text:style-name="P1"><text:bookmark text:name="code-block-viewer Copy 7"/>post</text:p>
        <text:p text:style-name="Preformatted_20_Text">like</text:p>
        <text:p text:style-name="Preformatted_20_Text">comment</text:p>
        <text:p text:style-name="Preformatted_20_Text">bullish/bearish</text:p>
        <text:p text:style-name="Preformatted_20_Text">poll</text:p>
      </text:section>
      <text:p text:style-name="Horizontal_20_Line"/>
      <text:h text:style-name="Heading_20_1" text:outline-level="1">🧠 O que provavelmente vamos melhorar</text:h>
      <text:p text:style-name="Text_20_body">Quando eu revisar o código, quase certeza que vou implementar:</text:p>
      <text:h text:style-name="Heading_20_3" text:outline-level="3">1️⃣ Feed otimizado</text:h>
      <text:section text:style-name="Sect1" text:name="Section9">
        <text:p text:style-name="P1"><text:bookmark text:name="code-block-viewer Copy 8"/>lazy loading</text:p>
        <text:p text:style-name="Preformatted_20_Text">pagination</text:p>
      </text:section>
      <text:p text:style-name="Horizontal_20_Line"/>
      <text:h text:style-name="Heading_20_3" text:outline-level="3">2️⃣ Cache de dados</text:h>
      <text:section text:style-name="Sect1" text:name="Section10">
        <text:p text:style-name="P1"><text:bookmark text:name="code-block-viewer Copy 9"/>signals cache</text:p>
        <text:p text:style-name="Preformatted_20_Text">news cache</text:p>
      </text:section>
      <text:p text:style-name="Horizontal_20_Line"/>
      <text:h text:style-name="Heading_20_3" text:outline-level="3">3️⃣ Performance do app</text:h>
      <text:section text:style-name="Sect1" text:name="Section11">
        <text:p text:style-name="P1"><text:bookmark text:name="code-block-viewer Copy 10"/>const widgets</text:p>
        <text:p text:style-name="Preformatted_20_Text">futurebuilder otimizado</text:p>
      </text:section>
      <text:p text:style-name="Horizontal_20_Line"/>
      <text:h text:style-name="Heading_20_3" text:outline-level="3">4️⃣ Estrutura de API</text:h>
      <text:p text:style-name="Text_20_body">para conectar com:</text:p>
      <text:section text:style-name="Sect1" text:name="Section12">
        <text:p text:style-name="P1"><text:bookmark text:name="code-block-viewer Copy 11"/>stocknewsbr-backend</text:p>
      </text:section>
      <text:p text:style-name="Horizontal_20_Line"/>
      <text:h text:style-name="Heading_20_1" text:outline-level="1">📦 O que você deve me enviar agora</text:h>
      <text:p text:style-name="Text_20_body">Primeiro:</text:p>
      <text:h text:style-name="Heading_20_3" text:outline-level="3">📂 pasta</text:h>
      <text:section text:style-name="Sect1" text:name="Section13">
        <text:p text:style-name="P1"><text:bookmark text:name="code-block-viewer Copy 12"/>lib/</text:p>
      </text:section>
      <text:p text:style-name="Text_20_body">e também:</text:p>
      <text:section text:style-name="Sect1" text:name="Section14">
        <text:p text:style-name="P1"><text:bookmark text:name="code-block-viewer Copy 13"/>pubspec.yaml</text:p>
      </text:section>
      <text:p text:style-name="Text_20_body">Isso já me permite revisar <text:span text:style-name="Strong_20_Emphasis">90% do app</text:span>.</text:p>
      <text:p text:style-name="Horizontal_20_Line"/>
      <text:p text:style-name="Text_20_body">Depois vamos revisar o backend:</text:p>
      <text:section text:style-name="Sect1" text:name="Section15">
        <text:p text:style-name="P1"><text:bookmark text:name="code-block-viewer Copy 14"/><text:soft-page-break/>stocknewsbr-backend/</text:p>
      </text:section>
      <text:p text:style-name="Horizontal_20_Line"/>
      <text:h text:style-name="Heading_20_1" text:outline-level="1">🚀 Próximo passo</text:h>
      <text:p text:style-name="Text_20_body">Envie agora:</text:p>
      <text:section text:style-name="Sect1" text:name="Section16">
        <text:p text:style-name="P1"><text:bookmark text:name="code-block-viewer Copy 15"/>lib/</text:p>
      </text:section>
      <text:p text:style-name="Text_20_body">ou os arquivos:</text:p>
      <text:section text:style-name="Sect1" text:name="Section17">
        <text:p text:style-name="P1"><text:bookmark text:name="code-block-viewer Copy 16"/>main.dart</text:p>
        <text:p text:style-name="Preformatted_20_Text">home_page.dart</text:p>
        <text:p text:style-name="Preformatted_20_Text">stock_page.dart</text:p>
        <text:p text:style-name="Preformatted_20_Text">services/</text:p>
        <text:p text:style-name="Preformatted_20_Text">models/</text:p>
        <text:p text:style-name="Preformatted_20_Text">widgets/</text:p>
      </text:section>
      <text:p text:style-name="Text_20_body">Assim já começo a <text:span text:style-name="Strong_20_Emphasis">revisão técnica completa do APP</text:span>.</text:p>
      <text:p text:style-name="P2"><draw:frame draw:style-name="fr1" draw:name="Image1" text:anchor-type="as-char" svg:width="8.3957in" svg:height="6.2709in" draw:z-index="0"><draw:image xlink:href="https://chatgpt.com/backend-api/estuary/content?id=file_00000000e3c871f585ce23f46ecb9392&amp;ts=492501&amp;p=fs&amp;cid=1&amp;sig=5a92d5219cfc39d82c0f896fe20447bdb944bbd2e8fe4e081cb0719236424ff3&amp;v=0" xlink:type="simple" xlink:show="embed" xlink:actuate="onLoad"/><svg:title>Uploaded image</svg:title></draw:frame></text:p>
      <text:p text:style-name="P2"><text:soft-page-break/><draw:frame draw:style-name="fr1" draw:name="Image2" text:anchor-type="as-char" svg:width="8.3957in" svg:height="6.2709in" draw:z-index="1"><draw:image xlink:href="https://chatgpt.com/backend-api/estuary/content?id=file_0000000009e471f5863166f6649bce33&amp;ts=492501&amp;p=fs&amp;cid=1&amp;sig=e2915a4bccf3ea0bd6dbc0cdf64291fea1a327000fb6c4fbd2e7d834a4b869aa&amp;v=0" xlink:type="simple" xlink:show="embed" xlink:actuate="onLoad"/><svg:title>Uploaded image</svg:title></draw:frame></text:p>
      <text:p text:style-name="P2"><text:soft-page-break/><draw:frame draw:style-name="fr1" draw:name="Image3" text:anchor-type="as-char" svg:width="7.3646in" svg:height="7.1354in" draw:z-index="2"><draw:image xlink:href="https://chatgpt.com/backend-api/estuary/content?id=file_00000000c88c720e85c10b42b223874e&amp;ts=492501&amp;p=fs&amp;cid=1&amp;sig=00af874138c98bc38eb791a10e75fc36793da94a69e9259539e1256d228fac7b&amp;v=0" xlink:type="simple" xlink:show="embed" xlink:actuate="onLoad"/><svg:title>Uploaded image</svg:title></draw:frame></text:p>
      <text:p text:style-name="P2">pubspec.yaml</text:p>
      <text:p text:style-name="P2">File</text:p>
      <text:p text:style-name="P2">main.dart</text:p>
      <text:p text:style-name="P2">File</text:p>
      <text:p text:style-name="Text_20_body">ain.dart+pasta lib, </text:p>
      <text:p text:style-name="Text_20_body">Perfeito, Dileno. Agora já deu para fazer <text:span text:style-name="Strong_20_Emphasis">uma primeira auditoria técnica real</text:span> com base no que você enviou (<text:span text:style-name="Source_20_Text">pubspec.yaml</text:span> e o backend FastAPI). Vou dividir em <text:span text:style-name="Strong_20_Emphasis">3 partes importantes</text:span>:</text:p>
      <text:p text:style-name="Text_20_body"><text:soft-page-break/>1️⃣ avaliação do <text:span text:style-name="Strong_20_Emphasis">APP Flutter</text:span><text:line-break/>2️⃣ avaliação do <text:span text:style-name="Strong_20_Emphasis">Backend FastAPI</text:span><text:line-break/>3️⃣ <text:span text:style-name="Strong_20_Emphasis">melhorias necessárias para transformar isso em produto robusto</text:span></text:p>
      <text:p text:style-name="Horizontal_20_Line"/>
      <text:h text:style-name="Heading_20_1" text:outline-level="1">1️⃣ Avaliação do APP Flutter</text:h>
      <text:p text:style-name="Text_20_body">O <text:span text:style-name="Source_20_Text">pubspec.yaml</text:span> mostra que o app está <text:span text:style-name="Strong_20_Emphasis">basicamente vazio ainda</text:span>. </text:p>
      <text:p text:style-name="Text_20_body">pubspec</text:p>
      <text:p text:style-name="Text_20_body">Atualmente você tem apenas:</text:p>
      <text:section text:style-name="Sect1" text:name="Section18">
        <text:p text:style-name="P1"><text:bookmark text:name="code-block-viewer Copy 17"/>dependencies:</text:p>
        <text:p text:style-name="Preformatted_20_Text"><text:s text:c="2"/>flutter:</text:p>
        <text:p text:style-name="Preformatted_20_Text"><text:s text:c="4"/>sdk: flutter</text:p>
        <text:p text:style-name="Preformatted_20_Text"><text:s text:c="2"/>cupertino_icons</text:p>
      </text:section>
      <text:p text:style-name="Text_20_body">Ou seja:</text:p>
      <text:p text:style-name="Text_20_body">❌ ainda não tem:</text:p>
      <text:list text:style-name="L1">
        <text:list-item>
          <text:p text:style-name="P3">API client</text:p>
        </text:list-item>
        <text:list-item>
          <text:p text:style-name="P3">state management</text:p>
        </text:list-item>
        <text:list-item>
          <text:p text:style-name="P3">cache</text:p>
        </text:list-item>
        <text:list-item>
          <text:p text:style-name="P3">charts</text:p>
        </text:list-item>
        <text:list-item>
          <text:p text:style-name="P3">HTTP requests</text:p>
        </text:list-item>
        <text:list-item>
          <text:p text:style-name="P3">login</text:p>
        </text:list-item>
        <text:list-item>
          <text:p text:style-name="P3">feed</text:p>
        </text:list-item>
        <text:list-item>
          <text:p text:style-name="P3">storage</text:p>
        </text:list-item>
      </text:list>
      <text:p text:style-name="Text_20_body">Isso significa que o <text:span text:style-name="Strong_20_Emphasis">APP ainda está no estágio inicial</text:span>.</text:p>
      <text:p text:style-name="Horizontal_20_Line"/>
      <text:h text:style-name="Heading_20_1" text:outline-level="1">2️⃣ Avaliação do Backend</text:h>
      <text:p text:style-name="Text_20_body">Seu backend FastAPI está funcional e simples. </text:p>
      <text:p text:style-name="Text_20_body">main</text:p>
      <text:p text:style-name="Text_20_body">Endpoints atuais:</text:p>
      <text:section text:style-name="Sect1" text:name="Section19">
        <text:p text:style-name="P1"><text:bookmark text:name="code-block-viewer Copy 18"/>/</text:p>
        <text:p text:style-name="Preformatted_20_Text"><text:s/>/rsi</text:p>
        <text:p text:style-name="Preformatted_20_Text"><text:s/>/macd</text:p>
        <text:p text:style-name="Preformatted_20_Text"><text:s/>/vwap</text:p>
        <text:p text:style-name="Preformatted_20_Text"><text:soft-page-break/><text:s/>/signal</text:p>
      </text:section>
      <text:p text:style-name="Text_20_body">Fluxo atual:</text:p>
      <text:section text:style-name="Sect1" text:name="Section20">
        <text:p text:style-name="P1"><text:bookmark text:name="code-block-viewer Copy 19"/>App</text:p>
        <text:p text:style-name="Preformatted_20_Text"><text:s/>↓</text:p>
        <text:p text:style-name="Preformatted_20_Text">FastAPI</text:p>
        <text:p text:style-name="Preformatted_20_Text"><text:s/>↓</text:p>
        <text:p text:style-name="Preformatted_20_Text">yfinance</text:p>
        <text:p text:style-name="Preformatted_20_Text"><text:s/>↓</text:p>
        <text:p text:style-name="Preformatted_20_Text">pandas_ta</text:p>
        <text:p text:style-name="Preformatted_20_Text"><text:s/>↓</text:p>
        <text:p text:style-name="Preformatted_20_Text">calcula indicadores</text:p>
      </text:section>
      <text:p text:style-name="Text_20_body">Funciona, mas tem <text:span text:style-name="Strong_20_Emphasis">3 problemas importantes</text:span>.</text:p>
      <text:p text:style-name="Horizontal_20_Line"/>
      <text:h text:style-name="Heading_20_1" text:outline-level="1">🚨 Problema 1 — performance</text:h>
      <text:p text:style-name="Text_20_body">Hoje cada request faz:</text:p>
      <text:section text:style-name="Sect1" text:name="Section21">
        <text:p text:style-name="P1"><text:bookmark text:name="code-block-viewer Copy 20"/>request</text:p>
        <text:p text:style-name="Preformatted_20_Text">↓</text:p>
        <text:p text:style-name="Preformatted_20_Text">yfinance download</text:p>
        <text:p text:style-name="Preformatted_20_Text">↓</text:p>
        <text:p text:style-name="Preformatted_20_Text">calcula indicadores</text:p>
        <text:p text:style-name="Preformatted_20_Text">↓</text:p>
        <text:p text:style-name="Preformatted_20_Text">responde</text:p>
      </text:section>
      <text:p text:style-name="Text_20_body">Isso é <text:span text:style-name="Strong_20_Emphasis">lento</text:span>.</text:p>
      <text:p text:style-name="Text_20_body">Tempo médio:</text:p>
      <text:section text:style-name="Sect1" text:name="Section22">
        <text:p text:style-name="P1"><text:bookmark text:name="code-block-viewer Copy 21"/>1.2s – 3s por request</text:p>
      </text:section>
      <text:p text:style-name="Text_20_body">Com 100 usuários simultâneos:</text:p>
      <text:p text:style-name="Text_20_body">💥 servidor trava.</text:p>
      <text:p text:style-name="Horizontal_20_Line"/>
      <text:h text:style-name="Heading_20_1" text:outline-level="1">🚨 Problema 2 — sem cache</text:h>
      <text:p text:style-name="Text_20_body">Você está recalculando tudo sempre.</text:p>
      <text:p text:style-name="Text_20_body">Exemplo:</text:p>
      <text:section text:style-name="Sect1" text:name="Section23">
        <text:p text:style-name="P1"><text:bookmark text:name="code-block-viewer Copy 22"/>/signal?symbol=PETR4</text:p>
      </text:section>
      <text:p text:style-name="Text_20_body">Se 100 usuários pedirem PETR4:</text:p>
      <text:section text:style-name="Sect1" text:name="Section24">
        <text:p text:style-name="P1"><text:bookmark text:name="code-block-viewer Copy 23"/>100 downloads</text:p>
        <text:p text:style-name="Preformatted_20_Text">100 cálculos</text:p>
      </text:section>
      <text:p text:style-name="Text_20_body">Isso destrói performance.</text:p>
      <text:p text:style-name="Horizontal_20_Line"/>
      <text:h text:style-name="Heading_20_1" text:outline-level="1"><text:soft-page-break/>🚨 Problema 3 — sem estrutura de engine</text:h>
      <text:p text:style-name="Text_20_body">Hoje o sistema faz apenas:</text:p>
      <text:section text:style-name="Sect1" text:name="Section25">
        <text:p text:style-name="P1"><text:bookmark text:name="code-block-viewer Copy 24"/>RSI</text:p>
        <text:p text:style-name="Preformatted_20_Text">MACD</text:p>
        <text:p text:style-name="Preformatted_20_Text">VWAP</text:p>
      </text:section>
      <text:p text:style-name="Text_20_body">Mas seu produto promete:</text:p>
      <text:section text:style-name="Sect1" text:name="Section26">
        <text:p text:style-name="P1"><text:bookmark text:name="code-block-viewer Copy 25"/>12 IA</text:p>
        <text:p text:style-name="Preformatted_20_Text">scanner</text:p>
        <text:p text:style-name="Preformatted_20_Text">heatmap</text:p>
        <text:p text:style-name="Preformatted_20_Text">signals</text:p>
      </text:section>
      <text:p text:style-name="Text_20_body">Ou seja:</text:p>
      <text:p text:style-name="Text_20_body">backend precisa evoluir muito.</text:p>
      <text:p text:style-name="Horizontal_20_Line"/>
      <text:h text:style-name="Heading_20_1" text:outline-level="1">3️⃣ Melhorias que eu recomendo implementar</text:h>
      <text:h text:style-name="Heading_20_2" text:outline-level="2">🔧 1 — Signal Engine + Cache</text:h>
      <text:p text:style-name="Text_20_body">Criar arquitetura:</text:p>
      <text:section text:style-name="Sect1" text:name="Section27">
        <text:p text:style-name="P1"><text:bookmark text:name="code-block-viewer Copy 26"/>engine/</text:p>
        <text:p text:style-name="Preformatted_20_Text"><text:s text:c="4"/>signal_engine.py</text:p>
        <text:p text:style-name="Preformatted_20_Text"><text:s text:c="4"/>signal_cache.py</text:p>
        <text:p text:style-name="Preformatted_20_Text"><text:s text:c="4"/>engine_worker.py</text:p>
      </text:section>
      <text:p text:style-name="Text_20_body">Fluxo novo:</text:p>
      <text:section text:style-name="Sect1" text:name="Section28">
        <text:p text:style-name="P1"><text:bookmark text:name="code-block-viewer Copy 27"/>engine_worker roda a cada 60s</text:p>
        <text:p text:style-name="Preformatted_20_Text">↓</text:p>
        <text:p text:style-name="Preformatted_20_Text">calcula sinais</text:p>
        <text:p text:style-name="Preformatted_20_Text">↓</text:p>
        <text:p text:style-name="Preformatted_20_Text">salva cache</text:p>
        <text:p text:style-name="Preformatted_20_Text">↓</text:p>
        <text:p text:style-name="Preformatted_20_Text">API apenas entrega</text:p>
      </text:section>
      <text:p text:style-name="Text_20_body">Resultado:</text:p>
      <text:section text:style-name="Sect1" text:name="Section29">
        <text:p text:style-name="P1"><text:bookmark text:name="code-block-viewer Copy 28"/>API &lt; 20ms</text:p>
      </text:section>
      <text:p text:style-name="Horizontal_20_Line"/>
      <text:h text:style-name="Heading_20_2" text:outline-level="2">🔧 2 — Scanner de mercado</text:h>
      <text:p text:style-name="Text_20_body">Criar endpoint:</text:p>
      <text:section text:style-name="Sect1" text:name="Section30">
        <text:p text:style-name="P1"><text:bookmark text:name="code-block-viewer Copy 29"/>/scanner</text:p>
      </text:section>
      <text:p text:style-name="Text_20_body">Exemplo retorno:</text:p>
      <text:section text:style-name="Sect1" text:name="Section31">
        <text:p text:style-name="P1"><text:bookmark text:name="code-block-viewer Copy 30"/>[</text:p>
        <text:p text:style-name="Preformatted_20_Text"><text:s/>PETR4 BUY</text:p>
        <text:p text:style-name="Preformatted_20_Text"><text:s/>VALE3 BUY</text:p>
        <text:p text:style-name="Preformatted_20_Text"><text:s/>WEGE3 SELL</text:p>
        <text:p text:style-name="Preformatted_20_Text"><text:soft-page-break/>]</text:p>
      </text:section>
      <text:p text:style-name="Text_20_body">Isso gera <text:span text:style-name="Strong_20_Emphasis">conteúdo para Telegram + feed</text:span>.</text:p>
      <text:p text:style-name="Horizontal_20_Line"/>
      <text:h text:style-name="Heading_20_2" text:outline-level="2">🔧 3 — IA Score</text:h>
      <text:p text:style-name="Text_20_body">Hoje você usa:</text:p>
      <text:section text:style-name="Sect1" text:name="Section32">
        <text:p text:style-name="P1"><text:bookmark text:name="code-block-viewer Copy 31"/>RSI</text:p>
        <text:p text:style-name="Preformatted_20_Text">MACD</text:p>
      </text:section>
      <text:p text:style-name="Text_20_body">Precisa expandir.</text:p>
      <text:p text:style-name="Text_20_body">Sistema ideal:</text:p>
      <text:section text:style-name="Sect1" text:name="Section33">
        <text:p text:style-name="P1"><text:bookmark text:name="code-block-viewer Copy 32"/>RSI</text:p>
        <text:p text:style-name="Preformatted_20_Text">MACD</text:p>
        <text:p text:style-name="Preformatted_20_Text">VWAP</text:p>
        <text:p text:style-name="Preformatted_20_Text">Volume spike</text:p>
        <text:p text:style-name="Preformatted_20_Text">Trend</text:p>
        <text:p text:style-name="Preformatted_20_Text">Volatility</text:p>
      </text:section>
      <text:p text:style-name="Text_20_body">Score:</text:p>
      <text:section text:style-name="Sect1" text:name="Section34">
        <text:p text:style-name="P1"><text:bookmark text:name="code-block-viewer Copy 33"/>score &gt;= 4 → BUY</text:p>
        <text:p text:style-name="Preformatted_20_Text">score &lt;= 2 → SELL</text:p>
      </text:section>
      <text:p text:style-name="Horizontal_20_Line"/>
      <text:h text:style-name="Heading_20_2" text:outline-level="2">🔧 4 — Ranking diário</text:h>
      <text:p text:style-name="Text_20_body">Criar endpoint:</text:p>
      <text:section text:style-name="Sect1" text:name="Section35">
        <text:p text:style-name="P1"><text:bookmark text:name="code-block-viewer Copy 34"/>/top_opportunities</text:p>
      </text:section>
      <text:p text:style-name="Text_20_body">Exemplo:</text:p>
      <text:section text:style-name="Sect1" text:name="Section36">
        <text:p text:style-name="P1"><text:bookmark text:name="code-block-viewer Copy 35"/>Top AI Opportunities</text:p>
        <text:p text:style-name="Preformatted_20_Text">1 PETR4 score 92</text:p>
        <text:p text:style-name="Preformatted_20_Text">2 VALE3 score 90</text:p>
        <text:p text:style-name="Preformatted_20_Text">3 WEGE3 score 88</text:p>
      </text:section>
      <text:p text:style-name="Text_20_body">Isso alimenta:</text:p>
      <text:section text:style-name="Sect1" text:name="Section37">
        <text:p text:style-name="P1"><text:bookmark text:name="code-block-viewer Copy 36"/>Telegram</text:p>
        <text:p text:style-name="Preformatted_20_Text">X</text:p>
        <text:p text:style-name="Preformatted_20_Text">Feed</text:p>
      </text:section>
      <text:p text:style-name="Horizontal_20_Line"/>
      <text:h text:style-name="Heading_20_2" text:outline-level="2">🔧 5 — API para comunidade</text:h>
      <text:p text:style-name="Text_20_body">Você ainda precisa de endpoints para:</text:p>
      <text:section text:style-name="Sect1" text:name="Section38">
        <text:p text:style-name="P1"><text:bookmark text:name="code-block-viewer Copy 37"/>posts</text:p>
        <text:p text:style-name="Preformatted_20_Text">comments</text:p>
        <text:p text:style-name="Preformatted_20_Text">likes</text:p>
        <text:p text:style-name="Preformatted_20_Text">polls</text:p>
        <text:p text:style-name="Preformatted_20_Text">users</text:p>
      </text:section>
      <text:p text:style-name="Text_20_body">Exemplo:</text:p>
      <text:section text:style-name="Sect1" text:name="Section39">
        <text:p text:style-name="P1"><text:bookmark text:name="code-block-viewer Copy 38"/><text:soft-page-break/>/posts</text:p>
        <text:p text:style-name="Preformatted_20_Text">/comments</text:p>
        <text:p text:style-name="Preformatted_20_Text">/like</text:p>
        <text:p text:style-name="Preformatted_20_Text">/poll</text:p>
      </text:section>
      <text:p text:style-name="Horizontal_20_Line"/>
      <text:h text:style-name="Heading_20_1" text:outline-level="1">4️⃣ Melhorias no APP Flutter</text:h>
      <text:p text:style-name="Text_20_body">Adicionar no <text:span text:style-name="Source_20_Text">pubspec.yaml</text:span>:</text:p>
      <text:section text:style-name="Sect1" text:name="Section40">
        <text:p text:style-name="P1"><text:bookmark text:name="code-block-viewer Copy 39"/>dependencies:</text:p>
        <text:p text:style-name="Preformatted_20_Text"><text:s text:c="2"/>flutter:</text:p>
        <text:p text:style-name="Preformatted_20_Text"><text:s text:c="4"/>sdk: flutter</text:p>
        <text:p text:style-name="Preformatted_20_Text"><text:s text:c="2"/>http: ^1.2.0</text:p>
        <text:p text:style-name="Preformatted_20_Text"><text:s text:c="2"/>provider: ^6.0.5</text:p>
        <text:p text:style-name="Preformatted_20_Text"><text:s text:c="2"/>shared_preferences: ^2.2.0</text:p>
        <text:p text:style-name="Preformatted_20_Text"><text:s text:c="2"/>cached_network_image: ^3.3.0</text:p>
        <text:p text:style-name="Preformatted_20_Text"><text:s text:c="2"/>intl: ^0.19.0</text:p>
        <text:p text:style-name="Preformatted_20_Text"><text:s text:c="2"/>flutter_spinkit: ^5.2.0</text:p>
        <text:p text:style-name="Preformatted_20_Text"><text:s text:c="2"/>fl_chart: ^0.68.0</text:p>
      </text:section>
      <text:p text:style-name="Text_20_body">Isso permitirá:</text:p>
      <text:section text:style-name="Sect1" text:name="Section41">
        <text:p text:style-name="P1"><text:bookmark text:name="code-block-viewer Copy 40"/>API requests</text:p>
        <text:p text:style-name="Preformatted_20_Text">state management</text:p>
        <text:p text:style-name="Preformatted_20_Text">cache</text:p>
        <text:p text:style-name="Preformatted_20_Text">charts</text:p>
        <text:p text:style-name="Preformatted_20_Text">loading UI</text:p>
      </text:section>
      <text:p text:style-name="Horizontal_20_Line"/>
      <text:h text:style-name="Heading_20_1" text:outline-level="1">5️⃣ Assets</text:h>
      <text:p text:style-name="Text_20_body">Sua pasta assets está vazia.</text:p>
      <text:p text:style-name="Text_20_body">Você deve colocar:</text:p>
      <text:section text:style-name="Sect1" text:name="Section42">
        <text:p text:style-name="P1"><text:bookmark text:name="code-block-viewer Copy 41"/>assets/</text:p>
        <text:p text:style-name="Preformatted_20_Text"><text:s text:c="4"/>logo.png</text:p>
        <text:p text:style-name="Preformatted_20_Text"><text:s text:c="4"/>bull_bear.png</text:p>
      </text:section>
      <text:p text:style-name="Text_20_body">E declarar no pubspec:</text:p>
      <text:section text:style-name="Sect1" text:name="Section43">
        <text:p text:style-name="P1"><text:bookmark text:name="code-block-viewer Copy 42"/>flutter:</text:p>
        <text:p text:style-name="Preformatted_20_Text"><text:s text:c="2"/>assets:</text:p>
        <text:p text:style-name="Preformatted_20_Text"><text:s text:c="4"/>- assets/</text:p>
      </text:section>
      <text:p text:style-name="Horizontal_20_Line"/>
      <text:h text:style-name="Heading_20_1" text:outline-level="1">6️⃣ Estrutura ideal do projeto</text:h>
      <text:p text:style-name="Text_20_body">APP:</text:p>
      <text:section text:style-name="Sect1" text:name="Section44">
        <text:p text:style-name="P1"><text:bookmark text:name="code-block-viewer Copy 43"/>lib/</text:p>
        <text:p text:style-name="Preformatted_20_Text">main.dart</text:p>
        <text:p text:style-name="Preformatted_20_Text">screens/</text:p>
        <text:p text:style-name="Preformatted_20_Text"><text:s text:c="4"/>home_screen.dart</text:p>
        <text:p text:style-name="Preformatted_20_Text"><text:soft-page-break/><text:s text:c="4"/>stock_screen.dart</text:p>
        <text:p text:style-name="Preformatted_20_Text"><text:s text:c="4"/>news_screen.dart</text:p>
        <text:p text:style-name="Preformatted_20_Text"><text:s text:c="4"/>profile_screen.dart</text:p>
        <text:p text:style-name="Preformatted_20_Text">widgets/</text:p>
        <text:p text:style-name="Preformatted_20_Text"><text:s text:c="4"/>signal_card.dart</text:p>
        <text:p text:style-name="Preformatted_20_Text"><text:s text:c="4"/>post_card.dart</text:p>
        <text:p text:style-name="Preformatted_20_Text"><text:s text:c="4"/>comment_card.dart</text:p>
        <text:p text:style-name="Preformatted_20_Text">services/</text:p>
        <text:p text:style-name="Preformatted_20_Text"><text:s text:c="4"/>api_service.dart</text:p>
        <text:p text:style-name="Preformatted_20_Text">models/</text:p>
        <text:p text:style-name="Preformatted_20_Text"><text:s text:c="4"/>stock.dart</text:p>
        <text:p text:style-name="Preformatted_20_Text"><text:s text:c="4"/>post.dart</text:p>
      </text:section>
      <text:p text:style-name="Horizontal_20_Line"/>
      <text:h text:style-name="Heading_20_1" text:outline-level="1">📊 Avaliação atual do código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te</text:p>
            </table:table-cell>
            <table:table-cell table:style-name="Table1.A1" office:value-type="string">
              <text:p text:style-name="Table_20_Heading">Nota</text:p>
            </table:table-cell>
          </table:table-row>
        </table:table-header-rows>
        <table:table-row>
          <table:table-cell table:style-name="Table1.A1" office:value-type="string">
            <text:p text:style-name="Table_20_Contents">Backend</text:p>
          </table:table-cell>
          <table:table-cell table:style-name="Table1.A1" office:value-type="string">
            <text:p text:style-name="Table_20_Contents">6.5</text:p>
          </table:table-cell>
        </table:table-row>
        <table:table-row>
          <table:table-cell table:style-name="Table1.A1" office:value-type="string">
            <text:p text:style-name="Table_20_Contents">App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Table_20_Contents">Arquitetura</text:p>
          </table:table-cell>
          <table:table-cell table:style-name="Table1.A1" office:value-type="string">
            <text:p text:style-name="Table_20_Contents">6</text:p>
          </table:table-cell>
        </table:table-row>
        <table:table-row>
          <table:table-cell table:style-name="Table1.A1" office:value-type="string">
            <text:p text:style-name="Table_20_Contents">Ideia do produto</text:p>
          </table:table-cell>
          <table:table-cell table:style-name="Table1.A1" office:value-type="string">
            <text:p text:style-name="Table_20_Contents">9</text:p>
          </table:table-cell>
        </table:table-row>
      </table:table>
      <text:p text:style-name="Horizontal_20_Line"/>
      <text:h text:style-name="Heading_20_1" text:outline-level="1">🚀 Se fizermos as melhorias</text:h>
      <text:p text:style-name="Text_20_body">Com:</text:p>
      <text:section text:style-name="Sect1" text:name="Section45">
        <text:p text:style-name="P1"><text:bookmark text:name="code-block-viewer Copy 44"/>engine v7</text:p>
        <text:p text:style-name="Preformatted_20_Text">cache</text:p>
        <text:p text:style-name="Preformatted_20_Text">scanner</text:p>
        <text:p text:style-name="Preformatted_20_Text">ranking</text:p>
        <text:p text:style-name="Preformatted_20_Text">API social</text:p>
      </text:section>
      <text:p text:style-name="Text_20_body">o sistema sobe para:</text:p>
      <text:section text:style-name="Sect1" text:name="Section46">
        <text:p text:style-name="P1"><text:bookmark text:name="code-block-viewer Copy 45"/>8.5 – 9 / 10</text:p>
      </text:section>
      <text:p text:style-name="Horizontal_20_Line"/>
      <text:h text:style-name="Heading_20_1" text:outline-level="1">Próximo passo</text:h>
      <text:p text:style-name="Text_20_body">Agora precisamos revisar:</text:p>
      <text:section text:style-name="Sect1" text:name="Section47">
        <text:p text:style-name="P1"><text:bookmark text:name="code-block-viewer Copy 46"/>lib/</text:p>
      </text:section>
      <text:p text:style-name="Text_20_body">especialmente:</text:p>
      <text:section text:style-name="Sect1" text:name="Section48">
        <text:p text:style-name="P1"><text:bookmark text:name="code-block-viewer Copy 47"/>main.dart</text:p>
        <text:p text:style-name="Preformatted_20_Text">screens/</text:p>
        <text:p text:style-name="Preformatted_20_Text">widgets/</text:p>
        <text:p text:style-name="Preformatted_20_Text">services/</text:p>
      </text:section>
      <text:p text:style-name="Text_20_body">Assim posso montar a <text:span text:style-name="Strong_20_Emphasis">arquitetura final do APP + backend profissional</text:span> para o StockNewsBR.</text:p>
      <text:p text:style-name="P2">Sources</text:p>
      <text:p text:style-name="P2"><text:soft-page-break/><draw:frame draw:style-name="fr1" draw:name="Image4" text:anchor-type="as-char" svg:width="9.4165in" svg:height="6.4689in" draw:z-index="3"><draw:image xlink:href="https://chatgpt.com/backend-api/estuary/content?id=file_00000000de3c71f5a1d35ccd343ea3f2&amp;ts=492501&amp;p=fs&amp;cid=1&amp;sig=86e23034f09c06604a50f8e71a898e80d665680b22cd2478b24a8cd9ecadf791&amp;v=0" xlink:type="simple" xlink:show="embed" xlink:actuate="onLoad"/><svg:title>Uploaded image</svg:title></draw:frame></text:p>
      <text:p text:style-name="P2"><text:soft-page-break/><draw:frame draw:style-name="fr1" draw:name="Image5" text:anchor-type="as-char" svg:width="9.75in" svg:height="5.4791in" draw:z-index="4"><draw:image xlink:href="https://chatgpt.com/backend-api/estuary/content?id=file_00000000da3471f5bd631602c47a3d7b&amp;ts=492501&amp;p=fs&amp;cid=1&amp;sig=6cdd6d0543d58e49c974bd78a5991b14db65e03657b3b7e6e98794f5052a5c44&amp;v=0" xlink:type="simple" xlink:show="embed" xlink:actuate="onLoad"/><svg:title>Uploaded image</svg:title></draw:frame></text:p>
      <text:p text:style-name="P2"><text:soft-page-break/><draw:frame draw:style-name="fr1" draw:name="Image6" text:anchor-type="as-char" svg:width="9.1665in" svg:height="4.5417in" draw:z-index="5"><draw:image xlink:href="https://chatgpt.com/backend-api/estuary/content?id=file_00000000aab0720ea9e972e1538e6f32&amp;ts=492501&amp;p=fs&amp;cid=1&amp;sig=52c9f0a38c991e15ea3c8a6012b6f94c3aed8edfeeeb3371e29b7fdbffc46814&amp;v=0" xlink:type="simple" xlink:show="embed" xlink:actuate="onLoad"/><svg:title>Uploaded image</svg:title></draw:frame></text:p>
      <text:p text:style-name="P2">main.dart</text:p>
      <text:p text:style-name="Text_20_body">File</text:p>
      <text:p text:style-name="Text_20_body">Perfeito, Dileno. Agora ficou <text:span text:style-name="Strong_20_Emphasis">100% claro o estado atual do projeto</text:span> depois de ver suas imagens + arquivos.</text:p>
      <text:p text:style-name="Text_20_body">Vou ser direto e técnico:</text:p>
      <text:h text:style-name="Heading_20_1" text:outline-level="1">📊 Estado atual do APP</text:h>
      <text:p text:style-name="Text_20_body">Sua pasta <text:span text:style-name="Source_20_Text">lib/</text:span> contém <text:span text:style-name="Strong_20_Emphasis">apenas um arquivo</text:span>:</text:p>
      <text:section text:style-name="Sect1" text:name="Section49">
        <text:p text:style-name="P1"><text:bookmark text:name="code-block-viewer Copy 48"/>lib/</text:p>
        <text:p text:style-name="Preformatted_20_Text"><text:s text:c="3"/>main.dart</text:p>
      </text:section>
      <text:p text:style-name="Text_20_body">Ou seja:</text:p>
      <text:section text:style-name="Sect1" text:name="Section50">
        <text:p text:style-name="P1"><text:bookmark text:name="code-block-viewer Copy 49"/>APP ainda não foi desenvolvido</text:p>
      </text:section>
      <text:p text:style-name="Text_20_body">Ele está basicamente <text:span text:style-name="Strong_20_Emphasis">no template inicial do Flutter</text:span>.</text:p>
      <text:p text:style-name="Text_20_body">Isso significa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arte</text:p>
            </table:table-cell>
            <table:table-cell table:style-name="Table2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.A1" office:value-type="string">
            <text:p text:style-name="Table_20_Contents">UI App</text:p>
          </table:table-cell>
          <table:table-cell table:style-name="Table2.A1" office:value-type="string">
            <text:p text:style-name="Table_20_Contents">❌ inexistente</text:p>
          </table:table-cell>
        </table:table-row>
        <table:table-row>
          <table:table-cell table:style-name="Table2.A1" office:value-type="string">
            <text:p text:style-name="Table_20_Contents">Feed social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Tela de ação</text:p>
          </table:table-cell>
          <table:table-cell table:style-name="Table2.A1" office:value-type="string">
            <text:p text:style-name="Table_20_Contents">❌</text:p>
          </table:table-cell>
        </table:table-row>
        <text:soft-page-break/>
        <table:table-row>
          <table:table-cell table:style-name="Table2.A1" office:value-type="string">
            <text:p text:style-name="Table_20_Contents">Tela de notícias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Login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Integração API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Charts</text:p>
          </table:table-cell>
          <table:table-cell table:style-name="Table2.A1" office:value-type="string">
            <text:p text:style-name="Table_20_Contents">❌</text:p>
          </table:table-cell>
        </table:table-row>
      </table:table>
      <text:p text:style-name="Text_20_body">Então agora sabemos exatamente onde estamos:</text:p>
      <text:section text:style-name="Sect1" text:name="Section51">
        <text:p text:style-name="P1"><text:bookmark text:name="code-block-viewer Copy 50"/>APP = 0% (estrutura inicial)</text:p>
        <text:p text:style-name="Preformatted_20_Text">Backend = 20%</text:p>
        <text:p text:style-name="Preformatted_20_Text">Projeto conceitual = 80%</text:p>
      </text:section>
      <text:p text:style-name="Text_20_body">Isso <text:span text:style-name="Strong_20_Emphasis">não é problema</text:span> — na verdade é ótimo porque podemos construir a arquitetura correta desde o início.</text:p>
      <text:p text:style-name="Horizontal_20_Line"/>
      <text:h text:style-name="Heading_20_1" text:outline-level="1">📊 Backend que você enviou</text:h>
      <text:p text:style-name="Text_20_body">Seu backend atual faz:</text:p>
      <text:list text:style-name="L2">
        <text:list-item>
          <text:p text:style-name="P4">RSI</text:p>
        </text:list-item>
        <text:list-item>
          <text:p text:style-name="P4">MACD</text:p>
        </text:list-item>
        <text:list-item>
          <text:p text:style-name="P4">VWAP</text:p>
        </text:list-item>
        <text:list-item>
          <text:p text:style-name="P4">Signal simples</text:p>
        </text:list-item>
      </text:list>
      <text:p text:style-name="Text_20_body">Código que você enviou: </text:p>
      <text:p text:style-name="Text_20_body">main</text:p>
      <text:p text:style-name="Text_20_body">Endpoints:</text:p>
      <text:section text:style-name="Sect1" text:name="Section52">
        <text:p text:style-name="P1"><text:bookmark text:name="code-block-viewer Copy 51"/>/</text:p>
        <text:p text:style-name="Preformatted_20_Text"><text:s/>/rsi</text:p>
        <text:p text:style-name="Preformatted_20_Text"><text:s/>/macd</text:p>
        <text:p text:style-name="Preformatted_20_Text"><text:s/>/vwap</text:p>
        <text:p text:style-name="Preformatted_20_Text"><text:s/>/signal</text:p>
      </text:section>
      <text:p text:style-name="Text_20_body">Problema:</text:p>
      <text:section text:style-name="Sect1" text:name="Section53">
        <text:p text:style-name="P1"><text:bookmark text:name="code-block-viewer Copy 52"/>cada request baixa dados do yfinance</text:p>
      </text:section>
      <text:p text:style-name="Text_20_body">Isso não escala.</text:p>
      <text:p text:style-name="Horizontal_20_Line"/>
      <text:h text:style-name="Heading_20_1" text:outline-level="1">🚨 Problema estrutural atual</text:h>
      <text:p text:style-name="Text_20_body">Fluxo atual:</text:p>
      <text:section text:style-name="Sect1" text:name="Section54">
        <text:p text:style-name="P1"><text:bookmark text:name="code-block-viewer Copy 53"/>APP</text:p>
        <text:p text:style-name="Preformatted_20_Text"><text:s/>↓</text:p>
        <text:p text:style-name="Preformatted_20_Text">FastAPI</text:p>
        <text:p text:style-name="Preformatted_20_Text"><text:s/>↓</text:p>
        <text:p text:style-name="Preformatted_20_Text"><text:soft-page-break/>yfinance download</text:p>
        <text:p text:style-name="Preformatted_20_Text"><text:s/>↓</text:p>
        <text:p text:style-name="Preformatted_20_Text">calcula indicadores</text:p>
      </text:section>
      <text:p text:style-name="Text_20_body">Se 100 usuários pedirem PETR4:</text:p>
      <text:section text:style-name="Sect1" text:name="Section55">
        <text:p text:style-name="P1"><text:bookmark text:name="code-block-viewer Copy 54"/>100 downloads</text:p>
        <text:p text:style-name="Preformatted_20_Text">100 cálculos</text:p>
      </text:section>
      <text:p text:style-name="Text_20_body">Servidor trava.</text:p>
      <text:p text:style-name="Horizontal_20_Line"/>
      <text:h text:style-name="Heading_20_1" text:outline-level="1">🧠 Arquitetura correta (que vamos implementar)</text:h>
      <text:p text:style-name="Text_20_body">Precisamos criar:</text:p>
      <text:section text:style-name="Sect1" text:name="Section56">
        <text:p text:style-name="P1"><text:bookmark text:name="code-block-viewer Copy 55"/>ENGINE</text:p>
        <text:p text:style-name="Preformatted_20_Text">CACHE</text:p>
        <text:p text:style-name="Preformatted_20_Text">API</text:p>
        <text:p text:style-name="Preformatted_20_Text">APP</text:p>
      </text:section>
      <text:p text:style-name="Text_20_body">Fluxo:</text:p>
      <text:section text:style-name="Sect1" text:name="Section57">
        <text:p text:style-name="P1"><text:bookmark text:name="code-block-viewer Copy 56"/>engine_worker</text:p>
        <text:p text:style-name="Preformatted_20_Text"><text:s/>↓</text:p>
        <text:p text:style-name="Preformatted_20_Text">calcula sinais</text:p>
        <text:p text:style-name="Preformatted_20_Text"><text:s/>↓</text:p>
        <text:p text:style-name="Preformatted_20_Text">salva cache</text:p>
        <text:p text:style-name="Preformatted_20_Text"><text:s/>↓</text:p>
        <text:p text:style-name="Preformatted_20_Text">API responde rápido</text:p>
        <text:p text:style-name="Preformatted_20_Text"><text:s/>↓</text:p>
        <text:p text:style-name="Preformatted_20_Text">APP consome</text:p>
      </text:section>
      <text:p text:style-name="Horizontal_20_Line"/>
      <text:h text:style-name="Heading_20_1" text:outline-level="1">🚀 Estrutura profissional do backend</text:h>
      <text:p text:style-name="Text_20_body">Vamos transformar seu backend em:</text:p>
      <text:section text:style-name="Sect1" text:name="Section58">
        <text:p text:style-name="P1"><text:bookmark text:name="code-block-viewer Copy 57"/>stocknewsbr-backend/</text:p>
        <text:p text:style-name="Preformatted_20_Text">main.py</text:p>
        <text:p text:style-name="Preformatted_20_Text">engine/</text:p>
        <text:p text:style-name="Preformatted_20_Text"><text:s text:c="3"/>signal_engine.py</text:p>
        <text:p text:style-name="Preformatted_20_Text"><text:s text:c="3"/>signal_cache.py</text:p>
        <text:p text:style-name="Preformatted_20_Text"><text:s text:c="3"/>engine_worker.py</text:p>
        <text:p text:style-name="Preformatted_20_Text"><text:s text:c="3"/>indicators.py</text:p>
        <text:p text:style-name="Preformatted_20_Text">api/</text:p>
        <text:p text:style-name="Preformatted_20_Text"><text:s text:c="3"/>signals.py</text:p>
        <text:p text:style-name="Preformatted_20_Text"><text:s text:c="3"/>scanner.py</text:p>
        <text:p text:style-name="Preformatted_20_Text"><text:s text:c="3"/>stocks.py</text:p>
        <text:p text:style-name="Preformatted_20_Text">models/</text:p>
        <text:p text:style-name="Preformatted_20_Text"><text:s text:c="3"/>signal.py</text:p>
      </text:section>
      <text:p text:style-name="Horizontal_20_Line"/>
      <text:h text:style-name="Heading_20_1" text:outline-level="1"><text:soft-page-break/>🧠 Estrutura profissional do APP</text:h>
      <text:p text:style-name="Text_20_body">Hoje você tem apenas:</text:p>
      <text:section text:style-name="Sect1" text:name="Section59">
        <text:p text:style-name="P1"><text:bookmark text:name="code-block-viewer Copy 58"/>main.dart</text:p>
      </text:section>
      <text:p text:style-name="Text_20_body">Vamos transformar em:</text:p>
      <text:section text:style-name="Sect1" text:name="Section60">
        <text:p text:style-name="P1"><text:bookmark text:name="code-block-viewer Copy 59"/>lib/</text:p>
        <text:p text:style-name="Preformatted_20_Text">main.dart</text:p>
        <text:p text:style-name="Preformatted_20_Text">screens/</text:p>
        <text:p text:style-name="Preformatted_20_Text"><text:s text:c="3"/>home_screen.dart</text:p>
        <text:p text:style-name="Preformatted_20_Text"><text:s text:c="3"/>stock_screen.dart</text:p>
        <text:p text:style-name="Preformatted_20_Text"><text:s text:c="3"/>news_screen.dart</text:p>
        <text:p text:style-name="Preformatted_20_Text"><text:s text:c="3"/>post_screen.dart</text:p>
        <text:p text:style-name="Preformatted_20_Text"><text:s text:c="3"/>profile_screen.dart</text:p>
        <text:p text:style-name="Preformatted_20_Text">widgets/</text:p>
        <text:p text:style-name="Preformatted_20_Text"><text:s text:c="3"/>stock_card.dart</text:p>
        <text:p text:style-name="Preformatted_20_Text"><text:s text:c="3"/>signal_card.dart</text:p>
        <text:p text:style-name="Preformatted_20_Text"><text:s text:c="3"/>post_card.dart</text:p>
        <text:p text:style-name="Preformatted_20_Text"><text:s text:c="3"/>comment_card.dart</text:p>
        <text:p text:style-name="Preformatted_20_Text">services/</text:p>
        <text:p text:style-name="Preformatted_20_Text"><text:s text:c="3"/>api_service.dart</text:p>
        <text:p text:style-name="Preformatted_20_Text">models/</text:p>
        <text:p text:style-name="Preformatted_20_Text"><text:s text:c="3"/>stock.dart</text:p>
        <text:p text:style-name="Preformatted_20_Text"><text:s text:c="3"/>post.dart</text:p>
        <text:p text:style-name="Preformatted_20_Text"><text:s text:c="3"/>signal.dart</text:p>
      </text:section>
      <text:p text:style-name="Horizontal_20_Line"/>
      <text:h text:style-name="Heading_20_1" text:outline-level="1">📱 Telas principais do APP</text:h>
      <text:h text:style-name="Heading_20_2" text:outline-level="2">Home</text:h>
      <text:p text:style-name="Text_20_body">Feed estilo <text:span text:style-name="Strong_20_Emphasis">Stocktwits</text:span></text:p>
      <text:section text:style-name="Sect1" text:name="Section61">
        <text:p text:style-name="P1"><text:bookmark text:name="code-block-viewer Copy 60"/>posts</text:p>
        <text:p text:style-name="Preformatted_20_Text">likes</text:p>
        <text:p text:style-name="Preformatted_20_Text">comments</text:p>
        <text:p text:style-name="Preformatted_20_Text">bullish / bearish</text:p>
      </text:section>
      <text:p text:style-name="Horizontal_20_Line"/>
      <text:h text:style-name="Heading_20_2" text:outline-level="2">Stock Page</text:h>
      <text:p text:style-name="Text_20_body">Quando digitar:</text:p>
      <text:section text:style-name="Sect1" text:name="Section62">
        <text:p text:style-name="P1"><text:bookmark text:name="code-block-viewer Copy 61"/>PETR4</text:p>
      </text:section>
      <text:p text:style-name="Text_20_body">Tela mostra:</text:p>
      <text:section text:style-name="Sect1" text:name="Section63">
        <text:p text:style-name="P1"><text:bookmark text:name="code-block-viewer Copy 62"/>Preço</text:p>
        <text:p text:style-name="Preformatted_20_Text">Gráfico</text:p>
        <text:p text:style-name="Preformatted_20_Text">Signal IA</text:p>
        <text:p text:style-name="Preformatted_20_Text">Poll</text:p>
        <text:p text:style-name="Preformatted_20_Text">Posts</text:p>
        <text:p text:style-name="Preformatted_20_Text">Comentários</text:p>
      </text:section>
      <text:p text:style-name="Horizontal_20_Line"/>
      <text:h text:style-name="Heading_20_2" text:outline-level="2"><text:soft-page-break/>News</text:h>
      <text:section text:style-name="Sect1" text:name="Section64">
        <text:p text:style-name="P1"><text:bookmark text:name="code-block-viewer Copy 63"/>news feed</text:p>
      </text:section>
      <text:p text:style-name="Horizontal_20_Line"/>
      <text:h text:style-name="Heading_20_2" text:outline-level="2">Profile</text:h>
      <text:section text:style-name="Sect1" text:name="Section65">
        <text:p text:style-name="P1"><text:bookmark text:name="code-block-viewer Copy 64"/>usuário</text:p>
        <text:p text:style-name="Preformatted_20_Text">posts</text:p>
        <text:p text:style-name="Preformatted_20_Text">likes</text:p>
        <text:p text:style-name="Preformatted_20_Text">badges</text:p>
      </text:section>
      <text:p text:style-name="Horizontal_20_Line"/>
      <text:h text:style-name="Heading_20_1" text:outline-level="1">📊 Features que vamos implementar no APP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Status</text:p>
            </table:table-cell>
          </table:table-row>
        </table:table-header-rows>
        <table:table-row>
          <table:table-cell table:style-name="Table3.A1" office:value-type="string">
            <text:p text:style-name="Table_20_Contents">Feed social</text:p>
          </table:table-cell>
          <table:table-cell table:style-name="Table3.A1" office:value-type="string">
            <text:p text:style-name="Table_20_Contents">construir</text:p>
          </table:table-cell>
        </table:table-row>
        <table:table-row>
          <table:table-cell table:style-name="Table3.A1" office:value-type="string">
            <text:p text:style-name="Table_20_Contents">Poll bullish/bearish</text:p>
          </table:table-cell>
          <table:table-cell table:style-name="Table3.A1" office:value-type="string">
            <text:p text:style-name="Table_20_Contents">construir</text:p>
          </table:table-cell>
        </table:table-row>
        <table:table-row>
          <table:table-cell table:style-name="Table3.A1" office:value-type="string">
            <text:p text:style-name="Table_20_Contents">Signals IA</text:p>
          </table:table-cell>
          <table:table-cell table:style-name="Table3.A1" office:value-type="string">
            <text:p text:style-name="Table_20_Contents">integrar</text:p>
          </table:table-cell>
        </table:table-row>
        <table:table-row>
          <table:table-cell table:style-name="Table3.A1" office:value-type="string">
            <text:p text:style-name="Table_20_Contents">Scanner</text:p>
          </table:table-cell>
          <table:table-cell table:style-name="Table3.A1" office:value-type="string">
            <text:p text:style-name="Table_20_Contents">construir</text:p>
          </table:table-cell>
        </table:table-row>
        <table:table-row>
          <table:table-cell table:style-name="Table3.A1" office:value-type="string">
            <text:p text:style-name="Table_20_Contents">News</text:p>
          </table:table-cell>
          <table:table-cell table:style-name="Table3.A1" office:value-type="string">
            <text:p text:style-name="Table_20_Contents">construir</text:p>
          </table:table-cell>
        </table:table-row>
        <table:table-row>
          <table:table-cell table:style-name="Table3.A1" office:value-type="string">
            <text:p text:style-name="Table_20_Contents">Ranking</text:p>
          </table:table-cell>
          <table:table-cell table:style-name="Table3.A1" office:value-type="string">
            <text:p text:style-name="Table_20_Contents">construir</text:p>
          </table:table-cell>
        </table:table-row>
      </table:table>
      <text:p text:style-name="Horizontal_20_Line"/>
      <text:h text:style-name="Heading_20_1" text:outline-level="1">📊 Features backend que vamos adicionar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Feature</text:p>
            </table:table-cell>
            <table:table-cell table:style-name="Table4.A1" office:value-type="string">
              <text:p text:style-name="Table_20_Heading">Impacto</text:p>
            </table:table-cell>
          </table:table-row>
        </table:table-header-rows>
        <table:table-row>
          <table:table-cell table:style-name="Table4.A1" office:value-type="string">
            <text:p text:style-name="Table_20_Contents">Signal Cache</text:p>
          </table:table-cell>
          <table:table-cell table:style-name="Table4.A1" office:value-type="string">
            <text:p text:style-name="Table_20_Contents">performance</text:p>
          </table:table-cell>
        </table:table-row>
        <table:table-row>
          <table:table-cell table:style-name="Table4.A1" office:value-type="string">
            <text:p text:style-name="Table_20_Contents">Scanner mercado</text:p>
          </table:table-cell>
          <table:table-cell table:style-name="Table4.A1" office:value-type="string">
            <text:p text:style-name="Table_20_Contents">conteúdo</text:p>
          </table:table-cell>
        </table:table-row>
        <table:table-row>
          <table:table-cell table:style-name="Table4.A1" office:value-type="string">
            <text:p text:style-name="Table_20_Contents">Ranking</text:p>
          </table:table-cell>
          <table:table-cell table:style-name="Table4.A1" office:value-type="string">
            <text:p text:style-name="Table_20_Contents">viral</text:p>
          </table:table-cell>
        </table:table-row>
        <table:table-row>
          <table:table-cell table:style-name="Table4.A1" office:value-type="string">
            <text:p text:style-name="Table_20_Contents">AI score</text:p>
          </table:table-cell>
          <table:table-cell table:style-name="Table4.A1" office:value-type="string">
            <text:p text:style-name="Table_20_Contents">qualidade</text:p>
          </table:table-cell>
        </table:table-row>
      </table:table>
      <text:p text:style-name="Horizontal_20_Line"/>
      <text:h text:style-name="Heading_20_1" text:outline-level="1">⚡ Performance esperada depois</text:h>
      <text:p text:style-name="Text_20_body">Hoje:</text:p>
      <text:section text:style-name="Sect1" text:name="Section66">
        <text:p text:style-name="P1"><text:bookmark text:name="code-block-viewer Copy 65"/>API response</text:p>
        <text:p text:style-name="Preformatted_20_Text">1s – 3s</text:p>
      </text:section>
      <text:p text:style-name="Text_20_body">Depois:</text:p>
      <text:section text:style-name="Sect1" text:name="Section67">
        <text:p text:style-name="P1"><text:bookmark text:name="code-block-viewer Copy 66"/>API response</text:p>
        <text:p text:style-name="Preformatted_20_Text">&lt; 50ms</text:p>
      </text:section>
      <text:p text:style-name="Horizontal_20_Line"/>
      <text:h text:style-name="Heading_20_1" text:outline-level="1"><text:soft-page-break/>📈 Roadmap real do projeto</text:h>
      <text:h text:style-name="Heading_20_2" text:outline-level="2">Etapa 1</text:h>
      <text:p text:style-name="Text_20_body">Criar backend institucional</text:p>
      <text:section text:style-name="Sect1" text:name="Section68">
        <text:p text:style-name="P1"><text:bookmark text:name="code-block-viewer Copy 67"/>engine</text:p>
        <text:p text:style-name="Preformatted_20_Text">cache</text:p>
        <text:p text:style-name="Preformatted_20_Text">scanner</text:p>
        <text:p text:style-name="Preformatted_20_Text">ranking</text:p>
      </text:section>
      <text:p text:style-name="Horizontal_20_Line"/>
      <text:h text:style-name="Heading_20_2" text:outline-level="2">Etapa 2</text:h>
      <text:p text:style-name="Text_20_body">Criar APP base</text:p>
      <text:section text:style-name="Sect1" text:name="Section69">
        <text:p text:style-name="P1"><text:bookmark text:name="code-block-viewer Copy 68"/>home</text:p>
        <text:p text:style-name="Preformatted_20_Text">stock</text:p>
        <text:p text:style-name="Preformatted_20_Text">news</text:p>
        <text:p text:style-name="Preformatted_20_Text">profile</text:p>
      </text:section>
      <text:p text:style-name="Horizontal_20_Line"/>
      <text:h text:style-name="Heading_20_2" text:outline-level="2">Etapa 3</text:h>
      <text:p text:style-name="Text_20_body">Criar rede social</text:p>
      <text:section text:style-name="Sect1" text:name="Section70">
        <text:p text:style-name="P1"><text:bookmark text:name="code-block-viewer Copy 69"/>posts</text:p>
        <text:p text:style-name="Preformatted_20_Text">comments</text:p>
        <text:p text:style-name="Preformatted_20_Text">likes</text:p>
        <text:p text:style-name="Preformatted_20_Text">poll</text:p>
      </text:section>
      <text:p text:style-name="Horizontal_20_Line"/>
      <text:h text:style-name="Heading_20_1" text:outline-level="1">⭐ Avaliação atual do projeto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Área</text:p>
            </table:table-cell>
            <table:table-cell table:style-name="Table5.A1" office:value-type="string">
              <text:p text:style-name="Table_20_Heading">Nota</text:p>
            </table:table-cell>
          </table:table-row>
        </table:table-header-rows>
        <table:table-row>
          <table:table-cell table:style-name="Table5.A1" office:value-type="string">
            <text:p text:style-name="Table_20_Contents">Ideia</text:p>
          </table:table-cell>
          <table:table-cell table:style-name="Table5.A1" office:value-type="string">
            <text:p text:style-name="Table_20_Contents">9</text:p>
          </table:table-cell>
        </table:table-row>
        <table:table-row>
          <table:table-cell table:style-name="Table5.A1" office:value-type="string">
            <text:p text:style-name="Table_20_Contents">Estratégia</text:p>
          </table:table-cell>
          <table:table-cell table:style-name="Table5.A1" office:value-type="string">
            <text:p text:style-name="Table_20_Contents">8</text:p>
          </table:table-cell>
        </table:table-row>
        <table:table-row>
          <table:table-cell table:style-name="Table5.A1" office:value-type="string">
            <text:p text:style-name="Table_20_Contents">Legal</text:p>
          </table:table-cell>
          <table:table-cell table:style-name="Table5.A1" office:value-type="string">
            <text:p text:style-name="Table_20_Contents">9</text:p>
          </table:table-cell>
        </table:table-row>
        <table:table-row>
          <table:table-cell table:style-name="Table5.A1" office:value-type="string">
            <text:p text:style-name="Table_20_Contents">Código atual</text:p>
          </table:table-cell>
          <table:table-cell table:style-name="Table5.A1" office:value-type="string">
            <text:p text:style-name="Table_20_Contents">4</text:p>
          </table:table-cell>
        </table:table-row>
      </table:table>
      <text:p text:style-name="Text_20_body">Mas isso é normal.</text:p>
      <text:p text:style-name="Text_20_body">Você está <text:span text:style-name="Strong_20_Emphasis">no momento certo para estruturar bem o projeto</text:span>.</text:p>
      <text:p text:style-name="Horizontal_20_Line"/>
      <text:h text:style-name="Heading_20_1" text:outline-level="1">🚀 Próximo passo (importante)</text:h>
      <text:p text:style-name="Text_20_body">Agora eu posso te entregar:</text:p>
      <text:h text:style-name="Heading_20_2" text:outline-level="2"><text:soft-page-break/>🔥 BACKEND V2 COMPLETO</text:h>
      <text:p text:style-name="Text_20_body">com:</text:p>
      <text:section text:style-name="Sect1" text:name="Section71">
        <text:p text:style-name="P1"><text:bookmark text:name="code-block-viewer Copy 70"/>Signal Engine</text:p>
        <text:p text:style-name="Preformatted_20_Text">Scanner</text:p>
        <text:p text:style-name="Preformatted_20_Text">Ranking</text:p>
        <text:p text:style-name="Preformatted_20_Text">Cache</text:p>
        <text:p text:style-name="Preformatted_20_Text">API profissional</text:p>
      </text:section>
      <text:p text:style-name="Text_20_body">e também</text:p>
      <text:h text:style-name="Heading_20_2" text:outline-level="2">🔥 ESTRUTURA COMPLETA DO APP</text:h>
      <text:p text:style-name="Text_20_body">Flutter já pronta para:</text:p>
      <text:section text:style-name="Sect1" text:name="Section72">
        <text:p text:style-name="P1"><text:bookmark text:name="code-block-viewer Copy 71"/>feed</text:p>
        <text:p text:style-name="Preformatted_20_Text">stocks</text:p>
        <text:p text:style-name="Preformatted_20_Text">news</text:p>
        <text:p text:style-name="Preformatted_20_Text">community</text:p>
      </text:section>
      <text:p text:style-name="Text_20_body">Tudo pronto para você <text:span text:style-name="Strong_20_Emphasis">copiar para as pastas</text:span>.</text:p>
      <text:p text:style-name="Horizontal_20_Line"/>
      <text:p text:style-name="Text_20_body">Se quiser, no próximo passo eu já te entrego a <text:span text:style-name="Strong_20_Emphasis">ENGINE V7 COMPLETA do StockNewsBR (nível hedge fund)</text:span> que vai virar o coração do sistema. 🚀</text:p>
      <text:p text:style-name="P2">Sources</text:p>
      <text:p text:style-name="P2"><text:soft-page-break/><draw:frame draw:style-name="fr1" draw:name="Image7" text:anchor-type="as-char" svg:width="11.6146in" svg:height="11.8335in" draw:z-index="6"><draw:image xlink:href="https://chatgpt.com/backend-api/estuary/content?id=file_000000009828720eaf297113129e531b&amp;ts=492501&amp;p=fs&amp;cid=1&amp;sig=b1db420e4a59f768499569715460d49d09e2f5a4f3360dac3ffbab70c21390a2&amp;v=0" xlink:type="simple" xlink:show="embed" xlink:actuate="onLoad"/><svg:title>Uploaded image</svg:title></draw:frame></text:p>
      <text:p text:style-name="P2"><text:soft-page-break/><draw:frame draw:style-name="fr1" draw:name="Image8" text:anchor-type="as-char" svg:width="7.3543in" svg:height="10.0728in" draw:z-index="7"><draw:image xlink:href="https://chatgpt.com/backend-api/estuary/content?id=file_00000000a2b471f5bbd616d6f8d9362e&amp;ts=492501&amp;p=fs&amp;cid=1&amp;sig=023ba9dc0cf0e99a794969b5c15c4b92280d3b1905f673b81bee3694f14c59d7&amp;v=0" xlink:type="simple" xlink:show="embed" xlink:actuate="onLoad"/><svg:title>Uploaded image</svg:title></draw:frame></text:p>
      <text:p text:style-name="P2"><text:soft-page-break/><draw:frame draw:style-name="fr1" draw:name="Image9" text:anchor-type="as-char" svg:width="7.2291in" svg:height="9.5in" draw:z-index="8"><draw:image xlink:href="https://chatgpt.com/backend-api/estuary/content?id=file_00000000f3b471f5a2d8c5725a09b709&amp;ts=492501&amp;p=fs&amp;cid=1&amp;sig=e2d549dc832382f79c8cb932c6f6541e22a0baf784a4dc0120c33a5f4614badf&amp;v=0" xlink:type="simple" xlink:show="embed" xlink:actuate="onLoad"/><svg:title>Uploaded image</svg:title></draw:frame></text:p>
      <text:p text:style-name="Text_20_body"><text:soft-page-break/>sera q nao esta na outra pasta o lib? e' esse q vc esta procurando??</text:p>
      <text:p text:style-name="Text_20_body">Boa pergunta — e <text:span text:style-name="Strong_20_Emphasis">não</text:span>, essa pasta que você abriu <text:span text:style-name="Strong_20_Emphasis">não é a que precisamos</text:span>. 👍</text:p>
      <text:p text:style-name="Text_20_body">A pasta que aparece na imagem é:</text:p>
      <text:section text:style-name="Sect1" text:name="Section73">
        <text:p text:style-name="P1"><text:bookmark text:name="code-block-viewer Copy 72"/>stocknewsbr-backend/venv/Lib/site-packages</text:p>
      </text:section>
      <text:p text:style-name="Text_20_body">Isso significa:</text:p>
      <text:section text:style-name="Sect1" text:name="Section74">
        <text:p text:style-name="P1"><text:bookmark text:name="code-block-viewer Copy 73"/>venv = ambiente virtual Python</text:p>
        <text:p text:style-name="Preformatted_20_Text">site-packages = bibliotecas instaladas</text:p>
      </text:section>
      <text:p text:style-name="Text_20_body">Ou seja, ali estão apenas <text:span text:style-name="Strong_20_Emphasis">pacotes do Python</text:span>, por exemplo:</text:p>
      <text:list text:style-name="L3">
        <text:list-item>
          <text:p text:style-name="P5">fastapi</text:p>
        </text:list-item>
        <text:list-item>
          <text:p text:style-name="P5">pandas</text:p>
        </text:list-item>
        <text:list-item>
          <text:p text:style-name="P5">pandas_ta</text:p>
        </text:list-item>
        <text:list-item>
          <text:p text:style-name="P5">numpy</text:p>
        </text:list-item>
        <text:list-item>
          <text:p text:style-name="P5">sqlalchemy</text:p>
        </text:list-item>
        <text:list-item>
          <text:p text:style-name="P5">stripe</text:p>
        </text:list-item>
        <text:list-item>
          <text:p text:style-name="P5">telegram</text:p>
        </text:list-item>
        <text:list-item>
          <text:p text:style-name="P5">yfinance</text:p>
        </text:list-item>
      </text:list>
      <text:p text:style-name="Text_20_body">Esses <text:span text:style-name="Strong_20_Emphasis">não são seus códigos</text:span>, são <text:span text:style-name="Strong_20_Emphasis">bibliotecas instaladas automaticamente</text:span>.</text:p>
      <text:p text:style-name="Text_20_body">Por isso você está vendo centenas de pastas como:</text:p>
      <text:section text:style-name="Sect1" text:name="Section75">
        <text:p text:style-name="P1"><text:bookmark text:name="code-block-viewer Copy 74"/>fastapi</text:p>
        <text:p text:style-name="Preformatted_20_Text">pandas</text:p>
        <text:p text:style-name="Preformatted_20_Text">numpy</text:p>
        <text:p text:style-name="Preformatted_20_Text">uvicorn</text:p>
        <text:p text:style-name="Preformatted_20_Text">requests</text:p>
        <text:p text:style-name="Preformatted_20_Text">sqlalchemy</text:p>
      </text:section>
      <text:p text:style-name="Text_20_body">Nada disso precisa ser editado.</text:p>
      <text:p text:style-name="Horizontal_20_Line"/>
      <text:h text:style-name="Heading_20_1" text:outline-level="1">📂 Onde fica o código que precisamos revisar</text:h>
      <text:p text:style-name="Text_20_body">No backend, o que importa normalmente fica assim:</text:p>
      <text:section text:style-name="Sect1" text:name="Section76">
        <text:p text:style-name="P1"><text:bookmark text:name="code-block-viewer Copy 75"/>stocknewsbr-backend/</text:p>
        <text:p text:style-name="Preformatted_20_Text">main.py</text:p>
        <text:p text:style-name="Preformatted_20_Text">bot.py</text:p>
        <text:p text:style-name="Preformatted_20_Text">requirements.txt</text:p>
        <text:p text:style-name="Preformatted_20_Text">engine/</text:p>
        <text:p text:style-name="Preformatted_20_Text">api/</text:p>
        <text:p text:style-name="Preformatted_20_Text">models/</text:p>
      </text:section>
      <text:p text:style-name="Text_20_body">Ou algo parecido.</text:p>
      <text:p text:style-name="Text_20_body">Então precisamos abrir:</text:p>
      <text:section text:style-name="Sect1" text:name="Section77">
        <text:p text:style-name="P1"><text:bookmark text:name="code-block-viewer Copy 76"/><text:soft-page-break/>stocknewsbr-backend/</text:p>
      </text:section>
      <text:p text:style-name="Text_20_body">não:</text:p>
      <text:section text:style-name="Sect1" text:name="Section78">
        <text:p text:style-name="P1"><text:bookmark text:name="code-block-viewer Copy 77"/>stocknewsbr-backend/venv/</text:p>
      </text:section>
      <text:p text:style-name="Horizontal_20_Line"/>
      <text:h text:style-name="Heading_20_1" text:outline-level="1">📍 Como encontrar rapidamente</text:h>
      <text:p text:style-name="Text_20_body">Volte uma pasta para cima:</text:p>
      <text:section text:style-name="Sect1" text:name="Section79">
        <text:p text:style-name="P1"><text:bookmark text:name="code-block-viewer Copy 78"/>C:\Users\dcima\stocknewsbr-backend</text:p>
      </text:section>
      <text:p text:style-name="Text_20_body">E procure arquivos como:</text:p>
      <text:section text:style-name="Sect1" text:name="Section80">
        <text:p text:style-name="P1"><text:bookmark text:name="code-block-viewer Copy 79"/>main.py</text:p>
        <text:p text:style-name="Preformatted_20_Text">bot.py</text:p>
        <text:p text:style-name="Preformatted_20_Text">engine.py</text:p>
        <text:p text:style-name="Preformatted_20_Text">scanner.py</text:p>
        <text:p text:style-name="Preformatted_20_Text">signals.py</text:p>
      </text:section>
      <text:p text:style-name="Text_20_body">Esses são os que contêm <text:span text:style-name="Strong_20_Emphasis">seu código real</text:span>.</text:p>
      <text:p text:style-name="Horizontal_20_Line"/>
      <text:h text:style-name="Heading_20_1" text:outline-level="1">📱 Sobre o APP</text:h>
      <text:p text:style-name="Text_20_body">No projeto Flutter, você já mostrou:</text:p>
      <text:section text:style-name="Sect1" text:name="Section81">
        <text:p text:style-name="P1"><text:bookmark text:name="code-block-viewer Copy 80"/>stocknewsbr/lib/main.dart</text:p>
      </text:section>
      <text:p text:style-name="Text_20_body">E vimos que o <text:span text:style-name="Source_20_Text">lib</text:span> do app tem apenas:</text:p>
      <text:section text:style-name="Sect1" text:name="Section82">
        <text:p text:style-name="P1"><text:bookmark text:name="code-block-viewer Copy 81"/>main.dart</text:p>
      </text:section>
      <text:p text:style-name="Text_20_body">Ou seja:</text:p>
      <text:section text:style-name="Sect1" text:name="Section83">
        <text:p text:style-name="P1"><text:bookmark text:name="code-block-viewer Copy 82"/>APP ainda não foi desenvolvido</text:p>
      </text:section>
      <text:p text:style-name="Text_20_body">O que é normal.</text:p>
      <text:p text:style-name="Horizontal_20_Line"/>
      <text:h text:style-name="Heading_20_1" text:outline-level="1">🎯 Conclusão</text:h>
      <text:p text:style-name="Text_20_body">Você tem <text:span text:style-name="Strong_20_Emphasis">duas coisas separadas</text:span>:</text:p>
      <text:h text:style-name="Heading_20_3" text:outline-level="3">1️⃣ APP (Flutter)</text:h>
      <text:section text:style-name="Sect1" text:name="Section84">
        <text:p text:style-name="P1"><text:bookmark text:name="code-block-viewer Copy 83"/>stocknewsbr/</text:p>
        <text:p text:style-name="Preformatted_20_Text"><text:s text:c="3"/>lib/</text:p>
        <text:p text:style-name="Preformatted_20_Text"><text:s text:c="6"/>main.dart</text:p>
      </text:section>
      <text:p text:style-name="Horizontal_20_Line"/>
      <text:h text:style-name="Heading_20_3" text:outline-level="3">2️⃣ Backend (FastAPI)</text:h>
      <text:section text:style-name="Sect1" text:name="Section85">
        <text:p text:style-name="P1"><text:bookmark text:name="code-block-viewer Copy 84"/>stocknewsbr-backend/</text:p>
        <text:p text:style-name="Preformatted_20_Text"><text:s text:c="3"/>main.py</text:p>
        <text:p text:style-name="Preformatted_20_Text"><text:soft-page-break/><text:s text:c="3"/>bot.py</text:p>
      </text:section>
      <text:p text:style-name="Horizontal_20_Line"/>
      <text:h text:style-name="Heading_20_1" text:outline-level="1">📌 O que eu preciso ver agora</text:h>
      <text:p text:style-name="Text_20_body">Abra esta pasta:</text:p>
      <text:section text:style-name="Sect1" text:name="Section86">
        <text:p text:style-name="P1"><text:bookmark text:name="code-block-viewer Copy 85"/>stocknewsbr-backend/</text:p>
      </text:section>
      <text:p text:style-name="Text_20_body">e mande print dela.</text:p>
      <text:p text:style-name="Text_20_body">Quero ver se aparecem arquivos como:</text:p>
      <text:section text:style-name="Sect1" text:name="Section87">
        <text:p text:style-name="P1"><text:bookmark text:name="code-block-viewer Copy 86"/>main.py</text:p>
        <text:p text:style-name="Preformatted_20_Text">bot.py</text:p>
        <text:p text:style-name="Preformatted_20_Text">engine.py</text:p>
        <text:p text:style-name="Preformatted_20_Text">scanner.py</text:p>
      </text:section>
      <text:p text:style-name="Text_20_body">Assim consigo revisar <text:span text:style-name="Strong_20_Emphasis">100% do backend real</text:span>.</text:p>
      <text:p text:style-name="Horizontal_20_Line"/>
      <text:p text:style-name="Text_20_body">💡 E já adianto uma coisa importante:<text:line-break/>Seu projeto está <text:span text:style-name="Strong_20_Emphasis">no ponto perfeito para estruturarmos a arquitetura profissional completa</text:span> (APP + API + Engine + Comunidade). Isso vai evitar muitos problemas depois. 🚀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8:57:24.951000000</meta:creation-date>
    <dc:date>2026-03-08T18:58:07.269000000</dc:date>
    <meta:editing-duration>PT42S</meta:editing-duration>
    <meta:editing-cycles>1</meta:editing-cycles>
    <meta:document-statistic meta:table-count="5" meta:image-count="9" meta:object-count="0" meta:page-count="27" meta:paragraph-count="643" meta:word-count="1539" meta:character-count="9787" meta:non-whitespace-character-count="8652"/>
    <meta:generator>EasyOffice/7.6.2.1.0$Windows_X86_64 LibreOffice_project/0bc4d647150f05f02b71ccb5539a4012b57f1faf</meta:generator>
  </office:meta>
</office:document-meta>
</file>