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📚 education.html (VERSÃO FINAL COMPLETA) </text:p>
      <text:p text:style-name="Standard"/>
      <text:p text:style-name="Standard">&lt;h1&gt;📚 Ajuda Educacional para o Trader&lt;/h1&gt;</text:p>
      <text:p text:style-name="Standard"/>
      <text:p text:style-name="Standard">&lt;p&gt;</text:p>
      <text:p text:style-name="Standard">Bem-vindo ao &lt;strong&gt;StockNewsBR&lt;/strong&gt; 🚀</text:p>
      <text:p text:style-name="Standard">&lt;/p&gt;</text:p>
      <text:p text:style-name="Standard"/>
      <text:p text:style-name="Standard">&lt;p&gt;</text:p>
      <text:p text:style-name="Standard">Nossa plataforma utiliza &lt;strong&gt;modelos quantitativos avançados&lt;/strong&gt;, </text:p>
      <text:p text:style-name="Standard">algoritmos de &lt;strong&gt;Inteligência Artificial&lt;/strong&gt; e ferramentas profissionais </text:p>
      <text:p text:style-name="Standard">utilizadas em mesas institucionais e &lt;strong&gt;Hedge Funds dos Estados Unidos&lt;/strong&gt;.</text:p>
      <text:p text:style-name="Standard">&lt;/p&gt;</text:p>
      <text:p text:style-name="Standard"/>
      <text:p text:style-name="Standard">&lt;p&gt;</text:p>
      <text:p text:style-name="Standard">Essas tecnologias analisam grandes volumes de dados do mercado em tempo real,</text:p>
      <text:p text:style-name="Standard">identificando padrões que muitas vezes não são visíveis para o trader comum.</text:p>
      <text:p text:style-name="Standard">&lt;/p&gt;</text:p>
      <text:p text:style-name="Standard"/>
      <text:p text:style-name="Standard">&lt;p&gt;</text:p>
      <text:p text:style-name="Standard">Mesmo utilizando tecnologia sofisticada, nosso objetivo é tornar tudo</text:p>
      <text:p text:style-name="Standard">&lt;strong&gt;simples e fácil de entender&lt;/strong&gt; para qualquer trader. 📊</text:p>
      <text:p text:style-name="Standard">&lt;/p&gt;</text:p>
      <text:p text:style-name="Standard"/>
      <text:p text:style-name="Standard">&lt;hr&gt;</text:p>
      <text:p text:style-name="Standard"/>
      <text:p text:style-name="Standard"/>
      <text:p text:style-name="Standard">&lt;h2&gt;🧠 IA Heat Map&lt;/h2&gt;</text:p>
      <text:p text:style-name="Standard"/>
      <text:p text:style-name="Standard">&lt;p&gt;</text:p>
      <text:p text:style-name="Standard">Mostra quais ativos estão mais fortes ou mais fracos no mercado.</text:p>
      <text:p text:style-name="Standard">&lt;/p&gt;</text:p>
      <text:p text:style-name="Standard"/>
      <text:p text:style-name="Standard">&lt;p&gt;</text:p>
      <text:p text:style-name="Standard">🟢 Verde = força compradora <text:s/></text:p>
      <text:p text:style-name="Standard">🔴 Vermelho = pressão vendedora</text:p>
      <text:p text:style-name="Standard">&lt;/p&gt;</text:p>
      <text:p text:style-name="Standard"/>
      <text:p text:style-name="Standard">&lt;p&gt;</text:p>
      <text:p text:style-name="Standard">Exemplo: <text:s/></text:p>
      <text:p text:style-name="Standard">Se PETR4 aparece bem verde no Heat Map, significa que o ativo está ganhando força no momento. 📈</text:p>
      <text:p text:style-name="Standard">&lt;/p&gt;</text:p>
      <text:p text:style-name="Standard"/>
      <text:p text:style-name="Standard">&lt;hr&gt;</text:p>
      <text:p text:style-name="Standard"/>
      <text:p text:style-name="Standard"/>
      <text:p text:style-name="Standard">&lt;h2&gt;⚡ IA Radar&lt;/h2&gt;</text:p>
      <text:p text:style-name="Standard"/>
      <text:p text:style-name="Standard">&lt;p&gt;</text:p>
      <text:p text:style-name="Standard"><text:soft-page-break/>Detecta ativos que começaram a se movimentar rapidamente no mercado.</text:p>
      <text:p text:style-name="Standard">&lt;/p&gt;</text:p>
      <text:p text:style-name="Standard"/>
      <text:p text:style-name="Standard">&lt;p&gt;</text:p>
      <text:p text:style-name="Standard">Funciona como um radar que encontra oportunidades antes da maioria dos traders.</text:p>
      <text:p text:style-name="Standard">&lt;/p&gt;</text:p>
      <text:p text:style-name="Standard"/>
      <text:p text:style-name="Standard">&lt;p&gt;</text:p>
      <text:p text:style-name="Standard">Exemplo: <text:s/></text:p>
      <text:p text:style-name="Standard">Uma ação sobe rapidamente com aumento de volume. <text:s/></text:p>
      <text:p text:style-name="Standard">O Radar identifica esse movimento imediatamente. ⚡</text:p>
      <text:p text:style-name="Standard">&lt;/p&gt;</text:p>
      <text:p text:style-name="Standard"/>
      <text:p text:style-name="Standard">&lt;hr&gt;</text:p>
      <text:p text:style-name="Standard"/>
      <text:p text:style-name="Standard"/>
      <text:p text:style-name="Standard">&lt;h2&gt;🎯 IA Breakout Probability&lt;/h2&gt;</text:p>
      <text:p text:style-name="Standard"/>
      <text:p text:style-name="Standard">&lt;p&gt;</text:p>
      <text:p text:style-name="Standard">Identifica quando um ativo está próximo de romper uma resistência importante.</text:p>
      <text:p text:style-name="Standard">&lt;/p&gt;</text:p>
      <text:p text:style-name="Standard"/>
      <text:p text:style-name="Standard">&lt;p&gt;</text:p>
      <text:p text:style-name="Standard">Breakout significa que o preço pode iniciar uma tendência forte.</text:p>
      <text:p text:style-name="Standard">&lt;/p&gt;</text:p>
      <text:p text:style-name="Standard"/>
      <text:p text:style-name="Standard">&lt;p&gt;</text:p>
      <text:p text:style-name="Standard">Exemplo: <text:s/></text:p>
      <text:p text:style-name="Standard">Um ativo ficou vários dias entre 10 e 10.20. <text:s/></text:p>
      <text:p text:style-name="Standard">Se romper 10.20 com volume, pode iniciar um movimento forte de alta. 🚀</text:p>
      <text:p text:style-name="Standard">&lt;/p&gt;</text:p>
      <text:p text:style-name="Standard"/>
      <text:p text:style-name="Standard">&lt;hr&gt;</text:p>
      <text:p text:style-name="Standard"/>
      <text:p text:style-name="Standard"/>
      <text:p text:style-name="Standard">&lt;h2&gt;🟣 IA Volatility Squeeze&lt;/h2&gt;</text:p>
      <text:p text:style-name="Standard"/>
      <text:p text:style-name="Standard">&lt;p&gt;</text:p>
      <text:p text:style-name="Standard">Detecta momentos em que a volatilidade do mercado está muito comprimida.</text:p>
      <text:p text:style-name="Standard">&lt;/p&gt;</text:p>
      <text:p text:style-name="Standard"/>
      <text:p text:style-name="Standard">&lt;p&gt;</text:p>
      <text:p text:style-name="Standard">Quando a volatilidade fica baixa por muito tempo, geralmente ocorre um movimento forte depois.</text:p>
      <text:p text:style-name="Standard">&lt;/p&gt;</text:p>
      <text:p text:style-name="Standard"/>
      <text:p text:style-name="Standard">&lt;p&gt;</text:p>
      <text:p text:style-name="Standard">Exemplo: <text:s/></text:p>
      <text:p text:style-name="Standard">O preço fica andando de lado por vários dias. <text:s/></text:p>
      <text:p text:style-name="Standard">Depois ocorre uma forte expansão de volatilidade. 💥</text:p>
      <text:p text:style-name="Standard"><text:soft-page-break/>&lt;/p&gt;</text:p>
      <text:p text:style-name="Standard"/>
      <text:p text:style-name="Standard">&lt;hr&gt;</text:p>
      <text:p text:style-name="Standard"/>
      <text:p text:style-name="Standard"/>
      <text:p text:style-name="Standard">&lt;h2&gt;🏦 IA Institutional Flow&lt;/h2&gt;</text:p>
      <text:p text:style-name="Standard"/>
      <text:p text:style-name="Standard">&lt;p&gt;</text:p>
      <text:p text:style-name="Standard">Identifica quando investidores institucionais estão entrando no mercado.</text:p>
      <text:p text:style-name="Standard">&lt;/p&gt;</text:p>
      <text:p text:style-name="Standard"/>
      <text:p text:style-name="Standard">&lt;p&gt;</text:p>
      <text:p text:style-name="Standard">Instituições movimentam grandes volumes e muitas vezes iniciam movimentos importantes no preço.</text:p>
      <text:p text:style-name="Standard">&lt;/p&gt;</text:p>
      <text:p text:style-name="Standard"/>
      <text:p text:style-name="Standard">&lt;p&gt;</text:p>
      <text:p text:style-name="Standard">Exemplo: <text:s/></text:p>
      <text:p text:style-name="Standard">Um ativo começa a subir com volume muito acima da média. <text:s/></text:p>
      <text:p text:style-name="Standard">Isso indica possível entrada institucional. 🏦</text:p>
      <text:p text:style-name="Standard">&lt;/p&gt;</text:p>
      <text:p text:style-name="Standard"/>
      <text:p text:style-name="Standard">&lt;hr&gt;</text:p>
      <text:p text:style-name="Standard"/>
      <text:p text:style-name="Standard"/>
      <text:p text:style-name="Standard">&lt;h2&gt;💰 IA Smart Money&lt;/h2&gt;</text:p>
      <text:p text:style-name="Standard"/>
      <text:p text:style-name="Standard">&lt;p&gt;</text:p>
      <text:p text:style-name="Standard">Busca sinais de movimentação de grandes players antes de movimentos importantes no mercado.</text:p>
      <text:p text:style-name="Standard">&lt;/p&gt;</text:p>
      <text:p text:style-name="Standard"/>
      <text:p text:style-name="Standard">&lt;p&gt;</text:p>
      <text:p text:style-name="Standard">É a busca da IA de seguir o chamado &lt;strong&gt;"dinheiro inteligente"&lt;/strong&gt;.</text:p>
      <text:p text:style-name="Standard">&lt;/p&gt;</text:p>
      <text:p text:style-name="Standard"/>
      <text:p text:style-name="Standard">&lt;p&gt;</text:p>
      <text:p text:style-name="Standard">Exemplo: <text:s/></text:p>
      <text:p text:style-name="Standard">Volume crescente antes de um movimento forte de alta ou baixa. 📊</text:p>
      <text:p text:style-name="Standard">&lt;/p&gt;</text:p>
      <text:p text:style-name="Standard"/>
      <text:p text:style-name="Standard">&lt;hr&gt;</text:p>
      <text:p text:style-name="Standard"/>
      <text:p text:style-name="Standard"/>
      <text:p text:style-name="Standard">&lt;h2&gt;🏛 IA Accumulation&lt;/h2&gt;</text:p>
      <text:p text:style-name="Standard"/>
      <text:p text:style-name="Standard">&lt;p&gt;</text:p>
      <text:p text:style-name="Standard">Detecta quando um ativo está sendo acumulado lentamente por grandes investidores.</text:p>
      <text:p text:style-name="Standard">&lt;/p&gt;</text:p>
      <text:p text:style-name="Standard"/>
      <text:p text:style-name="Standard">&lt;p&gt;</text:p>
      <text:p text:style-name="Standard"><text:soft-page-break/>Acumulação acontece quando instituições compram aos poucos sem chamar atenção do mercado.</text:p>
      <text:p text:style-name="Standard">&lt;/p&gt;</text:p>
      <text:p text:style-name="Standard"/>
      <text:p text:style-name="Standard">&lt;p&gt;</text:p>
      <text:p text:style-name="Standard">Exemplo: <text:s/></text:p>
      <text:p text:style-name="Standard">Preço relativamente estável, mas com aumento gradual de volume. 📈</text:p>
      <text:p text:style-name="Standard">&lt;/p&gt;</text:p>
      <text:p text:style-name="Standard"/>
      <text:p text:style-name="Standard">&lt;hr&gt;</text:p>
      <text:p text:style-name="Standard"/>
      <text:p text:style-name="Standard"/>
      <text:p text:style-name="Standard">&lt;h2&gt;🧲 IA Liquidity Sweep&lt;/h2&gt;</text:p>
      <text:p text:style-name="Standard"/>
      <text:p text:style-name="Standard">&lt;p&gt;</text:p>
      <text:p text:style-name="Standard">Detecta quando o mercado busca liquidez antes de mudar de direção.</text:p>
      <text:p text:style-name="Standard">&lt;/p&gt;</text:p>
      <text:p text:style-name="Standard"/>
      <text:p text:style-name="Standard">&lt;p&gt;</text:p>
      <text:p text:style-name="Standard">Isso acontece quando o preço rompe rapidamente um nível e depois volta.</text:p>
      <text:p text:style-name="Standard">&lt;/p&gt;</text:p>
      <text:p text:style-name="Standard"/>
      <text:p text:style-name="Standard">&lt;p&gt;</text:p>
      <text:p text:style-name="Standard">Exemplo: <text:s/></text:p>
      <text:p text:style-name="Standard">O preço rompe o topo, ativa stops de traders e depois retorna para baixo. 🧲</text:p>
      <text:p text:style-name="Standard">&lt;/p&gt;</text:p>
      <text:p text:style-name="Standard"/>
      <text:p text:style-name="Standard">&lt;hr&gt;</text:p>
      <text:p text:style-name="Standard"/>
      <text:p text:style-name="Standard"/>
      <text:p text:style-name="Standard">&lt;h2&gt;🗺 IA Liquidity Map&lt;/h2&gt;</text:p>
      <text:p text:style-name="Standard"/>
      <text:p text:style-name="Standard">&lt;p&gt;</text:p>
      <text:p text:style-name="Standard">Mostra onde existe maior concentração de liquidez no mercado.</text:p>
      <text:p text:style-name="Standard">&lt;/p&gt;</text:p>
      <text:p text:style-name="Standard"/>
      <text:p text:style-name="Standard">&lt;p&gt;</text:p>
      <text:p text:style-name="Standard">Esses pontos costumam atrair o preço.</text:p>
      <text:p text:style-name="Standard">&lt;/p&gt;</text:p>
      <text:p text:style-name="Standard"/>
      <text:p text:style-name="Standard">&lt;p&gt;</text:p>
      <text:p text:style-name="Standard">Exemplo: <text:s/></text:p>
      <text:p text:style-name="Standard">Muitos stops acima de um determinado nível de preço. <text:s/></text:p>
      <text:p text:style-name="Standard">O mercado tende a ir até esse nível antes de continuar o movimento. 🗺</text:p>
      <text:p text:style-name="Standard">&lt;/p&gt;</text:p>
      <text:p text:style-name="Standard"/>
      <text:p text:style-name="Standard">&lt;hr&gt;</text:p>
      <text:p text:style-name="Standard"/>
      <text:p text:style-name="Standard"/>
      <text:p text:style-name="Standard">&lt;h2&gt;📊 IA Market Regime&lt;/h2&gt;</text:p>
      <text:p text:style-name="Standard"><text:soft-page-break/></text:p>
      <text:p text:style-name="Standard">&lt;p&gt;</text:p>
      <text:p text:style-name="Standard">Mostra qual é o tipo de mercado atual.</text:p>
      <text:p text:style-name="Standard">&lt;/p&gt;</text:p>
      <text:p text:style-name="Standard"/>
      <text:p text:style-name="Standard">&lt;p&gt;</text:p>
      <text:p text:style-name="Standard">Pode indicar:</text:p>
      <text:p text:style-name="Standard">&lt;/p&gt;</text:p>
      <text:p text:style-name="Standard"/>
      <text:p text:style-name="Standard">&lt;ul&gt;</text:p>
      <text:p text:style-name="Standard">&lt;li&gt;📈 Tendência de alta&lt;/li&gt;</text:p>
      <text:p text:style-name="Standard">&lt;li&gt;📉 Tendência de baixa&lt;/li&gt;</text:p>
      <text:p text:style-name="Standard">&lt;li&gt;➡ Mercado lateral&lt;/li&gt;</text:p>
      <text:p text:style-name="Standard">&lt;/ul&gt;</text:p>
      <text:p text:style-name="Standard"/>
      <text:p text:style-name="Standard">&lt;p&gt;</text:p>
      <text:p text:style-name="Standard">Isso ajuda o trader a escolher a estratégia correta.</text:p>
      <text:p text:style-name="Standard">&lt;/p&gt;</text:p>
      <text:p text:style-name="Standard"/>
      <text:p text:style-name="Standard">&lt;hr&gt;</text:p>
      <text:p text:style-name="Standard"/>
      <text:p text:style-name="Standard"/>
      <text:p text:style-name="Standard">&lt;h2&gt;⭐ IA Master Score&lt;/h2&gt;</text:p>
      <text:p text:style-name="Standard"/>
      <text:p text:style-name="Standard">&lt;p&gt;</text:p>
      <text:p text:style-name="Standard">É a pontuação geral do sistema.</text:p>
      <text:p text:style-name="Standard">&lt;/p&gt;</text:p>
      <text:p text:style-name="Standard"/>
      <text:p text:style-name="Standard">&lt;p&gt;</text:p>
      <text:p text:style-name="Standard">Combina diversas análises da IA para classificar oportunidades no mercado.</text:p>
      <text:p text:style-name="Standard">&lt;/p&gt;</text:p>
      <text:p text:style-name="Standard"/>
      <text:p text:style-name="Standard">&lt;p&gt;</text:p>
      <text:p text:style-name="Standard">Exemplo:</text:p>
      <text:p text:style-name="Standard">&lt;/p&gt;</text:p>
      <text:p text:style-name="Standard"/>
      <text:p text:style-name="Standard">&lt;ul&gt;</text:p>
      <text:p text:style-name="Standard">&lt;li&gt;Score 90 → oportunidade forte&lt;/li&gt;</text:p>
      <text:p text:style-name="Standard">&lt;li&gt;Score 70 → oportunidade moderada&lt;/li&gt;</text:p>
      <text:p text:style-name="Standard">&lt;li&gt;Score abaixo de 50 → baixa probabilidade&lt;/li&gt;</text:p>
      <text:p text:style-name="Standard">&lt;/ul&gt;</text:p>
      <text:p text:style-name="Standard"/>
      <text:p text:style-name="Standard">&lt;hr&gt;</text:p>
      <text:p text:style-name="Standard"/>
      <text:p text:style-name="Standard"/>
      <text:p text:style-name="Standard">&lt;h2&gt;📈 IA Gráfico&lt;/h2&gt;</text:p>
      <text:p text:style-name="Standard"/>
      <text:p text:style-name="Standard">&lt;p&gt;</text:p>
      <text:p text:style-name="Standard">Mostra o gráfico do ativo com sinais gerados pelas IAs do sistema.</text:p>
      <text:p text:style-name="Standard"><text:soft-page-break/>&lt;/p&gt;</text:p>
      <text:p text:style-name="Standard"/>
      <text:p text:style-name="Standard">&lt;p&gt;</text:p>
      <text:p text:style-name="Standard">No gráfico podem aparecer sinais como:</text:p>
      <text:p text:style-name="Standard">&lt;/p&gt;</text:p>
      <text:p text:style-name="Standard"/>
      <text:p text:style-name="Standard">&lt;ul&gt;</text:p>
      <text:p text:style-name="Standard">&lt;li&gt;📈 BUY&lt;/li&gt;</text:p>
      <text:p text:style-name="Standard">&lt;li&gt;📉 SHORT&lt;/li&gt;</text:p>
      <text:p text:style-name="Standard">&lt;li&gt;⚠ Encerrar posição&lt;/li&gt;</text:p>
      <text:p text:style-name="Standard">&lt;/ul&gt;</text:p>
      <text:p text:style-name="Standard"/>
      <text:p text:style-name="Standard">&lt;p&gt;</text:p>
      <text:p text:style-name="Standard">Esses sinais ajudam o trader a identificar possíveis pontos de entrada e saída.</text:p>
      <text:p text:style-name="Standard">&lt;/p&gt;</text:p>
      <text:p text:style-name="Standard"/>
      <text:p text:style-name="Standard">&lt;hr&gt;</text:p>
      <text:p text:style-name="Standard"/>
      <text:p text:style-name="P1">&lt;hr&gt;</text:p>
      <text:p text:style-name="P1"/>
      <text:p text:style-name="P1">&lt;h2&gt;🖥️ Versão Web Trader Desk&lt;/h2&gt;</text:p>
      <text:p text:style-name="P1"/>
      <text:p text:style-name="P1">&lt;p&gt;</text:p>
      <text:p text:style-name="P1">A versão &lt;strong&gt;Web Trader Desk&lt;/strong&gt; do StockNewsBR foi desenvolvida para entregar uma experiência de nível profissional, inspirada nos terminais utilizados por traders de ponta nos &lt;strong&gt;Hedge Funds dos USA&lt;/strong&gt;.</text:p>
      <text:p text:style-name="P1">&lt;/p&gt;</text:p>
      <text:p text:style-name="P1"/>
      <text:p text:style-name="P1">&lt;p&gt;</text:p>
      <text:p text:style-name="P1">Combinando &lt;strong&gt;cálculos quantitativos avançados&lt;/strong&gt; e &lt;strong&gt;inteligência artificial&lt;/strong&gt;, a plataforma oferece análises profundas do mercado, velocidade estratégica e suporte tecnológico de última geração. 🤖📊</text:p>
      <text:p text:style-name="P1">&lt;/p&gt;</text:p>
      <text:p text:style-name="P1"/>
      <text:p text:style-name="P1">&lt;p&gt;</text:p>
      <text:p text:style-name="P1">Com suporte a &lt;strong&gt;múltiplos monitores&lt;/strong&gt;, você pode acompanhar diferentes Inteligências Artificiais lado a lado, sem perder nenhuma oportunidade do mercado. 🖥️📈</text:p>
      <text:p text:style-name="P1">&lt;/p&gt;</text:p>
      <text:p text:style-name="P1"/>
      <text:p text:style-name="P1">&lt;p&gt;</text:p>
      <text:p text:style-name="P1">Exemplo de uso com múltiplos monitores:</text:p>
      <text:p text:style-name="P1">&lt;/p&gt;</text:p>
      <text:p text:style-name="P1"/>
      <text:p text:style-name="P1">&lt;ul&gt;</text:p>
      <text:p text:style-name="P1">&lt;li&gt;Monitor 1 → 🧠 IA Heat Map&lt;/li&gt;</text:p>
      <text:p text:style-name="P1">&lt;li&gt;Monitor 2 → ⚡ IA Radar&lt;/li&gt;</text:p>
      <text:p text:style-name="P1">&lt;li&gt;Monitor 3 → 🎯 IA Breakout Probability&lt;/li&gt;</text:p>
      <text:p text:style-name="P1">&lt;li&gt;Monitor 4 → 🟣 IA Volatility Squeeze&lt;/li&gt;</text:p>
      <text:p text:style-name="P1">&lt;li&gt;Monitor 5 → 🏦 IA Institutional Flow&lt;/li&gt;</text:p>
      <text:p text:style-name="P1"><text:soft-page-break/>&lt;li&gt;Monitor 6 → 💰 IA Smart Money&lt;/li&gt;</text:p>
      <text:p text:style-name="P1">&lt;li&gt;Monitor 7 → 🏛 IA Accumulation&lt;/li&gt;</text:p>
      <text:p text:style-name="P1">&lt;li&gt;Monitor 8 → 🧲 IA Liquidity Sweep&lt;/li&gt;</text:p>
      <text:p text:style-name="P1">&lt;li&gt;Monitor 9 → 🗺 IA Liquidity Map&lt;/li&gt;</text:p>
      <text:p text:style-name="P1">&lt;li&gt;Monitor 10 → 📊 IA Market Regime&lt;/li&gt;</text:p>
      <text:p text:style-name="P1">&lt;li&gt;Monitor 11 → ⭐ IA Master Score&lt;/li&gt;</text:p>
      <text:p text:style-name="P1">&lt;li&gt;Monitor 12 → 📈 IA Gráfico&lt;/li&gt;</text:p>
      <text:p text:style-name="P1">&lt;/ul&gt;</text:p>
      <text:p text:style-name="P1"/>
      <text:p text:style-name="P1">&lt;p&gt;</text:p>
      <text:p text:style-name="P1">Com apenas &lt;strong&gt;um monitor&lt;/strong&gt;, você ainda consegue acompanhar várias IAs ao mesmo tempo:</text:p>
      <text:p text:style-name="P1">basta abrir cada módulo da plataforma em &lt;strong&gt;abas diferentes do navegador&lt;/strong&gt; e manter sua visão completa do mercado. 📊</text:p>
      <text:p text:style-name="P1">&lt;/p&gt;</text:p>
      <text:p text:style-name="P1"/>
      <text:p text:style-name="P1">&lt;p&gt;</text:p>
      <text:p text:style-name="P1">Technology 🙂🚀</text:p>
      <text:p text:style-name="Standard"/>
      <text:p text:style-name="Standard"/>
      <text:p text:style-name="Standard">&lt;h2&gt;⚠ Importante&lt;/h2&gt;</text:p>
      <text:p text:style-name="Standard"/>
      <text:p text:style-name="Standard">&lt;p&gt;</text:p>
      <text:p text:style-name="Standard">As análises do StockNewsBR são ferramentas inteligentes automatizadas de apoio para o trader.</text:p>
      <text:p text:style-name="Standard">&lt;/p&gt;</text:p>
      <text:p text:style-name="Standard"/>
      <text:p text:style-name="Standard">&lt;p&gt;</text:p>
      <text:p text:style-name="Standard">A plataforma utiliza modelos quantitativos avançados, inteligência artificial e análise estatística de mercado.</text:p>
      <text:p text:style-name="Standard">&lt;/p&gt;</text:p>
      <text:p text:style-name="Standard"/>
      <text:p text:style-name="Standard">&lt;p&gt;</text:p>
      <text:p text:style-name="Standard">Sempre utilize gestão de risco adequada ao operar no mercado financeiro.</text:p>
      <text:p text:style-name="Standard">&lt;/p&gt;</text:p>
      <text:p text:style-name="Standard"/>
      <text:p text:style-name="Standard">&lt;p&gt;</text:p>
      <text:p text:style-name="Standard">&lt;p&gt;</text:p>
      <text:p text:style-name="Standard">Boas trades! &amp; Sucesso! 🚀📈</text:p>
      <text:p text:style-name="Standard">&lt;/p&gt;</text:p>
      <text:p text:style-name="Standard">&lt;/p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6T13:56:18.565000000</meta:creation-date>
    <dc:date>2026-03-06T14:13:53.49</dc:date>
    <meta:editing-duration>PT1M44S</meta:editing-duration>
    <meta:editing-cycles>2</meta:editing-cycles>
    <meta:generator>EasyOffice/7.6.2.1.0$Windows_X86_64 LibreOffice_project/0bc4d647150f05f02b71ccb5539a4012b57f1faf</meta:generator>
    <dc:creator>Dino Leno</dc:creator>
    <meta:document-statistic meta:table-count="0" meta:image-count="0" meta:object-count="0" meta:page-count="7" meta:paragraph-count="230" meta:word-count="945" meta:character-count="6051" meta:non-whitespace-character-count="5303"/>
  </office:meta>
</office:document-meta>
</file>