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58e6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05f082"/>
    </style:style>
    <style:style style:name="T1" style:family="text">
      <style:text-properties officeooo:rsid="00031232"/>
    </style:style>
    <style:style style:name="T2" style:family="text">
      <style:text-properties officeooo:rsid="0005bf5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⚠️ Aviso legal obrigatório</text:h>
      <text:p text:style-name="Text_20_body">Esse aviso precisa aparecer:</text:p>
      <text:list text:style-name="L1">
        <text:list-item>
          <text:p text:style-name="P2">onboarding</text:p>
        </text:list-item>
        <text:list-item>
          <text:p text:style-name="P2">tela de sinais</text:p>
        </text:list-item>
        <text:list-item>
          <text:p text:style-name="P2">rodapé</text:p>
        </text:list-item>
        <text:list-item>
          <text:p text:style-name="P3">app, Telegram, X (Twitter), Facebook, Google A<text:span text:style-name="T2">pp, Website, publicacoes, etc.. tudo q tenha o nome “StocknewsBR”. </text:span></text:p>
        </text:list-item>
      </text:list>
      <text:p text:style-name="Text_20_body">Texto aprovado:</text:p>
      <text:p text:style-name="Text_20_body"/>
      <text:p text:style-name="P1"><text:span text:style-name="Strong_20_Emphasis">StockNewsBR – Inteligência de Mercado com IA</text:span></text:p>
      <text:p text:style-name="Text_20_body">⚠️ Aviso importante</text:p>
      <text:p text:style-name="Text_20_body">As informações disponibilizadas pelo StockNewsBR possuem caráter exclusivamente educacional e informativo. </text:p>
      <text:p text:style-name="Text_20_body">O StockNewsBR não realiza recomendação personalizada de investimentos e não atua como consultoria financeira. </text:p>
      <text:p text:style-name="P1">Os sinais exibidos pelo StockNewsBR são gerados por <text:span text:style-name="Strong_20_Emphasis">odelos quantitativos, análise estatística e inteligência artificial </text:span><text:span text:style-name="Strong_20_Emphasis"><text:span text:style-name="T1">(IA)</text:span></text:span>, <text:s/>com base em dados históricos e critérios estatísticos.</text:p>
      <text:p text:style-name="Text_20_body">Não constituem recomendação personalizada de investimento.</text:p>
      <text:p text:style-name="Text_20_body">Investimentos no mercado financeiro envolvem riscos e podem resultar em perdas financeiras. </text:p>
      <text:p text:style-name="Text_20_body">Antes de tomar qualquer decisão de investimento, avalie seu perfil de risco e, se necessário, consulte um profissional habilitado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8T16:41:14.253000000</meta:creation-date>
    <dc:date>2026-03-08T17:50:00.626000000</dc:date>
    <meta:editing-duration>PT6M57S</meta:editing-duration>
    <meta:editing-cycles>7</meta:editing-cycles>
    <meta:generator>EasyOffice/7.6.2.1.0$Windows_X86_64 LibreOffice_project/0bc4d647150f05f02b71ccb5539a4012b57f1faf</meta:generator>
    <meta:document-statistic meta:table-count="0" meta:image-count="0" meta:object-count="0" meta:page-count="1" meta:paragraph-count="15" meta:word-count="130" meta:character-count="956" meta:non-whitespace-character-count="838"/>
  </office:meta>
</office:document-meta>
</file>