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5b7b9"/>
    </style:style>
    <style:style style:name="P2" style:family="paragraph" style:parent-style-name="Heading_20_1">
      <style:text-properties officeooo:paragraph-rsid="0005b7b9"/>
    </style:style>
    <style:style style:name="P3" style:family="paragraph" style:parent-style-name="Preformatted_20_Text">
      <style:paragraph-properties fo:margin-left="0in" fo:margin-right="0in" fo:text-indent="0in" style:auto-text-indent="false"/>
    </style:style>
    <style:style style:name="P4" style:family="paragraph" style:parent-style-name="Text_20_body">
      <style:text-properties officeooo:paragraph-rsid="00083fa8"/>
    </style:style>
    <style:style style:name="P5" style:family="paragraph" style:parent-style-name="Text_20_body" style:list-style-name="L1"/>
    <style:style style:name="T1" style:family="text">
      <style:text-properties officeooo:rsid="0009c9c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📰 Produto 5 — Página de notícias</text:h>
      <text:p text:style-name="P4"><text:span text:style-name="Strong_20_Emphasis">StockNewsBR – Inteligência de Mercado com IA</text:span></text:p>
      <text:p text:style-name="Text_20_body">Inspirado no que você mostrou nas imagens.</text:p>
      <text:p text:style-name="Text_20_body">Página:</text:p>
      <text:section text:style-name="Sect1" text:name="code-block-viewer">
        <text:p text:style-name="P3">/news</text:p>
      </text:section>
      <text:p text:style-name="Text_20_body">Conteúdo:</text:p>
      <text:list text:style-name="L1">
        <text:list-item>
          <text:p text:style-name="P5">notícias da B3</text:p>
        </text:list-item>
        <text:list-item>
          <text:p text:style-name="P5">macroeconomia</text:p>
        </text:list-item>
        <text:list-item>
          <text:p text:style-name="P5">empresas</text:p>
        </text:list-item>
        <text:list-item>
          <text:p text:style-name="P5">mercado global <text:span text:style-name="T1">da BDR’s somente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10T19:51:14.917000000</dc:date>
    <meta:editing-duration>PT3M8S</meta:editing-duration>
    <meta:editing-cycles>7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0" meta:word-count="36" meta:character-count="209" meta:non-whitespace-character-count="185"/>
  </office:meta>
</office:document-meta>
</file>