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text-properties officeooo:paragraph-rsid="0007622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🎯 Estratégia de crescimento</text:h>
      <text:p text:style-name="P3"><text:span text:style-name="Strong_20_Emphasis">StockNewsBR – Inteligência de Mercado com IA</text:span></text:p>
      <text:p text:style-name="Text_20_body">Fase 1</text:p>
      <text:p text:style-name="Text_20_body">Produto pronto</text:p>
      <text:p text:style-name="Text_20_body">Fase 2</text:p>
      <text:p text:style-name="Text_20_body">Crescimento orgânico</text:p>
      <text:list text:style-name="L1">
        <text:list-item>
          <text:p text:style-name="P1">ranking diário de oportunidades</text:p>
        </text:list-item>
        <text:list-item>
          <text:p text:style-name="P1">Telegram</text:p>
        </text:list-item>
        <text:list-item>
          <text:p text:style-name="P1">X</text:p>
        </text:list-item>
      </text:list>
      <text:p text:style-name="Text_20_body">Fase 3</text:p>
      <text:p text:style-name="Text_20_body">Tráfego pago</text:p>
      <text:list text:style-name="L2">
        <text:list-item>
          <text:p text:style-name="P2">Google Ads</text:p>
        </text:list-item>
        <text:list-item>
          <text:p text:style-name="P2">Facebook Ads</text:p>
        </text:list-item>
        <text:list-item>
          <text:p text:style-name="P2">X Ads</text:p>
        </text:list-item>
      </text:list>
      <text:p text:style-name="Text_20_body">Conforme seu roadmap. </text:p>
      <text:p text:style-name="Text_20_body">Martket estrategia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8T16:41:14.253000000</meta:creation-date>
    <dc:date>2026-03-08T18:11:42.584000000</dc:date>
    <meta:editing-duration>PT2M28S</meta:editing-duration>
    <meta:editing-cycles>8</meta:editing-cycles>
    <meta:generator>EasyOffice/7.6.2.1.0$Windows_X86_64 LibreOffice_project/0bc4d647150f05f02b71ccb5539a4012b57f1faf</meta:generator>
    <meta:document-statistic meta:table-count="0" meta:image-count="0" meta:object-count="0" meta:page-count="1" meta:paragraph-count="16" meta:word-count="45" meta:character-count="248" meta:non-whitespace-character-count="223"/>
  </office:meta>
</office:document-meta>
</file>