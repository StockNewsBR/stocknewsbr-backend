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text-properties officeooo:paragraph-rsid="00092ef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📊 Identidade visual</text:h>
      <text:p text:style-name="P2"><text:span text:style-name="Strong_20_Emphasis">StockNewsBR – Inteligência de Mercado com IA</text:span></text:p>
      <text:p text:style-name="Text_20_body">Logo que você enviou será usado para:</text:p>
      <text:list text:style-name="L1">
        <text:list-item>
          <text:p text:style-name="P1">App</text:p>
        </text:list-item>
        <text:list-item>
          <text:p text:style-name="P1">Website</text:p>
        </text:list-item>
        <text:list-item>
          <text:p text:style-name="P1">Telegram</text:p>
        </text:list-item>
        <text:list-item>
          <text:p text:style-name="P1">redes sociais</text:p>
        </text:list-item>
        <text:list-item>
          <text:p text:style-name="P1">marketing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3-08T16:41:14.253000000</meta:creation-date>
    <dc:date>2026-03-08T18:12:23.320000000</dc:date>
    <meta:editing-duration>PT2M41S</meta:editing-duration>
    <meta:editing-cycles>9</meta:editing-cycles>
    <meta:generator>EasyOffice/7.6.2.1.0$Windows_X86_64 LibreOffice_project/0bc4d647150f05f02b71ccb5539a4012b57f1faf</meta:generator>
    <meta:document-statistic meta:table-count="0" meta:image-count="0" meta:object-count="0" meta:page-count="1" meta:paragraph-count="8" meta:word-count="27" meta:character-count="145" meta:non-whitespace-character-count="130"/>
  </office:meta>
</office:document-meta>
</file>