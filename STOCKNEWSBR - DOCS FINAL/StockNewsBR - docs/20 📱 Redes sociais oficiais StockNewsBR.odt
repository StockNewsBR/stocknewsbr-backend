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fedb8"/>
    </style:style>
    <style:style style:name="P2" style:family="paragraph" style:parent-style-name="Preformatted_20_Text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officeooo:paragraph-rsid="00108f6b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📱 Redes sociais oficiais StockNewsBR</text:h>
      <text:p text:style-name="P7"><text:span text:style-name="Strong_20_Emphasis">StockNewsBR – Inteligência de Mercado com IA</text:span></text:p>
      <text:h text:style-name="Heading_20_2" text:outline-level="2">🎥 YouTube</text:h>
      <text:p text:style-name="Text_20_body">Função:</text:p>
      <text:list text:style-name="L1">
        <text:list-item>
          <text:p text:style-name="P3">educação financeira</text:p>
        </text:list-item>
        <text:list-item>
          <text:p text:style-name="P3">explicação das IAs</text:p>
        </text:list-item>
        <text:list-item>
          <text:p text:style-name="P3">análise de mercado</text:p>
        </text:list-item>
        <text:list-item>
          <text:p text:style-name="P3">divulgação da plataforma</text:p>
        </text:list-item>
      </text:list>
      <text:p text:style-name="Text_20_body">Conteúdo exemplo:</text:p>
      <text:section text:style-name="Sect1" text:name="code-block-viewer">
        <text:p text:style-name="P2">IA detectou esse trade antes do mercado</text:p>
        <text:p text:style-name="Preformatted_20_Text">Top oportunidades da semana</text:p>
        <text:p text:style-name="Preformatted_20_Text">Como usar o radar do StockNewsBR</text:p>
      </text:section>
      <text:p text:style-name="Standard"/>
      <text:p text:style-name="Standard"/>
      <text:p text:style-name="Standard"/>
      <text:h text:style-name="Heading_20_2" text:outline-level="2">🐦 X (Twitter)</text:h>
      <text:p text:style-name="Text_20_body">Função:</text:p>
      <text:list text:style-name="L2">
        <text:list-item>
          <text:p text:style-name="P4">marketing</text:p>
        </text:list-item>
        <text:list-item>
          <text:p text:style-name="P4">alertas rápidos</text:p>
        </text:list-item>
        <text:list-item>
          <text:p text:style-name="P4">ranking diário</text:p>
        </text:list-item>
      </text:list>
      <text:p text:style-name="Text_20_body">Post exemplo:</text:p>
      <text:section text:style-name="Sect1" text:name="Section1">
        <text:p text:style-name="P2"><text:bookmark text:name="code-block-viewer"/>🔥 AI Opportunity</text:p>
        <text:p text:style-name="Preformatted_20_Text">PETR4</text:p>
        <text:p text:style-name="Preformatted_20_Text">Signal Strength 92</text:p>
        <text:p text:style-name="Preformatted_20_Text">Confidence 89%</text:p>
        <text:p text:style-name="Preformatted_20_Text">#B3 #trading</text:p>
      </text:section>
      <text:p text:style-name="Standard"/>
      <text:p text:style-name="Standard"/>
      <text:p text:style-name="Standard"/>
      <text:h text:style-name="Heading_20_2" text:outline-level="2">📘 Facebook</text:h>
      <text:p text:style-name="Text_20_body">Função:</text:p>
      <text:list text:style-name="L3">
        <text:list-item>
          <text:p text:style-name="P5">comunidade</text:p>
        </text:list-item>
        <text:list-item>
          <text:p text:style-name="P5">tráfego pago</text:p>
        </text:list-item>
        <text:list-item>
          <text:p text:style-name="P5"><text:soft-page-break/>posts educacionais</text:p>
        </text:list-item>
      </text:list>
      <text:p text:style-name="Horizontal_20_Line"/>
      <text:h text:style-name="Heading_20_2" text:outline-level="2">📷 Instagram</text:h>
      <text:p text:style-name="Text_20_body">Função:</text:p>
      <text:list text:style-name="L4">
        <text:list-item>
          <text:p text:style-name="P6">marketing</text:p>
        </text:list-item>
        <text:list-item>
          <text:p text:style-name="P6">crescimento orgânico</text:p>
        </text:list-item>
        <text:list-item>
          <text:p text:style-name="P6">conteúdo visual</text:p>
        </text:list-item>
      </text:list>
      <text:p text:style-name="Standard"/>
      <text:p text:style-name="Standard"/>
      <text:p text:style-name="Standard"/>
      <text:h text:style-name="Heading_20_2" text:outline-level="2">🤖 Telegram</text:h>
      <text:p text:style-name="Text_20_body">Função principal:</text:p>
      <text:p text:style-name="Text_20_body">canal de alertas</text:p>
      <text:p text:style-name="Text_20_body">Conteúdo:</text:p>
      <text:section text:style-name="Sect1" text:name="Section2">
        <text:p text:style-name="P2"><text:bookmark text:name="code-block-viewer Copy 1"/>Top AI Opportunities Today</text:p>
        <text:p text:style-name="Preformatted_20_Text">PETR4</text:p>
        <text:p text:style-name="Preformatted_20_Text">VALE3</text:p>
        <text:p text:style-name="Preformatted_20_Text">WEGE3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7:00:18.907000000</meta:creation-date>
    <dc:date>2026-03-08T18:01:55.417000000</dc:date>
    <meta:editing-duration>PT1H1M36S</meta:editing-duration>
    <meta:editing-cycles>2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41" meta:word-count="110" meta:character-count="651" meta:non-whitespace-character-count="594"/>
  </office:meta>
</office:document-meta>
</file>