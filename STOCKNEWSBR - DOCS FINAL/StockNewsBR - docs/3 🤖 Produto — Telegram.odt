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62d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🤖 Produto 3 — Telegram</text:h>
      <text:p text:style-name="P2"><text:span text:style-name="Strong_20_Emphasis">StockNewsBR – Inteligência de Mercado com IA</text:span></text:p>
      <text:p text:style-name="Text_20_body">Canal principal de alertas.</text:p>
      <text:p text:style-name="Text_20_body">Tipos de conteúdo:</text:p>
      <text:list text:style-name="L1">
        <text:list-item>
          <text:p text:style-name="P1">ranking diário de oportunidades</text:p>
        </text:list-item>
        <text:list-item>
          <text:p text:style-name="P1">alertas de IA</text:p>
        </text:list-item>
        <text:list-item>
          <text:p text:style-name="P1">market pulse</text:p>
        </text:list-item>
        <text:list-item>
          <text:p text:style-name="P1">notícias importantes</text:p>
        </text:list-item>
      </text:list>
      <text:p text:style-name="Text_20_body">Isso faz parte da estratégia de growth que você colocou. </text:p>
      <text:p text:style-name="Text_20_body">Martket estrategi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41:14.253000000</meta:creation-date>
    <dc:date>2026-03-08T18:10:49.704000000</dc:date>
    <meta:editing-duration>PT1M44S</meta:editing-duration>
    <meta:editing-cycles>4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0" meta:word-count="44" meta:character-count="266" meta:non-whitespace-character-count="233"/>
  </office:meta>
</office:document-meta>
</file>