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d61cf"/>
    </style:style>
    <style:style style:name="T1" style:family="text">
      <style:text-properties officeooo:rsid="001d61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⚠️ Aviso legal (modelo institucional)</text:h>
      <text:p text:style-name="P1"><text:span text:style-name="Strong_20_Emphasis">StockNewsBR – Inteligência de Mercado com IA</text:span></text:p>
      <text:p text:style-name="Text_20_body">Inspirado no padrão Rico que você enviou.</text:p>
      <text:p text:style-name="Text_20_body">Texto resumido ideal:</text:p>
      <text:p text:style-name="Text_20_body">Este material possui caráter exclusivamente informativo e educacional.<text:line-break/>Não constitui recomendação de compra ou venda de ativos financeiros.</text:p>
      <text:p text:style-name="Text_20_body">Investimentos envolvem riscos e podem resultar em perdas financeiras.</text:p>
      <text:p text:style-name="Text_20_body">O StockNewsBR não presta consultoria de investimentos nem realiza recomendações personalizada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7:01:31.673000000</meta:creation-date>
    <dc:date>2026-03-08T18:13:01.560000000</dc:date>
    <meta:editing-duration>PT1M4S</meta:editing-duration>
    <meta:editing-cycles>4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7" meta:word-count="59" meta:character-count="445" meta:non-whitespace-character-count="392"/>
  </office:meta>
</office:document-meta>
</file>