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paragraph-rsid="001a6c9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🧭 Estrutura oficial do Footer da Webpage</text:h>
      <text:p text:style-name="P2"><text:span text:style-name="Strong_20_Emphasis">StockNewsBR – Inteligência de Mercado com IA</text:span></text:p>
      <text:p text:style-name="Text_20_body">Rodapé completo deve conter:</text:p>
      <text:h text:style-name="Heading_20_3" text:outline-level="3">Empresa</text:h>
      <text:p text:style-name="Text_20_body">StockNewsBR<text:line-break/>Inteligência de Mercado com IA</text:p>
      <text:h text:style-name="Heading_20_3" text:outline-level="3">Links</text:h>
      <text:list text:style-name="L1">
        <text:list-item>
          <text:p text:style-name="P1">Sobre nós</text:p>
        </text:list-item>
        <text:list-item>
          <text:p text:style-name="P1">Educação</text:p>
        </text:list-item>
        <text:list-item>
          <text:p text:style-name="P1">Termos</text:p>
        </text:list-item>
        <text:list-item>
          <text:p text:style-name="P1">Privacidade</text:p>
        </text:list-item>
        <text:list-item>
          <text:p text:style-name="P1">Contato</text:p>
        </text:list-item>
      </text:list>
      <text:h text:style-name="Heading_20_3" text:outline-level="3">Redes sociais</text:h>
      <text:p text:style-name="Standard">YouTube<text:line-break/>X<text:line-break/>Facebook<text:line-break/>Instagram<text:line-break/>Telegram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8T17:01:31.673000000</meta:creation-date>
    <dc:date>2026-03-08T18:12:43.936000000</dc:date>
    <meta:editing-duration>PT42S</meta:editing-duration>
    <meta:editing-cycles>3</meta:editing-cycles>
    <meta:generator>EasyOffice/7.6.2.1.0$Windows_X86_64 LibreOffice_project/0bc4d647150f05f02b71ccb5539a4012b57f1faf</meta:generator>
    <meta:document-statistic meta:table-count="0" meta:image-count="0" meta:object-count="0" meta:page-count="1" meta:paragraph-count="13" meta:word-count="43" meta:character-count="263" meta:non-whitespace-character-count="236"/>
  </office:meta>
</office:document-meta>
</file>