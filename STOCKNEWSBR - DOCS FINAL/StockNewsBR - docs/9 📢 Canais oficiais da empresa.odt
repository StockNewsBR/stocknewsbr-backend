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text-properties officeooo:paragraph-rsid="0002ade3"/>
    </style:style>
    <style:style style:name="P2" style:family="paragraph" style:parent-style-name="Text_20_body">
      <style:text-properties officeooo:paragraph-rsid="0002ade3"/>
    </style:style>
    <style:style style:name="T1" style:family="text">
      <style:text-properties officeooo:rsid="0002ade3"/>
    </style:style>
    <style:style style:name="T2" style:family="text">
      <style:text-properties officeooo:rsid="000413d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📢 Canais oficiais da empresa</text:h>
      <text:p text:style-name="P2"><text:span text:style-name="Strong_20_Emphasis">StockNewsBR – Inteligência de Mercado com IA</text:span></text:p>
      <text:p text:style-name="Text_20_body"/>
      <text:h text:style-name="Heading_20_3" text:outline-level="3">Telegram</text:h>
      <text:p text:style-name="Text_20_body">alertas e ranking</text:p>
      <text:h text:style-name="Heading_20_3" text:outline-level="3">X (Twitter)</text:h>
      <text:p text:style-name="Text_20_body">posts automáticos de oportunidades, <text:span text:style-name="T2">MKT</text:span></text:p>
      <text:h text:style-name="Heading_20_3" text:outline-level="3">YouTube</text:h>
      <text:p text:style-name="Text_20_body">educação financeira</text:p>
      <text:h text:style-name="Heading_20_3" text:outline-level="3">Facebook</text:h>
      <text:p text:style-name="Text_20_body">comunidade</text:p>
      <text:h text:style-name="Heading_20_3" text:outline-level="3">Google Ads</text:h>
      <text:p text:style-name="Text_20_body">aquisição de usuários</text:p>
      <text:h text:style-name="Heading_20_3" text:outline-level="3">Influencers</text:h>
      <text:p text:style-name="Text_20_body">marketing orgânico</text:p>
      <text:h text:style-name="P1" text:outline-level="3">In<text:span text:style-name="T1">stagram</text:span></text:h>
      <text:p text:style-name="P2">posts automáticos de oportunidades,<text:span text:style-name="T2">MKT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3-08T16:41:14.253000000</meta:creation-date>
    <dc:date>2026-03-08T18:01:16.289000000</dc:date>
    <meta:editing-duration>PT4M9S</meta:editing-duration>
    <meta:editing-cycles>6</meta:editing-cycles>
    <meta:generator>EasyOffice/7.6.2.1.0$Windows_X86_64 LibreOffice_project/0bc4d647150f05f02b71ccb5539a4012b57f1faf</meta:generator>
    <meta:document-statistic meta:table-count="0" meta:image-count="0" meta:object-count="0" meta:page-count="1" meta:paragraph-count="16" meta:word-count="40" meta:character-count="298" meta:non-whitespace-character-count="273"/>
  </office:meta>
</office:document-meta>
</file>