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9C00000258EB5CE7EB2887934F.png" manifest:media-type="image/png"/>
  <manifest:file-entry manifest:full-path="Pictures/10000000000006FE000004003644B2BD9DFA78F8.jpg" manifest:media-type="image/jpeg"/>
  <manifest:file-entry manifest:full-path="Pictures/1000000000000654000004009CD7B4A2E40FCD32.jpg" manifest:media-type="image/jpeg"/>
  <manifest:file-entry manifest:full-path="Pictures/10000000000001900000012C10A4327C5C8BFE85.png" manifest:media-type="image/png"/>
  <manifest:file-entry manifest:full-path="Pictures/10000000000005550000040073C231BA47DD24B7.jpg" manifest:media-type="image/jpeg"/>
  <manifest:file-entry manifest:full-path="Pictures/10000001000007C9000004F06DE5CFAF9541E9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5b7b9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>
      <style:text-properties officeooo:paragraph-rsid="0005e47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🤖 🌐 Produto 4 — Website institucional</text:h>
      <text:p text:style-name="P5">Perfeito. Vou montar uma <text:span text:style-name="Strong_20_Emphasis">Landing Page completa nível fintech (estilo Rico / XP / Primo Rico)</text:span> para o <text:span text:style-name="Strong_20_Emphasis">StockNewsBR</text:span>.</text:p>
      <text:p text:style-name="P5"><text:span text:style-name="Strong_20_Emphasis">StockNewsBR – Inteligência de Mercado com IA</text:span></text:p>
      <text:p text:style-name="P5"><text:line-break/>Essa estrutura é feita para <text:span text:style-name="Strong_20_Emphasis">converter visitantes em usuários do app + trial de 90 dias</text:span>. 🚀</text:p>
      <text:p text:style-name="Horizontal_20_Line"/>
      <text:h text:style-name="Heading_20_1" text:outline-level="1"><text:soft-page-break/>🟢 Landing Page Oficial — StockNewsBR</text:h>
      <text:h text:style-name="Heading_20_2" text:outline-level="2">🧠 1️⃣ HERO SECTION (Primeira dobra da página)</text:h>
      <text:p text:style-name="P3"><text:soft-page-break/><draw:frame draw:style-name="fr1" draw:name="Image1" text:anchor-type="as-char" svg:width="18.6457in" svg:height="10.6665in" draw:z-index="0"><draw:image xlink:href="Pictures/10000000000006FE000004003644B2BD9DFA78F8.jpg" xlink:type="simple" xlink:show="embed" xlink:actuate="onLoad" draw:mime-type="image/jpeg"/><svg:title>https://images.openai.com/static-rsc-3/qrLFyZ83G9t2hLFYGgRkFzhwaIFph3FEg_fgpXXHCNSV_vct6O5aqcBVnSnVUq3I-QlYnroqEeyXKKb03NtZfY4M4b2B5aZM9ioBWwpttTY?purpose=fullsize&amp;v=1</svg:title></draw:frame></text:p>
      <text:p text:style-name="P3"><text:soft-page-break/><draw:frame draw:style-name="fr1" draw:name="Image2" text:anchor-type="as-char" svg:width="16.8752in" svg:height="10.6665in" draw:z-index="1"><draw:image xlink:href="Pictures/1000000000000654000004009CD7B4A2E40FCD32.jpg" xlink:type="simple" xlink:show="embed" xlink:actuate="onLoad" draw:mime-type="image/jpeg"/><svg:title>https://images.openai.com/static-rsc-3/Vi7OnZ-shz4lsDhOxHob2wLuNZwtJHlpSFoiSF9XdxKazHQ-U6w5EzUVLgf1RuM3aUdJBEkGGqpNIgqhNEcIqMoSRbEKTUZyJSkFHW-3J44?purpose=fullsize&amp;v=1</svg:title></draw:frame></text:p>
      <text:p text:style-name="P3"><text:soft-page-break/><draw:frame draw:style-name="fr1" draw:name="Image3" text:anchor-type="as-char" svg:width="14.2189in" svg:height="10.6665in" draw:z-index="2"><draw:image xlink:href="Pictures/10000000000005550000040073C231BA47DD24B7.jpg" xlink:type="simple" xlink:show="embed" xlink:actuate="onLoad" draw:mime-type="image/jpeg"/><svg:title>https://images.openai.com/static-rsc-3/v501exzO4Ym10t2wMosbVxA2UPPmwzST5sgY1_7iAcolA0CcLu5Xk3hFIGgtL-l2JkzqbfGdX52ujrTn-lXsZ5maQuAH_3wA25RNXAoPnTo?purpose=fullsize&amp;v=1</svg:title></draw:frame></text:p>
      <text:p text:style-name="Text_20_body"><text:soft-page-break/>4</text:p>
      <text:h text:style-name="Heading_20_3" text:outline-level="3">Headline principal</text:h>
      <text:p text:style-name="Text_20_body"><text:span text:style-name="Strong_20_Emphasis">StockNewsBR</text:span><text:line-break/>Inteligência de Mercado com IA</text:p>
      <text:h text:style-name="Heading_20_3" text:outline-level="3">Subheadline</text:h>
      <text:p text:style-name="Text_20_body">Tecnologia que analisa o mercado financeiro e conecta investidores em uma rede social focada em ideias de investimento.</text:p>
      <text:p text:style-name="Text_20_body">Acompanhe ativos da <text:span text:style-name="Strong_20_Emphasis">B3</text:span>, compartilhe análises e utilize ferramentas baseadas em <text:span text:style-name="Strong_20_Emphasis">dados e inteligência artificial</text:span> para interpretar o mercado.</text:p>
      <text:h text:style-name="Heading_20_3" text:outline-level="3">Botão principal</text:h>
      <text:p text:style-name="Text_20_body">🚀 <text:span text:style-name="Strong_20_Emphasis">Começar teste gratuito de 90 dias</text:span></text:p>
      <text:h text:style-name="Heading_20_3" text:outline-level="3">Botão secundário</text:h>
      <text:p text:style-name="Text_20_body">📊 <text:span text:style-name="Strong_20_Emphasis">Explorar a plataforma</text:span></text:p>
      <text:p text:style-name="Horizontal_20_Line"/>
      <text:h text:style-name="Heading_20_1" text:outline-level="1">📊 2️⃣ O QUE É O STOCKNEWSBR</text:h>
      <text:p text:style-name="Text_20_body">O StockNewsBR é uma plataforma de inteligência de mercado que integra:</text:p>
      <text:list text:style-name="L2">
        <text:list-item>
          <text:p text:style-name="P4">análise quantitativa</text:p>
        </text:list-item>
        <text:list-item>
          <text:p text:style-name="P4">ferramentas de dados</text:p>
        </text:list-item>
        <text:list-item>
          <text:p text:style-name="P4">inteligência artificial</text:p>
        </text:list-item>
        <text:list-item>
          <text:p text:style-name="P4">comunidade de investidores</text:p>
        </text:list-item>
      </text:list>
      <text:p text:style-name="Text_20_body">O objetivo é <text:span text:style-name="Strong_20_Emphasis">organizar informações complexas do mercado financeiro e torná-las mais acessíveis para investidores.</text:span></text:p>
      <text:p text:style-name="Horizontal_20_Line"/>
      <text:h text:style-name="Heading_20_1" text:outline-level="1">🧠 3️⃣ TECNOLOGIA DE INTELIGÊNCIA DE MERCADO</text:h>
      <text:p text:style-name="Text_20_body">A plataforma utiliza modelos baseados em dados para analisar movimentos do mercado.</text:p>
      <text:h text:style-name="Heading_20_3" text:outline-level="3"><text:soft-page-break/>Exemplos de ferramentas</text:h>
      <text:p text:style-name="Text_20_body">• IA Heat Map<text:line-break/>• IA Radar<text:line-break/>• IA Breakout Probability<text:line-break/>• IA Volatility Squeeze<text:line-break/>• IA Institutional Flow<text:line-break/>• IA Smart Money<text:line-break/>• IA Liquidity Map<text:line-break/>• IA Market Regime<text:line-break/>• IA Master Score</text:p>
      <text:p text:style-name="Text_20_body">Essas ferramentas ajudam a identificar padrões e tendências no mercado financeiro.</text:p>
      <text:p text:style-name="Horizontal_20_Line"/>
      <text:h text:style-name="Heading_20_1" text:outline-level="1"><text:soft-page-break/>👥 4️⃣ REDE SOCIAL FINANCEIRA</text:h>
      <text:p text:style-name="P3"><text:soft-page-break/><draw:frame draw:style-name="fr1" draw:name="Image4" text:anchor-type="as-char" svg:width="20.7602in" svg:height="13.1665in" draw:z-index="3"><draw:image xlink:href="Pictures/10000001000007C9000004F06DE5CFAF9541E960.png" xlink:type="simple" xlink:show="embed" xlink:actuate="onLoad" draw:mime-type="image/png"/><svg:title>https://img.apmcdn.org/e65c8a3e482a2b4bce8024a92915da0d996cc8d4/uncropped/9288b2-2021-05-commonstock-i-dashboard-may-19-1993.png</svg:title></draw:frame></text:p>
      <text:p text:style-name="P3"><text:soft-page-break/><draw:frame draw:style-name="fr1" draw:name="Image5" text:anchor-type="as-char" svg:width="4.1665in" svg:height="3.1252in" draw:z-index="4"><draw:image xlink:href="Pictures/10000000000001900000012C10A4327C5C8BFE85.png" xlink:type="simple" xlink:show="embed" xlink:actuate="onLoad" draw:mime-type="image/png"/><svg:title>https://cdn.dribbble.com/userupload/14833795/file/original-cb99eeaf04f6b99be3a74f710e11a554.jpg?format=webp&amp;resize=400x300&amp;vertical=center</svg:title></draw:frame></text:p>
      <text:p text:style-name="P3"><text:soft-page-break/><draw:frame draw:style-name="fr1" draw:name="Image6" text:anchor-type="as-char" svg:width="16.3866in" svg:height="8.3319in" draw:z-index="5"><draw:image xlink:href="Pictures/100000010000049C00000258EB5CE7EB2887934F.png" xlink:type="simple" xlink:show="embed" xlink:actuate="onLoad" draw:mime-type="image/png"/><svg:title>https://s3.envato.com/files/337791258/Previewscreenshot/01_Previewscreenshot.png</svg:title></draw:frame></text:p>
      <text:p text:style-name="Text_20_body">4</text:p>
      <text:p text:style-name="Text_20_body">Além das ferramentas de análise, o StockNewsBR funciona como uma <text:span text:style-name="Strong_20_Emphasis">comunidade de investidores</text:span>.</text:p>
      <text:p text:style-name="Text_20_body">Usuários podem:</text:p>
      <text:p text:style-name="Text_20_body"><text:soft-page-break/>• compartilhar ideias de investimento<text:line-break/>• discutir ativos utilizando cashtags ($PETR4, $VALE3)<text:line-break/>• comentar análises de outros investidores<text:line-break/>• reagir com Bullish ou Bearish<text:line-break/>• participar de enquetes (Polls) sobre ativos</text:p>
      <text:p text:style-name="Horizontal_20_Line"/>
      <text:h text:style-name="Heading_20_1" text:outline-level="1">📱 5️⃣ PLATAFORMAS DISPONÍVEIS</text:h>
      <text:p text:style-name="Text_20_body">O StockNewsBR funciona em múltiplos ambientes.</text:p>
      <text:h text:style-name="Heading_20_3" text:outline-level="3">📱 App Mobile</text:h>
      <text:p text:style-name="Text_20_body">Aplicativo disponível para acompanhar o mercado em qualquer lugar.</text:p>
      <text:h text:style-name="Heading_20_3" text:outline-level="3">🖥 Plataforma Web</text:h>
      <text:p text:style-name="Text_20_body">Versão profissional da plataforma com suporte a múltiplos monitores.</text:p>
      <text:h text:style-name="Heading_20_3" text:outline-level="3">🤖 Telegram</text:h>
      <text:p text:style-name="Text_20_body">Alertas automáticos de mercado diretamente no Telegram.</text:p>
      <text:p text:style-name="Horizontal_20_Line"/>
      <text:h text:style-name="Heading_20_1" text:outline-level="1">📊 6️⃣ COMO FUNCIONA</text:h>
      <text:p text:style-name="Text_20_body">1️⃣ Crie sua conta gratuita</text:p>
      <text:p text:style-name="Text_20_body">2️⃣ Acesse o teste gratuito de <text:span text:style-name="Strong_20_Emphasis">90 dias</text:span></text:p>
      <text:p text:style-name="Text_20_body">3️⃣ Explore ferramentas de inteligência de mercado</text:p>
      <text:p text:style-name="Text_20_body">4️⃣ Participe da comunidade de investidores</text:p>
      <text:p text:style-name="Horizontal_20_Line"/>
      <text:h text:style-name="Heading_20_1" text:outline-level="1">⭐ 7️⃣ DIFERENCIAIS</text:h>
      <text:h text:style-name="Heading_20_3" text:outline-level="3">📊 Inteligência baseada em dados</text:h>
      <text:p text:style-name="Text_20_body">Modelos quantitativos e indicadores automatizados.</text:p>
      <text:h text:style-name="Heading_20_3" text:outline-level="3">🤖 Tecnologia com IA</text:h>
      <text:p text:style-name="Text_20_body">Ferramentas que ajudam a interpretar movimentos do mercado.</text:p>
      <text:h text:style-name="Heading_20_3" text:outline-level="3"><text:soft-page-break/>👥 Comunidade de investidores</text:h>
      <text:p text:style-name="Text_20_body">Discussões e ideias compartilhadas por ativos.</text:p>
      <text:h text:style-name="Heading_20_3" text:outline-level="3">⚡ Plataforma integrada</text:h>
      <text:p text:style-name="Text_20_body">App, Web e Telegram conectados.</text:p>
      <text:p text:style-name="Horizontal_20_Line"/>
      <text:h text:style-name="Heading_20_1" text:outline-level="1">📚 8️⃣ EDUCAÇÃO FINANCEIRA</text:h>
      <text:p text:style-name="Text_20_body">O StockNewsBR também oferece conteúdo educacional voltado ao entendimento do mercado financeiro.</text:p>
      <text:p text:style-name="Text_20_body">A plataforma apresenta conceitos e ferramentas que ajudam investidores a compreender melhor o funcionamento do mercado.</text:p>
      <text:p text:style-name="Horizontal_20_Line"/>
      <text:h text:style-name="Heading_20_1" text:outline-level="1">🚀 9️⃣ CALL TO ACTION</text:h>
      <text:h text:style-name="Heading_20_3" text:outline-level="3">Comece agora</text:h>
      <text:p text:style-name="Text_20_body">Experimente a plataforma com <text:span text:style-name="Strong_20_Emphasis">90 dias de teste gratuito</text:span>.</text:p>
      <text:p text:style-name="Text_20_body">Botão:</text:p>
      <text:p text:style-name="Text_20_body">🚀 <text:span text:style-name="Strong_20_Emphasis">Criar conta gratuita</text:span></text:p>
      <text:p text:style-name="Horizontal_20_Line"/>
      <text:h text:style-name="Heading_20_1" text:outline-level="1">⚠️ 10️⃣ AVISO LEGAL</text:h>
      <text:p text:style-name="Text_20_body">As informações disponibilizadas pelo StockNewsBR possuem caráter exclusivamente educacional e informativo.</text:p>
      <text:p text:style-name="Text_20_body">A plataforma utiliza modelos quantitativos e inteligência artificial para organizar dados de mercado.</text:p>
      <text:p text:style-name="Text_20_body">O StockNewsBR não realiza recomendação personalizada de investimentos.</text:p>
      <text:p text:style-name="Text_20_body">Investimentos no mercado financeiro envolvem riscos e podem resultar em perdas financeiras.</text:p>
      <text:p text:style-name="Horizontal_20_Line"/>
      <text:h text:style-name="Heading_20_1" text:outline-level="1"><text:soft-page-break/>🏛 11️⃣ RODAPÉ INSTITUCIONAL</text:h>
      <text:h text:style-name="Heading_20_3" text:outline-level="3">Empresa</text:h>
      <text:p text:style-name="Text_20_body">StockNewsBR<text:line-break/>Inteligência de Mercado com IA</text:p>
      <text:p text:style-name="Text_20_body">CNPJ: 62.098.031/0001-84<text:line-break/>Brasil</text:p>
      <text:p text:style-name="Text_20_body">Contato:<text:line-break/>suporte@stocknewsbr.com</text:p>
      <text:p text:style-name="Horizontal_20_Line"/>
      <text:h text:style-name="Heading_20_3" text:outline-level="3">Links</text:h>
      <text:p text:style-name="Text_20_body">Sobre<text:line-break/>Educação<text:line-break/>News<text:line-break/>Termos de Uso<text:line-break/>Política de Privacidade<text:line-break/>Política de Cookies</text:p>
      <text:p text:style-name="Horizontal_20_Line"/>
      <text:h text:style-name="Heading_20_3" text:outline-level="3">Redes sociais</text:h>
      <text:p text:style-name="Text_20_body">YouTube<text:line-break/>X (Twitter)<text:line-break/>Facebook<text:line-break/>Instagram<text:line-break/>Telegram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08T18:07:50.546000000</dc:date>
    <meta:editing-duration>PT2M41S</meta:editing-duration>
    <meta:editing-cycles>5</meta:editing-cycles>
    <meta:generator>EasyOffice/7.6.2.1.0$Windows_X86_64 LibreOffice_project/0bc4d647150f05f02b71ccb5539a4012b57f1faf</meta:generator>
    <meta:document-statistic meta:table-count="0" meta:image-count="6" meta:object-count="0" meta:page-count="14" meta:paragraph-count="83" meta:word-count="544" meta:character-count="3611" meta:non-whitespace-character-count="3144"/>
  </office:meta>
</office:document-meta>
</file>