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492c6"/>
    </style:style>
    <style:style style:name="P2" style:family="paragraph" style:parent-style-name="Text_20_body">
      <style:text-properties officeooo:paragraph-rsid="000620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🍪 <text:s/>Política de cookies </text:p>
      <text:p text:style-name="P2"><text:span text:style-name="Strong_20_Emphasis">StockNewsBR – Inteligência de Mercado com IA</text:span></text:p>
      <text:p text:style-name="P2"><text:span text:style-name="Strong_20_Emphasis">Padrão usado por praticamente todos os sites.</text:span></text:p>
      <text:p text:style-name="Text_20_body">O StockNewsBR utiliza cookies e tecnologias semelhantes para melhorar a experiência de navegação, analisar o uso da plataforma e otimizar funcionalidades.</text:p>
      <text:p text:style-name="P2"><text:span text:style-name="Strong_20_Emphasis"/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08T16:41:14.253000000</meta:creation-date>
    <dc:date>2026-03-08T17:52:17.136000000</dc:date>
    <meta:editing-duration>PT3M35S</meta:editing-duration>
    <meta:editing-cycles>8</meta:editing-cycles>
    <meta:generator>EasyOffice/7.6.2.1.0$Windows_X86_64 LibreOffice_project/0bc4d647150f05f02b71ccb5539a4012b57f1faf</meta:generator>
    <meta:document-statistic meta:table-count="0" meta:image-count="0" meta:object-count="0" meta:page-count="1" meta:paragraph-count="4" meta:word-count="38" meta:character-count="266" meta:non-whitespace-character-count="229"/>
  </office:meta>
</office:document-meta>
</file>