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1b1b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👥 Produto 6 — Rede social financeira</text:h>
      <text:p text:style-name="P2"><text:span text:style-name="Strong_20_Emphasis">StockNewsBR – Inteligência de Mercado com IA</text:span></text:p>
      <text:p text:style-name="Text_20_body"/>
      <text:p text:style-name="Text_20_body">Inspirado no <text:span text:style-name="Strong_20_Emphasis">Stocktwits</text:span>, como você mencionou.</text:p>
      <text:p text:style-name="Text_20_body">Usuários podem:</text:p>
      <text:list text:style-name="L1">
        <text:list-item>
          <text:p text:style-name="P1">postar ideia de investimento</text:p>
        </text:list-item>
        <text:list-item>
          <text:p text:style-name="P1">usar cashtags ($AAPL)</text:p>
        </text:list-item>
        <text:list-item>
          <text:p text:style-name="P1">marcar bullish ou bearish</text:p>
        </text:list-item>
        <text:list-item>
          <text:p text:style-name="P1">comentar análises</text:p>
        </text:list-item>
        <text:list-item>
          <text:p text:style-name="P1">curtir posts</text:p>
        </text:list-item>
        <text:list-item>
          <text:p text:style-name="P1">adicionar GIF</text:p>
        </text:list-item>
        <text:list-item>
          <text:p text:style-name="P1">adicionar imagens</text:p>
        </text:list-item>
        <text:list-item>
          <text:p text:style-name="P1">adicionar emoji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8:11:28.625000000</dc:date>
    <meta:editing-duration>PT43S</meta:editing-duration>
    <meta:editing-cycles>3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2" meta:word-count="49" meta:character-count="297" meta:non-whitespace-character-count="266"/>
  </office:meta>
</office:document-meta>
</file>