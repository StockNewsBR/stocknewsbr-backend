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31232"/>
    </style:style>
    <style:style style:name="P2" style:family="paragraph" style:parent-style-name="Text_20_body">
      <style:text-properties officeooo:paragraph-rsid="000356cb"/>
    </style:style>
    <style:style style:name="P3" style:family="paragraph" style:parent-style-name="Text_20_body" style:list-style-name="L1"/>
    <style:style style:name="T1" style:family="text">
      <style:text-properties officeooo:rsid="000312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1232" style:font-weight-asian="bold" style:font-weight-complex="bold"/>
    </style:style>
    <style:style style:name="T4" style:family="text">
      <style:text-properties officeooo:rsid="0004775b"/>
    </style:style>
    <style:style style:name="T5" style:family="text">
      <style:text-properties officeooo:rsid="000538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Descrição institucional da empresa</text:h>
      <text:p text:style-name="P2"><text:span text:style-name="Strong_20_Emphasis">StockNewsBR – Inteligência de Mercado com IA</text:span></text:p>
      <text:p text:style-name="Text_20_body">O StockNewsBR é uma plataforma de tecnologia financeira desenvolvida para organizar informações do mercado financeiro e transformar dados em ferramentas úteis para investidores.</text:p>
      <text:p text:style-name="Text_20_body">Utilizando <text:span text:style-name="Strong_20_Emphasis">modelos quantitativos, análise estatística e inteligência artificial </text:span><text:span text:style-name="Strong_20_Emphasis"><text:span text:style-name="T1">(IA)</text:span></text:span>, a plataforma processa grandes volumes de dados do mercado para identificar padrões, tendências e oportunidades.</text:p>
      <text:p text:style-name="Text_20_body">Além das ferramentas tecnológicas, o StockNewsBR integra uma <text:span text:style-name="Strong_20_Emphasis">comunidade de investidores</text:span>, permitindo que usuários compartilhem ideias, analisem ativos e discutam o mercado em um ambiente colaborativo.</text:p>
      <text:p text:style-name="Text_20_body">Nosso objetivo é tornar a interpretação do mercado <text:span text:style-name="Strong_20_Emphasis">mais acessível, organizada e baseada em dado </text:span><text:span text:style-name="Strong_20_Emphasis"><text:span text:style-name="T1">e baseada nas tecnologias usadas nos grandes Hed</text:span></text:span><text:span text:style-name="Strong_20_Emphasis"><text:span text:style-name="T5">ge</text:span></text:span><text:span text:style-name="Strong_20_Emphasis"><text:span text:style-name="T1"> Fundos dos USA.</text:span></text:span></text:p>
      <text:p text:style-name="Text_20_body">O objetivo é <text:span text:style-name="Strong_20_Emphasis">organizar grandes volumes de informações do mercado financeiro e transformá-los em ferramentas úteis para investidores/</text:span><text:span text:style-name="Strong_20_Emphasis"><text:span text:style-name="T1">traders</text:span></text:span><text:span text:style-name="Strong_20_Emphasis">.</text:span></text:p>
      <text:p text:style-name="P1">A plataforma combina <text:span text:style-name="T3">alta </text:span><text:span text:style-name="Strong_20_Emphasis"><text:span text:style-name="T2">t</text:span></text:span><text:span text:style-name="Strong_20_Emphasis">ecnologia financeira </text:span><text:span text:style-name="Strong_20_Emphasis"><text:span text:style-name="T1">( integra inteligência quantitativa </text:span></text:span><text:span text:style-name="Strong_20_Emphasis"><text:span text:style-name="T4">+ IA</text:span></text:span><text:span text:style-name="Strong_20_Emphasis"><text:span text:style-name="T1">)</text:span></text:span><text:span text:style-name="Strong_20_Emphasis"> e comunidade de investidores</text:span>, permitindo que usuários:</text:p>
      <text:list text:style-name="L1">
        <text:list-item>
          <text:p text:style-name="P3">compartilhem ideias de investimento</text:p>
        </text:list-item>
        <text:list-item>
          <text:p text:style-name="P3">analisem ativos da B3</text:p>
        </text:list-item>
        <text:list-item>
          <text:p text:style-name="P3">acompanhem indicadores automatizados</text:p>
        </text:list-item>
        <text:list-item>
          <text:p text:style-name="P3">discutam tendências do mercado</text:p>
        </text:list-item>
      </text:list>
      <text:p text:style-name="P1">⚠️ Aviso importante</text:p>
      <text:p text:style-name="P1">O StockNewsBR não realiza recomendações personalizadas de investimento.<text:line-break/>As ferramentas possuem caráter educacional e informativo. </text:p>
      <text:p text:style-name="P1"/>
      <text:p text:style-name="P1">StockNewsBR<text:line-break/>Inteligência de Mercado com IA</text:p>
      <text:p text:style-name="Text_20_body">CNPJ: 62.098.031/0001-84<text:line-break/>Brasil</text:p>
      <text:p text:style-name="Text_20_body">Contato:<text:line-break/>suporte@stocknewsbr.com</text:p>
      <text:p text:style-name="P1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20:07.073000000</dc:date>
    <meta:editing-duration>PT19M48S</meta:editing-duration>
    <meta:editing-cycles>6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7" meta:word-count="195" meta:character-count="1478" meta:non-whitespace-character-count="1302"/>
  </office:meta>
</office:document-meta>
</file>