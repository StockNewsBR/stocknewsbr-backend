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93c81"/>
    </style:style>
    <style:style style:name="P2" style:family="paragraph" style:parent-style-name="Text_20_body">
      <style:text-properties officeooo:paragraph-rsid="000a7ea8"/>
    </style:style>
    <style:style style:name="P3" style:family="paragraph" style:parent-style-name="Heading_20_1">
      <style:text-properties officeooo:paragraph-rsid="00093c81"/>
    </style:style>
    <style:style style:name="T1" style:family="text">
      <style:text-properties officeooo:rsid="00085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📚 Seção Educação Financeira</text:h>
      <text:p text:style-name="P2"><text:span text:style-name="Strong_20_Emphasis">StockNewsBR – Inteligência de Mercado com IA</text:span></text:p>
      <text:p text:style-name="P1">Texto recomendado:</text:p>
      <text:p text:style-name="P1">O StockNewsBR também possui conteúdo educacional voltado para o entendimento do mercado financeiro.</text:p>
      <text:p text:style-name="P1">A plataforma apresenta <text:span text:style-name="T1">todos os </text:span>conceitos, indicadores e ferramentas que ajudam investidores a compreender melhor o funcionamento do mercado.</text:p>
      <text:p text:style-name="P1">Nosso objetivo é oferecer recursos que contribuam para a educação financeira e para o desenvolvimento de uma análise mais consciente dos investimentos.</text:p>
      <text:p text:style-name="P1"/>
      <text:p text:style-name="P1">⚠️ Aviso importante</text:p>
      <text:p text:style-name="P1">O StockNewsBR não realiza recomendações personalizadas de investimento.<text:line-break/>As ferramentas possuem caráter educacional e informativ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7:49:24.761000000</dc:date>
    <meta:editing-duration>PT11M35S</meta:editing-duration>
    <meta:editing-cycles>8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8" meta:word-count="84" meta:character-count="628" meta:non-whitespace-character-count="550"/>
  </office:meta>
</office:document-meta>
</file>