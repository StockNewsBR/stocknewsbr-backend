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4775b"/>
    </style:style>
    <style:style style:name="P2" style:family="paragraph" style:parent-style-name="Text_20_body">
      <style:text-properties officeooo:paragraph-rsid="000642d9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08543a"/>
    </style:style>
    <style:style style:name="P5" style:family="paragraph" style:parent-style-name="Text_20_body">
      <style:text-properties officeooo:paragraph-rsid="0008fa85"/>
    </style:style>
    <style:style style:name="P6" style:family="paragraph" style:parent-style-name="Text_20_body">
      <style:text-properties officeooo:paragraph-rsid="0004775b"/>
    </style:style>
    <style:style style:name="P7" style:family="paragraph" style:parent-style-name="Text_20_body">
      <style:text-properties officeooo:paragraph-rsid="000642d9"/>
    </style:style>
    <style:style style:name="T1" style:family="text">
      <style:text-properties officeooo:rsid="0004775b"/>
    </style:style>
    <style:style style:name="T2" style:family="text">
      <style:text-properties officeooo:rsid="000642d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📱 Descrição oficial do App (Google Play)</text:h>
      <text:p text:style-name="Text_20_body">Versão que passa nas políticas do Google.</text:p>
      <text:p text:style-name="Text_20_body"><text:span text:style-name="Strong_20_Emphasis">StockNewsBR – Inteligência de Mercado com IA</text:span></text:p>
      <text:p text:style-name="Text_20_body">O StockNewsBR é uma plataforma que integra inteligência quantitativa <text:span text:style-name="T1">+ IA </text:span>e comunidade de investidores para acompanhar o mercado financeiro brasileiro.</text:p>
      <text:p text:style-name="Text_20_body">Através de modelos estatísticos e inteligência artificial, o sistema organiza dados de mercado e apresenta ferramentas que auxiliam investidores na interpretação de tendências e movimentos de ativos.</text:p>
      <text:h text:style-name="Heading_20_3" text:outline-level="3">Recursos da plataforma</text:h>
      <text:p text:style-name="Text_20_body">• <text:span text:style-name="T1">IA de </text:span>Monitoramento de ativos da B3<text:line-break/>• Indicadores quantitativos <text:span text:style-name="T1">+ IA </text:span>automatizados<text:line-break/>• <text:span text:style-name="T1">Ai de </text:span>Alertas de movimentação de mercado<text:line-break/>• Comunidade financeira integrada<text:line-break/>• Ferramentas de análise de dados</text:p>
      <text:h text:style-name="Heading_20_3" text:outline-level="3">Diferenciais</text:h>
      <text:p text:style-name="P1">• Modelos quantitativos proprietários<text:line-break/>• Inteligência artificial aplicada ao mercado <text:span text:style-name="T1">(IA)</text:span><text:line-break/>• Tecnologia que organiza informações complexas <text:span text:style-name="T1">(IA + nteligência integrada quantitativa) </text:span><text:line-break/>• <text:span text:style-name="T1">IA de </text:span>Indicadores de tendência e momentum</text:p>
      <text:p text:style-name="P2">• <text:span text:style-name="T1">IA de </text:span>Indicadores de <text:span text:style-name="T2">Compra e Venda, direto no Grafico</text:span></text:p>
      <text:h text:style-name="Heading_20_3" text:outline-level="3">Comunidade</text:h>
      <text:p text:style-name="Text_20_body">A plataforma também funciona como uma rede social financeira onde investidores podem:</text:p>
      <text:p text:style-name="Text_20_body">• compartilhar ideias de investimento<text:line-break/>• discutir ativos utilizando cashtags ($PETR4, $VALE3)<text:line-break/>• comentar análises de outros usuários<text:line-break/>• interagir com opiniões Bullish ou Bearish</text:p>
      <text:p text:style-name="Text_20_body"/>
      <text:p text:style-name="Text_20_body">⚠️ Aviso importante</text:p>
      <text:p text:style-name="Text_20_body">O StockNewsBR não realiza recomendações personalizadas de investimento.<text:line-break/>As ferramentas possuem caráter educacional e informativo. </text:p>
      <text:p text:style-name="Text_20_body">Untitled - google app descrica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7:38:23.236000000</dc:date>
    <meta:editing-duration>PT11M4S</meta:editing-duration>
    <meta:editing-cycles>6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6" meta:word-count="206" meta:character-count="1432" meta:non-whitespace-character-count="1239"/>
  </office:meta>
</office:document-meta>
</file>