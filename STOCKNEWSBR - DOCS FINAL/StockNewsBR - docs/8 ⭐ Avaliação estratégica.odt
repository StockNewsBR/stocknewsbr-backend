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c76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⭐ Avaliação estratégica (minha)</text:h>
      <text:p text:style-name="P2"><text:span text:style-name="Strong_20_Emphasis">StockNewsBR – Inteligência de Mercado com IA</text:span></text:p>
      <text:p text:style-name="Text_20_body">Seu projeto tem <text:span text:style-name="Strong_20_Emphasis">estrutura para virar um produto muito forte</text:span> porque mistura:</text:p>
      <text:list text:style-name="L1">
        <text:list-item>
          <text:p text:style-name="P1">IA</text:p>
        </text:list-item>
        <text:list-item>
          <text:p text:style-name="P1">scanner de mercado</text:p>
        </text:list-item>
        <text:list-item>
          <text:p text:style-name="P1">rede social financeira</text:p>
        </text:list-item>
        <text:list-item>
          <text:p text:style-name="P1">comunidade</text:p>
        </text:list-item>
        <text:list-item>
          <text:p text:style-name="P1">conteúdo educacional</text:p>
        </text:list-item>
      </text:list>
      <text:p text:style-name="Text_20_body">Isso é raro no Brasi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12:07.392000000</dc:date>
    <meta:editing-duration>PT3M43S</meta:editing-duration>
    <meta:editing-cycles>10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9" meta:word-count="42" meta:character-count="249" meta:non-whitespace-character-count="220"/>
  </office:meta>
</office:document-meta>
</file>