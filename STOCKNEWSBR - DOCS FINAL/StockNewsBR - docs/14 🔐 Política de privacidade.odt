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officeooo:paragraph-rsid="000492c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🔐 Política de privacidade</text:h>
      <text:p text:style-name="P3"><text:span text:style-name="Strong_20_Emphasis">StockNewsBR – Inteligência de Mercado com IA</text:span></text:p>
      <text:p text:style-name="Text_20_body">Modelo padrão usado por empresas de fintech:</text:p>
      <text:h text:style-name="Heading_20_3" text:outline-level="3">Dados coletados</text:h>
      <text:p text:style-name="Text_20_body">Podemos coletar informações como:</text:p>
      <text:p text:style-name="Text_20_body">• nome<text:line-break/>• e-mail<text:line-break/>• telefone<text:line-break/>• dados de navegação</text:p>
      <text:h text:style-name="Heading_20_3" text:outline-level="3">Uso das informações</text:h>
      <text:p text:style-name="Text_20_body">Os dados são utilizados para:</text:p>
      <text:p text:style-name="Text_20_body">• fornecer os serviços da plataforma<text:line-break/>• melhorar a experiência do usuário<text:line-break/>• responder solicitações de suporte</text:p>
      <text:h text:style-name="Heading_20_3" text:outline-level="3">Compartilhamento</text:h>
      <text:p text:style-name="Text_20_body">Os dados não são compartilhados com terceiros, exceto quando exigido por lei ou mediante autorização do usuário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6:41:14.253000000</meta:creation-date>
    <dc:date>2026-03-08T17:51:11.488000000</dc:date>
    <meta:editing-duration>PT2M48S</meta:editing-duration>
    <meta:editing-cycles>7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11" meta:word-count="76" meta:character-count="492" meta:non-whitespace-character-count="426"/>
  </office:meta>
</office:document-meta>
</file>