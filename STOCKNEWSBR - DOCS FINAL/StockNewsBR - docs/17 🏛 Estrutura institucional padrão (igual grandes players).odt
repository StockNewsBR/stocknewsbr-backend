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ed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🏛 Estrutura institucional padrão (igual grandes players)</text:h>
      <text:p text:style-name="P1"><text:span text:style-name="Strong_20_Emphasis">StockNewsBR – Inteligência de Mercado com IA</text:span></text:p>
      <text:p text:style-name="Text_20_body">Todos os concorrentes usam praticamente a mesma estrutura:</text:p>
      <text:h text:style-name="Heading_20_3" text:outline-level="3">1️⃣ Sobre a empresa</text:h>
      <text:h text:style-name="Heading_20_3" text:outline-level="3">2️⃣ Descrição do produto</text:h>
      <text:h text:style-name="Heading_20_3" text:outline-level="3">3️⃣ Educação financeira</text:h>
      <text:h text:style-name="Heading_20_3" text:outline-level="3">4️⃣ Aviso legal</text:h>
      <text:h text:style-name="Heading_20_3" text:outline-level="3">5️⃣ Termos de uso</text:h>
      <text:h text:style-name="Heading_20_3" text:outline-level="3">6️⃣ Política de privacidade</text:h>
      <text:h text:style-name="Heading_20_3" text:outline-level="3">7️⃣ Política de cookies</text:h>
      <text:h text:style-name="Heading_20_3" text:outline-level="3">8️⃣ Contato / empresa</text:h>
      <text:h text:style-name="Heading_20_3" text:outline-level="3">9️⃣ Redes sociais</text:h>
      <text:p text:style-name="Text_20_body">Isso deve existir no <text:span text:style-name="Strong_20_Emphasis">site e no app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7:01:31.673000000</meta:creation-date>
    <dc:date>2026-03-08T18:13:21.238000000</dc:date>
    <meta:editing-duration>PT4M57S</meta:editing-duration>
    <meta:editing-cycles>5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3" meta:word-count="62" meta:character-count="361" meta:non-whitespace-character-count="311"/>
  </office:meta>
</office:document-meta>
</file>