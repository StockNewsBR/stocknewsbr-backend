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5bf5c"/>
    </style:style>
    <style:style style:name="P2" style:family="paragraph" style:parent-style-name="Text_20_body">
      <style:text-properties fo:font-weight="bold" officeooo:rsid="0005bf5c" officeooo:paragraph-rsid="00065860" style:font-weight-asian="bold" style:font-weight-complex="bold"/>
    </style:style>
    <style:style style:name="T1" style:family="text">
      <style:text-properties officeooo:rsid="0005bf5c"/>
    </style:style>
    <style:style style:name="T2" style:family="text">
      <style:text-properties officeooo:rsid="0008e9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📄 Termos de assinatura/<text:span text:style-name="T1">T</text:span>ermos de uso </text:h>
      <text:p text:style-name="P2"><text:span text:style-name="Strong_20_Emphasis">StockNewsBR – Inteligência de Mercado com IA</text:span></text:p>
      <text:h text:style-name="Heading_20_3" text:outline-level="3">Aceitação</text:h>
      <text:p text:style-name="Text_20_body">Ao utilizar a plataforma, o usuário declara estar de acordo com <text:span text:style-name="T1">todos </text:span>os termos de uso.</text:p>
      <text:h text:style-name="Heading_20_3" text:outline-level="3">Natureza do serviço</text:h>
      <text:p text:style-name="Text_20_body">O StockNewsBR oferece ferramentas<text:span text:style-name="T1"> </text:span>de análise de dados e informações de mercado com caráter educacional.</text:p>
      <text:h text:style-name="Heading_20_3" text:outline-level="3">Responsabilidade do usuário</text:h>
      <text:p text:style-name="Text_20_body">As decisões de investimento são de responsabilidade exclusiva do usuário.</text:p>
      <text:h text:style-name="Heading_20_3" text:outline-level="3">Licença</text:h>
      <text:p text:style-name="Text_20_body">O acesso à plataforma é pessoal e intransferível <text:span text:style-name="T1">em todas as redes socias:</text:span></text:p>
      <text:h text:style-name="P1" text:outline-level="3">Telegram, X (Twitter), Facebook, Google A<text:span text:style-name="T1">pp, </text:span><text:span text:style-name="T2">Instagram, Youtube, </text:span><text:span text:style-name="T1">Website, publicacoes, etc.. tudo q tenha o nome “StocknewsBR”. </text:span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7:57:55.155000000</dc:date>
    <meta:editing-duration>PT13M44S</meta:editing-duration>
    <meta:editing-cycles>9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1" meta:word-count="91" meta:character-count="608" meta:non-whitespace-character-count="525"/>
  </office:meta>
</office:document-meta>
</file>