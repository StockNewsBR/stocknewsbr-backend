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paragraph-rsid="000423d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🌐 Produto 2 — Plataforma Web</text:h>
      <text:p text:style-name="P2"><text:span text:style-name="Strong_20_Emphasis">StockNewsBR – Inteligência de Mercado com IA</text:span></text:p>
      <text:p text:style-name="Text_20_body">Versão profissional da plataforma.</text:p>
      <text:p text:style-name="Text_20_body">Inspirada em <text:span text:style-name="Strong_20_Emphasis">terminais institucionais de trading</text:span>.</text:p>
      <text:p text:style-name="Text_20_body">Recursos:</text:p>
      <text:list text:style-name="L1">
        <text:list-item>
          <text:p text:style-name="P1">múltiplos monitores</text:p>
        </text:list-item>
        <text:list-item>
          <text:p text:style-name="P1">abas independentes</text:p>
        </text:list-item>
        <text:list-item>
          <text:p text:style-name="P1">12 módulos de IA</text:p>
        </text:list-item>
        <text:list-item>
          <text:p text:style-name="P1">gráficos</text:p>
        </text:list-item>
        <text:list-item>
          <text:p text:style-name="P1">scanner de mercado</text:p>
        </text:list-item>
      </text:list>
      <text:p text:style-name="Text_20_body">Isso já está descrito no material educacional que você enviou. </text:p>
      <text:p text:style-name="Text_20_body">education.html (VERSÃO FINAL CO…</text:p>
      <text:p text:style-name="Text_20_body">Exemplo:</text:p>
      <text:p text:style-name="Text_20_body">Monitor 1 — Heat Map<text:line-break/>Monitor 2 — Radar<text:line-break/>Monitor 3 — Breakout<text:line-break/>Monitor 4 — Volatility<text:line-break/>Monitor 5 — Institutional Flow<text:line-break/>Monitor 6 — Smart Money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8T16:41:14.253000000</meta:creation-date>
    <dc:date>2026-03-08T18:10:03.778000000</dc:date>
    <meta:editing-duration>PT1M43S</meta:editing-duration>
    <meta:editing-cycles>3</meta:editing-cycles>
    <meta:generator>EasyOffice/7.6.2.1.0$Windows_X86_64 LibreOffice_project/0bc4d647150f05f02b71ccb5539a4012b57f1faf</meta:generator>
    <meta:document-statistic meta:table-count="0" meta:image-count="0" meta:object-count="0" meta:page-count="1" meta:paragraph-count="14" meta:word-count="75" meta:character-count="488" meta:non-whitespace-character-count="423"/>
  </office:meta>
</office:document-meta>
</file>